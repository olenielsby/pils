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style:tab-stops>
          <style:tab-stop style:position="5.662cm"/>
        </style:tab-stops>
      </style:paragraph-properties>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line-height="100%"/>
      <style:text-properties fo:font-style="normal" style:font-style-asian="normal" style:font-style-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text-underline-style="none" fo:font-weight="normal" style:font-weight-asian="normal" style:font-weight-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fo:font-weight="normal" style:font-style-asian="italic" style:font-weight-asian="normal" style:font-style-complex="italic" style:font-weight-complex="normal"/>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Heading">
      <style:text-properties fo:font-size="20pt" fo:font-weight="bold" style:font-size-asian="20pt" style:font-weight-asian="bold" style:font-size-complex="20pt" style:font-weight-complex="bold"/>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Text_20_body" style:list-style-name="L1"/>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3">
      <style:text-properties fo:font-weight="normal" style:font-weight-asian="normal" style:font-weight-complex="normal"/>
    </style:style>
    <style:style style:name="P22" style:family="paragraph" style:parent-style-name="Text_20_body" style:list-style-name="L4">
      <style:text-properties fo:font-weight="normal" style:font-weight-asian="normal" style:font-weight-complex="normal"/>
    </style:style>
    <style:style style:name="P23" style:family="paragraph" style:parent-style-name="Text_20_body" style:list-style-name="L5">
      <style:text-properties fo:font-weight="normal" style:font-weight-asian="normal" style:font-weight-complex="normal"/>
    </style:style>
    <style:style style:name="P24" style:family="paragraph" style:parent-style-name="Text_20_body">
      <style:text-properties fo:font-style="normal" fo:font-weight="bold" style:font-style-asian="normal" style:font-weight-asian="bold" style:font-style-complex="normal" style:font-weight-complex="bold"/>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list-style-name="L4">
      <style:text-properties fo:font-style="normal" fo:font-weight="normal" style:font-style-asian="normal" style:font-weight-asian="normal" style:font-style-complex="normal" style:font-weight-complex="normal"/>
    </style:style>
    <style:style style:name="P27" style:family="paragraph" style:parent-style-name="Text_20_body" style:list-style-name="L4"/>
    <style:style style:name="P28" style:family="paragraph" style:parent-style-name="Text_20_body">
      <style:text-properties fo:font-weight="bold" style:font-weight-asian="bold" style:font-weight-complex="bold"/>
    </style:style>
    <style:style style:name="P29" style:family="paragraph" style:parent-style-name="Standard" style:list-style-name="L3">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position="super 58%"/>
    </style:style>
    <style:style style:name="T14" style:family="text">
      <style:text-properties style:text-position="super 58%" fo:font-style="normal" fo:font-weight="normal" style:font-style-asian="normal" style:font-weight-asian="normal" style:font-style-complex="normal" style:font-weight-complex="normal"/>
    </style:style>
    <style:style style:name="T15" style:family="text">
      <style:text-properties style:text-position="super 58%" fo:font-style="normal" style:font-style-asian="normal" style:font-style-complex="normal"/>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PILS programming language</text:p>
      <text:h text:style-name="Heading_20_1" text:outline-level="1">Introduction</text:h>
      <text:p text:style-name="Text_20_body">The PILS programming language and system has been developed by me during the years 1979 to 2008, originally as an attempt to improve on Lisp. However, under influence of Prolog, C++, XSLT and SQL, and certain features of spoken Danish, it grew into something quite different.</text:p>
      <text:p text:style-name="Text_20_body">Like Lisp, PILS uses a unified data model for programs and data, but whereas Lisp uses lists, PILS uses attribute based nodes as the building stones of its data model. For brevity, attributes are referred to as <text:span text:style-name="T1">legs. </text:span><text:span text:style-name="T5">The simple functions in Lisp have, by Prolog inspiration, given way for pattern matching based rulesets, which – inspired by C++ – are treated as objects and can be combined in may ways.</text:span></text:p>
      <text:p text:style-name="Text_20_body">PILS is usable for all sorts of projects except those that need heavy number crunching or finer synchronization primitives than those offered by PILS. A rich set of fast text and list processing operations is offered, and the programming system, though small in size, is quite mature and flexible, with support for pinning bugs in the source code. Bindings to the <text:span text:style-name="T1">juce</text:span><text:span text:style-name="T5"> library</text:span> and worker threads allow for smooth GUI applications, though the bindings and the library that wraps them are not yet full-featured.</text:p>
      <text:h text:style-name="Heading_20_2" text:outline-level="2">Terms of use, development and redistribution</text:h>
      <text:p text:style-name="Text_20_body">The source code for the PILS system is public domain (i.e. you can do what you want with it) except the Juce GUI library, see<text:span text:style-name="T11"> <text:s/>http://www.rawmaterialsoftware.com/juce/</text:span> <text:s/>which is GPL 2 license unless a license is paid.</text:p>
      <text:p text:style-name="Text_20_body">PILS was designed for open-source projects and does not support obfuscation or compilation.</text:p>
      <text:p text:style-name="Text_20_body">Military institutions and weapon's industry should expect no cooperation from my side. Aside from that, I will help with PILS when possible.</text:p>
      <text:h text:style-name="Heading_20_2" text:outline-level="2">Reading this document</text:h>
      <text:p text:style-name="Text_20_body">I have tried to arrange the material in an order that makes sense, but due to the intertwined dependencies between various aspects of the language and programming system, some sections refer to material that is introduced in later sections. If you are new to PILS, you should probably first read it and grasp as much as you can, then try some PILS coding, then reread.</text:p>
      <text:h text:style-name="Heading_20_2" text:outline-level="2">Some general characteristics of PILS</text:h>
      <text:list xml:id="list35479450" text:style-name="L1">
        <text:list-item>
          <text:p text:style-name="P18">PILS has – or attempts to provide – a programmer friendly syntax, covering a Lisp/XML flavour data model.</text:p>
        </text:list-item>
        <text:list-item>
          <text:p text:style-name="P18">PILS is a pure functional programming language; nodes, lists and text strings cannot be changed once they are created. This is exploited internally to specialize nodes according to their contents.</text:p>
        </text:list-item>
        <text:list-item>
          <text:p text:style-name="P18">PILS is dynamically typed and lexically scoped. Objects are constructed by binding rulesets and combining them. External objects – such as components from the GUI system – can be extended or combined with PILS objects.</text:p>
        </text:list-item>
        <text:list-item>
          <text:p text:style-name="P18">Pinning of bugs in PILS source code is supported by responders and their model of responsibility, in combination with a parser mode that reports positions in the source.</text:p>
        </text:list-item>
        <text:list-item>
          <text:p text:style-name="P18">Memory management is reference counter based, with immediate release. This ensures fast automatic freeing of resources.<text:line-break/>Note that the <text:span text:style-name="T1">compacting garbage collection </text:span><text:span text:style-name="T5">used by </text:span>Java and .NET is incompatible with the PILS data model, which relies heavily on hashing of pointers. There is no way to create a fast PILS system as managed code in those systems, and no plans to adapt PILS to them.</text:p>
        </text:list-item>
        <text:list-item>
          <text:p text:style-name="P18">Built-in operations have precedence over those defined by rulesets; you cannot redefine <text:s/><text:span text:style-name="T11">2 + 2</text:span> to be <text:s/><text:span text:style-name="T11">5</text:span><text:span text:style-name="T12"> , though </text:span>you could use a language object to redirect <text:s/><text:span text:style-name="T11">+</text:span> <text:s/>to another symbol. Rulesets may however define rules for the built-in operators to handle cases that are not predefined, such as calculations on tuples.</text:p>
        </text:list-item>
        <text:list-item>
          <text:p text:style-name="P18">PILS is implemented by an interpreter that was originally written in assembler and later rewritten in crack style C++. The source is available but hardly documented. Patterns are compiled to <text:s/>blocks of C++ objects specialized for matching.</text:p>
        </text:list-item>
      </text:list>
      <text:h text:style-name="Heading_20_2" text:outline-level="2">The building blocks</text:h>
      <text:p text:style-name="Text_20_body">The principal building block of PILS data is a <text:span text:style-name="T1">node</text:span><text:span text:style-name="T5">,</text:span><text:span text:style-name="T1"> </text:span>consisting of a node name and one or more uniquely named attributes, called <text:span text:style-name="T1">legs</text:span>. The node name and leg names can be arbitrary constants, including constant nodes. Leg values can be arbitrary PILS data.</text:p>
      <text:p text:style-name="Text_20_body">The node name and leg names are kept in a cliche which is shared by all nodes with the same combination of node name and leg names, regardless of leg order.</text:p>
      <text:p text:style-name="Text_20_body">Besides nodes and cliches, PILS has lists, numbers, strings and a few special types. Strings are utf-8 encoded, numbers are high precision floating point (<text:span text:style-name="T1">doubles</text:span><text:span text:style-name="T5">) of which integers are a special case, </text:span>lists are sequences indexed from 1 and support piped operations: when a list is subjected to a series of operations, they will be performed on each list element in turn when possible, saving the need for constructing temporary list objects.</text:p>
      <text:h text:style-name="Heading_20_2" text:outline-level="2">Constants and expressives</text:h>
      <text:p text:style-name="Text_20_body">Depending on how the interpreter treats them, all PILS data can be classified as <text:span text:style-name="T1">constants</text:span><text:span text:style-name="T5"> or </text:span><text:span text:style-name="T1">expressives</text:span><text:span text:style-name="T5">. Both constants and expressives are immutable, however constants are characterized by being immune to evaluation; the result of evaluating a constant is the constant itself, and the only thing that fits a constant pattern is that same constant. Expressives, on the other hand, may evaluate to something else, and can be matched by something else.</text:span></text:p>
      <text:p text:style-name="P6">Constants have no identity and are always uniquely represented. They are registered in a global hash table on creation.</text:p>
      <text:p text:style-name="Text_20_body">All programming constructs are represented by specially named nodes. Such nodes, and nodes and lists that contain them are<text:span text:style-name="T5"> expressives, all other data are constants. Expressives have identity, which is used by the programming system to pinpoint failing expressives in the text from which they were parsed, which is how failing expressions are traced to the PILS source text.</text:span></text:p>
      <text:p text:style-name="P6">External objects are treated as constants, though they may have state.</text:p>
      <text:h text:style-name="Heading_20_2" text:outline-level="2">Rules, patterns and objects</text:h>
      <text:p text:style-name="P6">PILS objects are built from rulesets – lists of rules of the form <text:s/><text:span text:style-name="T11">{</text:span><text:span text:style-name="T2">pattern</text:span><text:span text:style-name="T11">|</text:span><text:span text:style-name="T2">action</text:span><text:span text:style-name="T11">} </text:span><text:span text:style-name="T12">. When a ruleset is evaluated, it is bound to the current context, creating an object which can processes a call by trying rules with patterns that match the call. For the call to succeed, an action must </text:span><text:span text:style-name="T2">take responsibility</text:span><text:span text:style-name="T12">, typically by means of an <text:s/></text:span><text:span text:style-name="T11">:ok</text:span><text:span text:style-name="T12"> <text:s/>responder.</text:span></text:p>
      <text:p text:style-name="P2">Rulesets can be created dynamically, simply by constructing nodes of the appropriate form – they will be compiled and indexed automatically. Bound rulesets can be combined to aggregates.</text:p>
      <text:p text:style-name="P6">The pattern matching exploits the uniqueness of constants; often, complex structures can be recognized or rejected based on simple pointer comparisons. There is an overhead on constructing data structures, but this is mostly outweighed by the fast data recognition you get in return, except for number crunching which suffers from the boxing and hashing required to make numbers fit into a data model built for pattern-matching and searching.</text:p>
      <text:h text:style-name="Heading_20_2" text:outline-level="2">Error handling</text:h>
      <text:p text:style-name="P6">PILS has a fine-grained error handling system which, to my knowledge, is not found in similar form elsewhere.</text:p>
      <text:p text:style-name="P6">In weakly-typed languages, bugs can be hard to locate, as failures will happen in unexpected places, far from the bugs that cause them.</text:p>
      <text:p text:style-name="P6">PILS remedies this by means of <text:span text:style-name="T1">responders </text:span>and <text:span text:style-name="T1">blaming</text:span> – the failure of an expression can be blamed on another expression, responsible for calling it. This is accomplished by calling with the <text:s/><text:span text:style-name="T11">:try</text:span><text:span text:style-name="T12"> <text:s/>and <text:s/></text:span><text:span text:style-name="T11">:need</text:span><text:span text:style-name="T12"> <text:s/>responders, which will blame the caller of their containing rule in case of failure.</text:span></text:p>
      <text:p text:style-name="P6">The mechanism bears some resemblance to the concept known to mainstream programmers as <text:span text:style-name="T1">structured exception handling</text:span>, but PILS blaming is more fine-grained and integrated with lexical scoping.</text:p>
      <text:h text:style-name="Heading_20_2" text:outline-level="2">The programming system</text:h>
      <text:p text:style-name="P2">PILS projects are stored in PILS library files. These are flat utf-8 text files that consist of a list of other libraries files required, followed by a list of named PILS modules. Module names are lists of PILS names, shown as a tree by the programming system.</text:p>
      <text:p text:style-name="P6"><text:span text:style-name="T12">When a PILS file is opened, a </text:span><text:span text:style-name="T2">program strap </text:span><text:span text:style-name="T12">is created, merging the library and the libraries it import, and their imports, and the libraries that constitute the programming system, and possibly some configuration files.</text:span></text:p>
      <text:p text:style-name="P2">The executable has bindings for the juce library. These are used through a framework library that hides some of the framework specific details and allows programming in other languages than English.</text:p>
      <text:h text:style-name="Heading_20_2" text:outline-level="2">Installing and running on MS Windows</text:h>
      <text:p text:style-name="P6">PILS comes as an installer created with InnoSetup – the interface will be familiar to most users. The executable is statically linked against the run time libraries of Visual C++ 2008 Express, so no redistributables are required. An uninstall function is supplied.</text:p>
      <text:p text:style-name="P6">PILS was developed and tested on the Danish edition of Windows XP.</text:p>
      <text:h text:style-name="Heading_20_1" text:outline-level="1">Syntax and data model</text:h>
      <text:h text:style-name="Heading_20_2" text:outline-level="2">Constant syntax</text:h>
      <text:h text:style-name="Heading_20_3" text:outline-level="3">Numbers</text:h>
      <text:p text:style-name="Text_20_body">Numbers are written as usual, with a leading <text:s/><text:span text:style-name="T11">-</text:span> <text:s/>for negative numbers. The decimal point, if present, must be between digits and can be <text:span text:style-name="T12"><text:s/></text:span><text:span text:style-name="T11">,</text:span><text:span text:style-name="T12"> <text:s/>(comma) or <text:s/></text:span><text:span text:style-name="T11">.</text:span><text:span text:style-name="T12"> <text:s/>(dot). </text:span>C style hexadecimal notation is supported for integers<text:span text:style-name="T12">.</text:span></text:p>
      <text:h text:style-name="Heading_20_3" text:outline-level="3">Strings</text:h>
      <text:p text:style-name="Text_20_body"><text:span text:style-name="T12">Strings are written as arbitrary character sequences delimited by <text:s/></text:span><text:span text:style-name="T11">" <text:s/></text:span><text:span text:style-name="T12">(double-quote) which must be doubled in strings.</text:span></text:p>
      <text:p text:style-name="P11"><text:tab/>"This is a string containing a double-quote """</text:p>
      <text:p text:style-name="Text_20_body"><text:span text:style-name="T12">After the last <text:s/></text:span><text:span text:style-name="T11">"</text:span><text:span text:style-name="T12"> <text:s/>may follow a </text:span><text:span text:style-name="T2">scraper – </text:span><text:span text:style-name="T12">a sequence of two-digit hexadecimal byte values, doubled double-quotes and </text:span><text:span text:style-name="T6"><text:s/></text:span><text:span text:style-name="T2">scrapes</text:span><text:span text:style-name="T6">.</text:span></text:p>
      <text:p text:style-name="Text_20_body"><text:span text:style-name="T6">The </text:span><text:span text:style-name="T2">scrapes</text:span><text:span text:style-name="T6"> are:</text:span></text:p>
      <text:p text:style-name="Text_20_body"><text:span text:style-name="T6"><text:tab/></text:span><text:span text:style-name="T7">= </text:span><text:span text:style-name="T6"><text:s/>for LF (linefeed, standard line terminator in Unix and PILS)<text:line-break/><text:tab/></text:span><text:span text:style-name="T7">&lt; <text:s/></text:span><text:span text:style-name="T6">for CR (Carriage return, Macintosh line terminator)<text:line-break/><text:tab/></text:span><text:span text:style-name="T7">&gt;</text:span><text:span text:style-name="T6"> <text:s/>for TAB<text:line-break/><text:tab/></text:span><text:span text:style-name="T7">~</text:span><text:span text:style-name="T6"> <text:s/>or <text:s/></text:span><text:span text:style-name="T7">*</text:span><text:span text:style-name="T6"> <text:s/>for NULL<text:line-break/><text:tab/></text:span><text:span text:style-name="T7">/</text:span><text:span text:style-name="T6"> <text:s/>for CR+LF (DOS/Windows line terminator)</text:span></text:p>
      <text:p text:style-name="P2">Example:</text:p>
      <text:p text:style-name="P8"><text:tab/>"This string ends with a line terminator"=</text:p>
      <text:p text:style-name="P2">A scraper can be followed by more text:</text:p>
      <text:p text:style-name="P8"><text:tab/>"This is a"="two-line string"=</text:p>
      <text:p text:style-name="Text_20_body"><text:span text:style-name="T6">Strings can be divided over multiple lines with <text:s/></text:span><text:span text:style-name="T7">-</text:span><text:span text:style-name="T6"> <text:s/>(hyphen).</text:span></text:p>
      <text:p text:style-name="P8"><text:tab/>"This is a single line of text "-<text:line-break/><text:tab/>"that has been spread over two lines in the source."</text:p>
      <text:p text:style-name="P2">The encoding is always utf-8, so accented letters are represented as two-byte-sequences.</text:p>
      <text:p text:style-name="P2">Numbers and strings can be used directly as node and leg names.</text:p>
      <text:h text:style-name="Heading_20_3" text:outline-level="3">Timestamps, datings, durations and colors</text:h>
      <text:p text:style-name="Text_20_body">PILS has three built-in types for handling of time.</text:p>
      <text:p text:style-name="Text_20_body"><text:span text:style-name="T3">Timestamps</text:span> are stored internally as GMT, but written using local time with timezone indicators</text:p>
      <text:p text:style-name="Text_20_body"><text:tab/><text:span text:style-name="T11">2008-12-06T19:00:05.161+01:00</text:span></text:p>
      <text:p text:style-name="Text_20_body">Minutes, seconds and milliseconds are optional, as are the minutes in the timezone indicator. GMT can be indicated by <text:s/><text:span text:style-name="T11">+00:00</text:span> , <text:s/><text:span text:style-name="T11">+00</text:span> <text:s/>or <text:s/><text:span text:style-name="T11">Z</text:span> .</text:p>
      <text:p text:style-name="Text_20_body"><text:span text:style-name="T3">Datings</text:span> are abstract time indications consisting of a date and time. They are not associated with any timezone. They are written like timestamps but without the timezone indicator.</text:p>
      <text:p text:style-name="Text_20_body"><text:span text:style-name="T3">Durations</text:span> are written like:</text:p>
      <text:p text:style-name="Text_20_body"><text:tab/><text:span text:style-name="T11">1001d5h20m4.567s</text:span></text:p>
      <text:p text:style-name="Text_20_body">for 1001 days, 5 hours, 20 minutes, 4 seconds and 567 milliseconds. Weeks, months and years are not supported in durations. Parts of the duration may be omitted; a quarter of an hour can be written as:</text:p>
      <text:p text:style-name="Text_20_body"><text:tab/><text:span text:style-name="T11">15m</text:span></text:p>
      <text:p text:style-name="P1">Durations can be negative:</text:p>
      <text:p text:style-name="P1"><text:tab/><text:span text:style-name="T11">-3h20m</text:span></text:p>
      <text:p text:style-name="P1">for minus three hours and 20 minutes.</text:p>
      <text:p text:style-name="P1">The decimal point in time indications is always <text:s/><text:span text:style-name="T11">.</text:span> <text:s/>and is used only to separate seconds from milliseconds.</text:p>
      <text:p text:style-name="P1"><text:span text:style-name="T3">Colors</text:span> are written as <text:s/># <text:s/>followed by RGB (red-green-blue) values and an optional alpha value, each written as two hexadecimal digits, as in HTML. If no alpha value is given, 0xff is used.</text:p>
      <text:p text:style-name="Text_20_body"><text:tab/><text:span text:style-name="T11">#ffff00</text:span><text:tab/><text:span text:style-name="T1">yellow</text:span><text:line-break/><text:tab/><text:span text:style-name="T11">#ffff00ff</text:span><text:tab/><text:span text:style-name="T1">yellow, with explicit alpha value</text:span></text:p>
      <text:p text:style-name="P2">Presently, only 8-bit color channels are supported.</text:p>
      <text:h text:style-name="Heading_20_3" text:outline-level="3">Constant brackets [ ... ]</text:h>
      <text:p text:style-name="P2">Composite constants (cliches, nodes and list) are usually enclosed in <text:span text:style-name="T1">constant brackets </text:span><text:s/><text:span text:style-name="T11">[ ]</text:span> . For cliches, the brackets are mandatory and part of their syntax, for nodes and lists, they are optional. Inside constant brackets, simplified syntax rules are used: the constructs described in the chapter on expressions are not valid, names and operators are treated as simple constants. An example:</text:p>
      <text:p text:style-name="P2"><text:span text:style-name="T11"><text:tab/>2 + 2 <text:s text:c="3"/></text:span>is an expression that will result in the value <text:s/><text:span text:style-name="T11">4</text:span></text:p>
      <text:p text:style-name="P2"><text:span text:style-name="T11"><text:tab/>[2 + 2] <text:s text:c="3"/></text:span>is a list of three constants <text:s/><text:span text:style-name="T11">2 </text:span>,<text:span text:style-name="T11"> <text:s/>[+] <text:s/></text:span>and <text:s/><text:span text:style-name="T11">2</text:span></text:p>
      <text:h text:style-name="Heading_20_3" text:outline-level="3">Cliches, nodes and lists</text:h>
      <text:p text:style-name="Text_20_body"><text:span text:style-name="T6">Cliches: <text:s/></text:span><text:span text:style-name="T7">[</text:span><text:span text:style-name="T2">node-name</text:span><text:span text:style-name="T7">|</text:span><text:span text:style-name="T2">leg-name</text:span><text:span text:style-name="T7">|</text:span><text:span text:style-name="T2">leg-name ...</text:span><text:span text:style-name="T7">]</text:span></text:p>
      <text:p text:style-name="P1"><text:span text:style-name="T5">Node constants: <text:s/></text:span><text:span text:style-name="T1">node-name</text:span><text:span text:style-name="T7">: .</text:span><text:span text:style-name="T1">leg-name</text:span><text:span text:style-name="T7"> </text:span><text:span text:style-name="T1">leg-value ...</text:span></text:p>
      <text:p text:style-name="P2">List constants: <text:s/><text:span text:style-name="T1">element</text:span><text:span text:style-name="T11">,</text:span><text:span text:style-name="T3"> </text:span><text:span text:style-name="T1">...</text:span><text:span text:style-name="T11"> <text:s/></text:span>(the <text:s/><text:span text:style-name="T11">,</text:span> <text:s/>after the last element is optional)</text:p>
      <text:p text:style-name="P2">The empty list <text:s/><text:span text:style-name="T11">[]</text:span> <text:s/>can be omitted when this does not lead to ambiguities. Inside constant brackets, <text:s/><text:span text:style-name="T11">?</text:span> <text:s/>also denotes the empty list.</text:p>
      <text:p text:style-name="P2">In constant nodes, leg values can be omitted when identical to the leg name.</text:p>
      <text:p text:style-name="Text_20_body">Nodes are <text:span text:style-name="T1">greedy</text:span><text:span text:style-name="T5">:</text:span><text:span text:style-name="T1"> </text:span><text:s/>whenever a node is started, it goes as far as possible. As a consequence of this, embedded control structures usually do not need parentheses.</text:p>
      <text:p text:style-name="P2">Within constant brackets, list constants of two or more elements can be written as <text:span text:style-name="T1">shortlists </text:span>without commas. Shortlists can be embedded in comma separated lists, as in this matrix:</text:p>
      <text:p text:style-name="P8"><text:tab/>[1 0 0, 0 1 0, 0 0 1]</text:p>
      <text:p text:style-name="P2">Generally, string lists should not be written as shortlists, as this leads to confusing syntax. Write:</text:p>
      <text:p text:style-name="P2"><text:tab/><text:span text:style-name="T11">s *=* ["bad", "good"]</text:span></text:p>
      <text:p text:style-name="P2">rather than</text:p>
      <text:p text:style-name="P8"><text:tab/>s *=* ["bad" "good"]</text:p>
      <text:h text:style-name="Heading_20_3" text:outline-level="3">Tails and principal legs</text:h>
      <text:p text:style-name="P2">A <text:span text:style-name="T1">tail </text:span>is leg whose name is the empty list, <text:s/><text:span text:style-name="T11">[]</text:span> . The PILS interpreter links many structures by their tail. The tail can be written in any position – directly after the node head:</text:p>
      <text:p text:style-name="P2"><text:tab/><text:span text:style-name="T11">node:</text:span> <text:span text:style-name="T1">tail</text:span></text:p>
      <text:p text:style-name="P2">or later, using <text:span text:style-name="T11">;</text:span> <text:s/>(semicolon)</text:p>
      <text:p text:style-name="P2"><text:span text:style-name="T11"><text:tab/>node: .name value;</text:span> <text:span text:style-name="T1">tail</text:span></text:p>
      <text:p text:style-name="P2">Other legs may follow the tail.</text:p>
      <text:p text:style-name="P2">The tail must be separated from the preceding <text:s/><text:span text:style-name="T11">: <text:s/></text:span>or <text:s/><text:span text:style-name="T11">;</text:span> <text:s/>by whitespace.</text:p>
      <text:p text:style-name="P2">A <text:span text:style-name="T1">principal leg </text:span>is a leg whose name is the same as the node name. This has no special significance to PILS except in namespace-nodes as described below, but the convention is often useful and is supported by a special notation: if the principal leg is written first, the name can be omitted:</text:p>
      <text:p text:style-name="P2"><text:tab/><text:span text:style-name="T11">message: . "Hi"</text:span> <text:s text:c="3"/>is the same as <text:s text:c="3"/><text:span text:style-name="T11">message: .message "Hi"</text:span></text:p>
      <text:h text:style-name="Heading_20_3" text:outline-level="3">Words and languages</text:h>
      <text:p text:style-name="Text_20_body">The PILS data model is very liberal with names: any constant, including node and list constants, can be used as a node name or leg name, though <text:span text:style-name="T1">name cliches</text:span><text:span text:style-name="T5"> are commonly used.</text:span></text:p>
      <text:p text:style-name="Text_20_body"><text:span text:style-name="T5">A </text:span><text:span text:style-name="T1">name cliche </text:span><text:span text:style-name="T5">is a cliche of two strings <text:s/></text:span><text:span text:style-name="T7">[</text:span><text:span text:style-name="T2">namespace-identifier</text:span><text:span text:style-name="T7">|</text:span><text:span text:style-name="T2">name-string</text:span><text:span text:style-name="T7">]</text:span><text:span text:style-name="T6"> , which is produced by parsing a token, with an optional namespace prefix, through a </text:span><text:span text:style-name="T2">language node.</text:span></text:p>
      <text:p text:style-name="P2">The language node maps prefixes to namespace-identifiers, and can map specific name-strings to specific constants for a given prefix, adapting PILS to use keywords of your preferred language. Language objects are used for user interfaces of PILS applications as well.</text:p>
      <text:p text:style-name="Text_20_body"><text:span text:style-name="T6">All built-in names recognized by PILS interpreter kernel have <text:s/></text:span><text:span text:style-name="T7">"pils.org/ns/sne" </text:span><text:span text:style-name="T6">as their namespace-identifier – <text:s/></text:span><text:span text:style-name="T7">sne <text:s/></text:span><text:span text:style-name="T6">is an acronym for </text:span><text:span text:style-name="T2">Scandinavian Nerd-English</text:span><text:span text:style-name="T6">. Native speakers of the English language should not hesitate to create language objects with a more natural terminology if the <text:s/></text:span><text:span text:style-name="T7">sne</text:span><text:span text:style-name="T6"> <text:s/>conventions seem inappropriate to them – and speakers of other languages should seriously consider using or creating mappings for their language.</text:span></text:p>
      <text:p text:style-name="P2">Localized – or polyglot – programming languages have been shunned since localized macro languages messed up word processing and spreadsheets long ago; however, PILS has been designed with theses issues in mind.</text:p>
      <text:h text:style-name="Heading_20_3" text:outline-level="3">Namespaces and the language node</text:h>
      <text:p text:style-name="P2">Parsing is always controlled by a language node:</text:p>
      <text:p text:style-name="P2"><text:span text:style-name="T11"><text:tab/>[language: </text:span><text:span text:style-name="T1">language-definition-node</text:span><text:span text:style-name="T11">]</text:span></text:p>
      <text:p text:style-name="P2">The<text:span text:style-name="T1"> language-definition-node </text:span>is a string-named node constant whose string-named legs hold <text:span text:style-name="T1">namespace-nodes. </text:span>The leg names are used as namespace prefixes. A principal leg is required and used to resolve names with no prefix.</text:p>
      <text:p text:style-name="P2">A<text:span text:style-name="T1"> namespace-node </text:span>is a node constant whose name is used as namespace-identifier for untranslated names with this namespace prefix. String-named legs of the <text:span text:style-name="T1">namespace-node</text:span> legs define translations. If the node name is <text:s/><text:span text:style-name="T11">- , </text:span>only translated identifiers are allowed; this is useful for restricting namespaces.</text:p>
      <text:p text:style-name="P2">The tail of a namespace-selector is a two-byte <text:span text:style-name="T1">write-control string</text:span>. Its first byte holds flags that controls the use of various syntactic conventions when writing, the last byte is used as decimal point and should be <text:s/><text:span text:style-name="T11">"."</text:span> <text:s/>or <text:s/><text:span text:style-name="T11">","</text:span> .</text:p>
      <text:p text:style-name="P2">The write control flags are:</text:p>
      <text:p text:style-name="P2">0x01<text:line-break/><text:tab/>control characters are escaped when writing strings<text:line-break/><text:tab/>(protects against dos/unix newline conversion and null characters)<text:line-break/>0x02<text:line-break/><text:tab/>all non-ascii characters are escaped<text:line-break/><text:tab/>(allows writing PILS expressions in pure ASCII)<text:line-break/>0x04<text:line-break/><text:tab/>non-utf-8 compliant data go unescaped (normally, such data will be escaped)<text:line-break/><text:tab/>(saves space when writing binary data as strings)<text:line-break/>0x10<text:line-break/><text:tab/>all names are written as cliches with string literals<text:line-break/><text:tab/>(verbose but independent of language)<text:line-break/>0x20<text:line-break/><text:tab/>sugar-free, expressions and rulesets are written using the basal node syntax<text:line-break/><text:tab/>(instructional – shows how PILS parses your expressions)</text:p>
      <text:p text:style-name="P2">All combinations are allowed; 0x02 overrules 0x04. The escape flags affect both names and string literals; if a name has characters that must be escaped, it is written using the string convention.</text:p>
      <text:p text:style-name="P2">Parsing is not affected by the write-control string; in particular, both <text:s/><text:span text:style-name="T11">"."</text:span> <text:s/>and <text:s/><text:span text:style-name="T11">"," <text:s/></text:span>are valid decimal points, regardless of which one is specified in the write-control string.</text:p>
      <text:p text:style-name="P2">PILS is booted with a language node similar to this:</text:p>
      <text:p text:style-name="P8"><text:tab/>[ language:<text:line-break/><text:tab/> <text:s/>"system": <text:s/><text:span text:style-name="T2">! default namespace prefix</text:span><text:line-break/><text:tab/> <text:s/>."system" ["pils.org/ns/sne":] <text:s/><text:span text:style-name="T2">! default namespace identifier</text:span><text:line-break/><text:tab/> <text:s/>."pils-configuration" <text:s/><text:span text:style-name="T2">! auxillary namespace</text:span><text:line-break/><text:tab/> <text:s text:c="3"/>[-: <text:s/><text:span text:style-name="T2">! only the following translated names are accepted in this namespace</text:span><text:line-break/><text:tab/> <text:s text:c="5"/>."platform". "juce"<text:span text:style-name="T2"> <text:s/>! values used by the boot process</text:span><text:line-break/><text:tab/> <text:s text:c="5"/>."system". "Win32" <text:s/><text:span text:style-name="T2">! replace with your favourite OS</text:span><text:line-break/><text:span text:style-name="T2"> <text:s text:c="24"/>! (other configuration values omitted here for brevity)</text:span><text:line-break/><text:tab/> <text:s text:c="3"/>]<text:line-break/><text:tab/> <text:s/>;<text:line-break/><text:tab/> <text:s/>""01"." <text:span text:style-name="T2"><text:s/>! writing flags, decimal point</text:span> <text:line-break/><text:tab/>]</text:p>
      <text:p text:style-name="P2">In this particular case, names like <text:s/><text:span text:style-name="T11">pils-configuration:framework <text:s/></text:span>are translated to strings which are used in the boot process to decide which PILS libraries to load.</text:p>
      <text:h text:style-name="Heading_20_3" text:outline-level="3">Language setting and internationalisation</text:h>
      <text:p text:style-name="P2">PILS can be localized to Danish by copying the library <text:s/>&lt;<text:span text:style-name="T11">lib&gt;/pils/danish/system/config.pils <text:s/></text:span>to the user's <text:s/><text:span text:style-name="T11">Application Data</text:span> folder. This library will then be included in all running programs, redirecting certain functions (notably <text:s/><text:span text:style-name="T11">say</text:span> <text:s/>and <text:s/><text:span text:style-name="T11">saying</text:span>) to use the danish language object defined in <text:s/>&lt;<text:span text:style-name="T11">lib&gt;/pils/danish/system/danish.pils</text:span> .</text:p>
      <text:p text:style-name="P2">Presently, only English and Danish are supported. To support another language, such as French, you should <text:s/>add these files to the system:</text:p>
      <text:p text:style-name="P2"><text:tab/>&lt;<text:span text:style-name="T11">lib&gt;/pils/french/system/config.pils</text:span></text:p>
      <text:p text:style-name="P2">which controls the indirection, and</text:p>
      <text:p text:style-name="P2"><text:tab/>&lt;<text:span text:style-name="T11">lib&gt;/pils/french/system/french.pils</text:span></text:p>
      <text:p text:style-name="P2">which defines the language object. A simplistic French language object might look like:</text:p>
      <text:p text:style-name="P8"><text:tab/>[ language:<text:line-break/><text:tab/> <text:s/>"fr":<text:line-break/><text:tab/> <text:s/>."fr"<text:line-break/> <text:s text:c="20"/>[ "pils.org/ns/fr":<text:line-break/><text:tab/> <text:s text:c="3"/>."bon" good<text:line-break/><text:tab/> <text:s text:c="3"/>."un" one<text:line-break/><text:tab/> <text:s text:c="3"/>."di" say<text:line-break/><text:tab/> <text:s text:c="3"/>."blanc" white<text:line-break/><text:tab/> <text:s/>]<text:line-break/><text:tab/> <text:s/>."system" ["pils.org/ns/sne":]<text:line-break/><text:tab/> <text:s/>;<text:line-break/><text:tab/> <text:s/>""01","<text:line-break/><text:tab/>]</text:p>
      <text:p text:style-name="P2">This will translate the name <text:s/><text:span text:style-name="T11">un <text:s/></text:span>to <text:s/><text:span text:style-name="T11">one <text:s/></text:span>(or, to spell it out:<text:span text:style-name="T11"> <text:s/>["pils.org/ns/sne"|"one"]</text:span> ), <text:s/>while<text:span text:style-name="T11"> <text:s/>vin <text:s/></text:span>would become <text:s/><text:span text:style-name="T11">["pils.org/ns/fr"|"vin"] <text:s/></text:span>since wine is not included in this simple vocabulary.</text:p>
      <text:p text:style-name="P2">If an French-speaking programmer writes this:</text:p>
      <text:p text:style-name="P8"><text:tab/>di [un bon vin blanc]</text:p>
      <text:p text:style-name="P2">an English user will see:</text:p>
      <text:p text:style-name="P8"><text:tab/>One good vin white</text:p>
      <text:p text:style-name="P2">which isn't quite what they teach at Harvard, but still intelligible.</text:p>
      <text:p text:style-name="P2">It is still possible to define rules that refine the translation somewhat.</text:p>
      <text:p text:style-name="P2">The danish language library defines a rude rule that tries to translates the English word <text:span text:style-name="T1">no </text:span>differently according to the context: <text:span text:style-name="T1">no </text:span>as an answer (<text:span text:style-name="T1">No thanks</text:span>) and <text:span text:style-name="T1">no</text:span> as a qualifier (<text:span text:style-name="T1">No smoking</text:span>) must be translated differently to make sense in Danish.</text:p>
      <text:p text:style-name="P2">For an example of a full-blown language node, see <text:s/><text:span text:style-name="T1">lib/danish/system/danish.pils</text:span> . Note that even language neutral operators should be defined as translations; otherwise they will get a national namespace identifier and not be recognized as built-in operators by PILS – though you could still use namespace prefixing to refer to the built-in symbols.</text:p>
      <text:p text:style-name="P2">The <text:s/><text:span text:style-name="T1">İstanbul express <text:s/></text:span>workaround – described in the section on text operators – explains how translations can be used to adapt the case conversion operators for Turkish, where the letter <text:s/><text:span text:style-name="T11">i <text:s/></text:span>preserves its dot in upper case.</text:p>
      <text:h text:style-name="Heading_20_3" text:outline-level="3">Regular names </text:h>
      <text:p text:style-name="P1">Arbitrary strings can be used as name-strings, but most of the time, <text:span text:style-name="T1">regular names</text:span> are used. These are written without string quotes.</text:p>
      <text:p text:style-name="P1">A regular name is any sequence of letters, operator symbols <text:s/><text:span text:style-name="T11">* / \ ^ # $ % &amp; </text:span>, additive symbols <text:s/><text:span text:style-name="T11">+ - </text:span>, relational symbols <text:s/><text:span text:style-name="T11">&lt; &gt; = ~ </text:span>, digits <text:s/><text:span text:style-name="T11">0 1 2 3 4 5 6 7 8 9</text:span> <text:s/>and <text:s/><text:span text:style-name="T11">. <text:s/></text:span>(dot), treating<text:span text:style-name="T11"> </text:span>'<text:span text:style-name="T11"> @ `</text:span> <text:span text:style-name="T11">_ </text:span>and all non-ascii characters (i.e. utf-8 multibyte characters) as letters, with the following exceptions:</text:p>
      <text:list xml:id="list35489173" text:style-name="L2">
        <text:list-item>
          <text:p text:style-name="P20">A regular name cannot start with a dot (this would be read as an attribute)</text:p>
        </text:list-item>
        <text:list-item>
          <text:p text:style-name="P20">or with a digit, or a hyphen followed by a digit (this would be read as a number)</text:p>
        </text:list-item>
      </text:list>
      <text:p text:style-name="P1">The general idea is, anything goes unless it means something else to the parser.</text:p>
      <text:p text:style-name="Text_20_body"><text:span text:style-name="T12">Names ending in an operator, additive or relational symbol are classified as operators, additive operators or relational operators, respectively. Inside constant brackets <text:s/></text:span><text:span text:style-name="T11">[]</text:span><text:span text:style-name="T12"> <text:s/>and for node or leg names, this classification is irrelevant, allowing operators to be used as node and leg names. The assignment symbol <text:s/></text:span><text:span text:style-name="T11">:=</text:span><text:span text:style-name="T12"> <text:s/>is formed by using a relational operator being as a leg name.</text:span></text:p>
      <text:p text:style-name="P1">A prefix is a regular name and a <text:s/><text:span text:style-name="T11">:</text:span> <text:s/>with no spaces. The prefix name is looked up in the namespace node, <text:s/>and this value is used to translate the following name or combine it with a namespace-identifier.</text:p>
      <text:p text:style-name="P1">When no prefix is used, or when the dummy prefix <text:s/><text:span text:style-name="T11">?: <text:s/></text:span>is used with string literal names, the default namespace will be used.</text:p>
      <text:p text:style-name="P1">A PILS expression cannot define namespace prefixes locally, the only valid namespace prefixes are those defined by the language object. It is still possible to read and write names of other namespaces, using the cliche notation:</text:p>
      <text:p text:style-name="Text_20_body"><text:span text:style-name="T7"><text:tab/>["</text:span><text:span text:style-name="T2">namespace-uri</text:span><text:span text:style-name="T7">"|"</text:span><text:span text:style-name="T2">local-name</text:span><text:span text:style-name="T7">"]</text:span></text:p>
      <text:h text:style-name="Heading_20_3" text:outline-level="3">The apostroph</text:h>
      <text:p text:style-name="Text_20_body">A single apostroph <text:s/><text:span text:style-name="T11">'</text:span> <text:s/>is interpreted as a repetition of the last read name which is neither an operator or relational operator.</text:p>
      <text:p text:style-name="P8"><text:tab/>{ ok | :ok ' + 1 }</text:p>
      <text:p text:style-name="P2">is the same as</text:p>
      <text:p text:style-name="P8"><text:tab/>{ ok | :ok ok + 1 }</text:p>
      <text:p text:style-name="P2">or</text:p>
      <text:p text:style-name="P8"><text:tab/>{ ok | :' ' + 1 }</text:p>
      <text:p text:style-name="P1">Further, all operators can be escaped by adding an apostroph <text:s/><text:span text:style-name="T11">'</text:span> . This causes them to be read as ordinary names, not including the apostroph.</text:p>
      <text:p text:style-name="P1"><text:span text:style-name="T5">Further apostrophs can be added to such names; the last is ignored and the rest is taken as an ordinary name. The same applies to names constisting of nothing but apostrophs. However, the final apostroph is included in the name if the last non-apostroph is not some kind of operator symbol.</text:span></text:p>
      <text:h text:style-name="Heading_20_3" text:outline-level="3">Language and namespace shorthands</text:h>
      <text:p text:style-name="P2">As a convenience, the parser accepts <text:s/><text:span text:style-name="T11">{} <text:s/></text:span>as a shorthand for the language node.</text:p>
      <text:p text:style-name="P2">The namespace-uri for a namespace prefix can be referred to by: <text:s/><text:span text:style-name="T1">prefix</text:span><text:span text:style-name="T11">:? <text:s/></text:span>or, for the default namespace, <text:s/><text:span text:style-name="T11">?:?</text:span></text:p>
      <text:h text:style-name="Heading_20_2" text:outline-level="2">Expressions</text:h>
      <text:h text:style-name="Heading_20_3" text:outline-level="3">Expressive nodes</text:h>
      <text:p text:style-name="Text_20_body">Generally, nodes are evaluated by evaluating their legs and creating a node from them with the same head and leg names (for node constants, this always results in the exact same node and is equivalent to simply returning the node).</text:p>
      <text:p text:style-name="Text_20_body">Nodes with names <text:s/><text:span text:style-name="T11">[]</text:span><text:span text:style-name="T12"> <text:s/>(the empty list) or <text:s/></text:span><text:span text:style-name="T11">[|action]</text:span><text:span text:style-name="T12"> <text:s/>are interpreted differently, and are written with special syntax:</text:span></text:p>
      <text:p text:style-name="Text_20_body"><text:span text:style-name="T12"><text:tab/></text:span><text:span text:style-name="T7">;</text:span><text:span text:style-name="T2">name value</text:span><text:span text:style-name="T3"> ... <text:s text:c="3"/></text:span><text:span text:style-name="T6">instead of</text:span><text:span text:style-name="T3"> <text:s text:c="3"/></text:span><text:span text:style-name="T11">[]: .</text:span><text:span text:style-name="T2">name value ...<text:line-break/></text:span><text:span text:style-name="T3"><text:tab/></text:span><text:span text:style-name="T7">;: </text:span><text:span text:style-name="T2">value</text:span><text:span text:style-name="T3"> ... <text:s text:c="3"/></text:span><text:span text:style-name="T6">instead of <text:s text:c="3"/></text:span><text:span text:style-name="T7">[]: </text:span><text:span text:style-name="T2">value ...<text:line-break/></text:span><text:span text:style-name="T12"><text:tab/></text:span><text:span text:style-name="T11">:</text:span><text:span text:style-name="T2">name ...</text:span><text:span text:style-name="T3"> <text:s text:c="3"/></text:span><text:span text:style-name="T6">instead of <text:s text:c="3"/></text:span><text:span text:style-name="T7">[|action]: .</text:span><text:span text:style-name="T2">name ...<text:line-break/><text:tab/></text:span><text:span text:style-name="T7">:</text:span><text:span text:style-name="T2"> value ...</text:span><text:span text:style-name="T3"> <text:s text:c="3"/></text:span><text:span text:style-name="T6">instead of <text:s text:c="3"/></text:span><text:span text:style-name="T7">[|action]: </text:span><text:span text:style-name="T2">value ...</text:span></text:p>
      <text:p text:style-name="P2">Empty-named nodes are used for declaring local bindings:</text:p>
      <text:p text:style-name="P6"><text:span text:style-name="T12"><text:tab/></text:span><text:span text:style-name="T11">;</text:span><text:span text:style-name="T2">name value</text:span><text:span text:style-name="T11">;</text:span><text:span text:style-name="T2"> ...</text:span></text:p>
      <text:p text:style-name="P2">Action nodes are used for control structures:</text:p>
      <text:p text:style-name="P6"><text:span text:style-name="T12"><text:tab/></text:span><text:span text:style-name="T11">:if</text:span><text:span text:style-name="T12"> </text:span><text:span text:style-name="T2">condition</text:span><text:span text:style-name="T11">;</text:span><text:span text:style-name="T2"> expression </text:span><text:span text:style-name="T11">.else</text:span><text:span text:style-name="T12"> </text:span><text:span text:style-name="T2">else-expression</text:span></text:p>
      <text:h text:style-name="Heading_20_3" text:outline-level="3">Name and phrase calls</text:h>
      <text:p text:style-name="P1">A standalone name</text:p>
      <text:p text:style-name="P1"><text:tab/><text:span text:style-name="T1">name</text:span></text:p>
      <text:p text:style-name="P2">is read as:</text:p>
      <text:p text:style-name="P2"><text:tab/><text:span text:style-name="T11">:call</text:span> <text:span text:style-name="T11">[</text:span><text:span text:style-name="T1">name</text:span><text:span text:style-name="T11">]</text:span></text:p>
      <text:p text:style-name="P2">In patterns, this binds the name to the corresponding value. In expressions, the current context will be searched for bindings or rules that match the name.</text:p>
      <text:p text:style-name="P1">If the name is followed by a constant, a ruleset or an expression in parentheses, a node is formed – this is called a phrase.</text:p>
      <text:p text:style-name="P1"><text:tab/><text:span text:style-name="T11">a 3</text:span> <text:s text:c="3"/>is read as <text:s text:c="3"/><text:span text:style-name="T11">:call [a: 3]</text:span></text:p>
      <text:p text:style-name="P1"><text:tab/><text:span text:style-name="T11">b {x|y}</text:span> <text:s text:c="3"/>is read as <text:s text:c="3"/><text:span text:style-name="T11">:call b: {x|y}</text:span></text:p>
      <text:p text:style-name="P1">Phrases can have named legs</text:p>
      <text:p text:style-name="P1"><text:tab/><text:span text:style-name="T11">line (.from a .to b)</text:span> <text:s text:c="3"/>is the same as: <text:s text:c="3"/><text:span text:style-name="T11">:call line: .from a .to b</text:span></text:p>
      <text:p text:style-name="P1">Principal legs and hidden leg values can be used:</text:p>
      <text:p text:style-name="P1"><text:tab/><text:span text:style-name="T11">message (.) <text:s text:c="3"/></text:span>is the same as: <text:s text:c="3"/><text:span text:style-name="T11">:call</text:span> <text:span text:style-name="T11">message: .message message</text:span></text:p>
      <text:p text:style-name="P1">Constant brackets can be used to form phrases:</text:p>
      <text:p text:style-name="P1"><text:tab/><text:span text:style-name="T11">message [. "Hello"] <text:s text:c="3"/></text:span>is the same as: <text:s text:c="3"/><text:span text:style-name="T11">:call</text:span> <text:span text:style-name="T11">[message: .message "Hello"]</text:span></text:p>
      <text:p text:style-name="Text_20_body"><text:span text:style-name="T12">In patterns, constant phrases work like names but expressive phrases are treated as </text:span><text:span text:style-name="T6">ordinary nodes, which rarely makes sense. </text:span><text:span text:style-name="T12">In <text:s/>expressions, expressive phrases are evaluated before the call is executed.</text:span></text:p>
      <text:h text:style-name="Heading_20_3" text:outline-level="3">Object calls</text:h>
      <text:p text:style-name="P1">Two consecutive items are read as an object call:</text:p>
      <text:p text:style-name="P1"><text:tab/><text:span text:style-name="T11">(a) (b) <text:s text:c="3"/></text:span>is the same as <text:s text:c="3"/><text:span text:style-name="T11">:who a .call b<text:line-break/><text:tab/></text:span>or, to spell it out: <text:s text:c="3"/><text:span text:style-name="T11">:who (:call [a]) .call :call [b]</text:span></text:p>
      <text:p text:style-name="P1">If the second item is a name or phrase, it is read as a method call:</text:p>
      <text:p text:style-name="P1"><text:tab/><text:span text:style-name="T11">a b <text:s text:c="4"/></text:span>is the same as <text:s text:c="3"/><text:span text:style-name="T11">:who a .call [b]<text:line-break/><text:tab/></text:span>or, to spell it out: <text:s text:c="3"/><text:span text:style-name="T11">:who (:call [a]) .call [b]</text:span></text:p>
      <text:p text:style-name="P1">Object calls are chained from the left:</text:p>
      <text:p text:style-name="P1"><text:tab/><text:span text:style-name="T11">a b c </text:span><text:span text:style-name="T1"><text:s/></text:span><text:span text:style-name="T5"><text:s text:c="2"/>is the same as <text:s text:c="3"/></text:span><text:span text:style-name="T7">(a b) c</text:span></text:p>
      <text:p text:style-name="P1"><text:span text:style-name="T5">In patterns, object calls are not generally meaningful. Some method calls are reserved for typechecks and various other purposes. To match an object call node, a pattern should specify an escaped object call, such as <text:s/></text:span><text:span text:style-name="T7">: (a) (b) <text:s/></text:span><text:span text:style-name="T5">or, using a more explicit syntax, <text:s/></text:span><text:span text:style-name="T7">::who a .call b </text:span><text:span text:style-name="T5">.</text:span><text:bookmark-start text:name="DDE_LINK"/><text:bookmark-end text:name="DDE_LINK"/></text:p>
      <text:h text:style-name="Heading_20_3" text:outline-level="3">Calls, errors and misses</text:h>
      <text:p text:style-name="Text_20_body">An expression can return to its caller in the following way:</text:p>
      <text:list xml:id="list35482426" text:style-name="L3">
        <text:list-item>
          <text:p text:style-name="P29">The expression succeeds, and a value is returned.</text:p>
          <text:list>
            <text:list-header>
              <text:p text:style-name="P21"><text:span text:style-name="T11">2 + 2</text:span> <text:s text:c="3"/><text:span text:style-name="T5">returns</text:span><text:span text:style-name="T1"> <text:s text:c="3"/></text:span><text:span text:style-name="T11">4</text:span></text:p>
            </text:list-header>
          </text:list>
        </text:list-item>
        <text:list-item>
          <text:p text:style-name="P29">The expression misses, that is, PILS has no methods of evaluating it.</text:p>
          <text:list>
            <text:list-header>
              <text:p text:style-name="P21"><text:span text:style-name="T11">2 + "two"</text:span> <text:s text:c="3"/><text:span text:style-name="T5">misses, assuming no rule processes it</text:span></text:p>
            </text:list-header>
          </text:list>
        </text:list-item>
        <text:list-item>
          <text:p text:style-name="P29">The expression fails, that is, a built-in operator or a supplied rule explicitly fails.</text:p>
          <text:list>
            <text:list-header>
              <text:p text:style-name="P21"><text:span text:style-name="T11">{} read "[shit}"</text:span> <text:s text:c="3"/>fails with <text:s text:c="3"/><text:span text:style-name="T11">[error: . ?:"Missing constant" .start 5 .end 5]</text:span></text:p>
            </text:list-header>
          </text:list>
        </text:list-item>
      </text:list>
      <text:p text:style-name="P2">Failures signal that something is wrong with the program or its data, and should generally be reported to the user, while misses can be treated more lightly, depending on the context.</text:p>
      <text:p text:style-name="P2">When a <text:s/><text:span text:style-name="T11">:call <text:s/></text:span>node is evaluated, this happens:</text:p>
      <text:list xml:id="list35495195" text:style-name="L4">
        <text:list-item>
          <text:p text:style-name="P22"><text:span text:style-name="T5">The <text:s/></text:span><text:span text:style-name="T7">call <text:s/></text:span><text:span text:style-name="T5">leg is evaluated.</text:span></text:p>
        </text:list-item>
        <text:list-item>
          <text:p text:style-name="P22"><text:span text:style-name="T5">The </text:span><text:span text:style-name="T1">context is </text:span><text:span text:style-name="T5">searched for rules or bindings that can process the call.</text:span></text:p>
        </text:list-item>
        <text:list-item>
          <text:p text:style-name="P26">If no rules or bindings process the argument, a <text:span text:style-name="T1">miss </text:span>is signaled.</text:p>
        </text:list-item>
      </text:list>
      <text:p text:style-name="P2">When a <text:s/><text:span text:style-name="T11">:who .call <text:s/></text:span>node is evaluated, this happens:</text:p>
      <text:list xml:id="list37426575" text:continue-list="list35495195" text:style-name="L4">
        <text:list-item text:start-value="1">
          <text:p text:style-name="P26">If the node is a built-in operation, special logic takes over. If the built-in operator cannot deal with the data, it will simulate the following steps 2 and 3 using already evaluated parts of the expression, so that things are as if the built-in operator was never tried. If a piped operation like <text:s/><text:span text:style-name="T11">every <text:s/></text:span>or<text:span text:style-name="T11"> <text:s/>fold <text:s/></text:span>misses, this rollback is not possible and the miss is treated as in 6.</text:p>
        </text:list-item>
        <text:list-item>
          <text:p text:style-name="P26">The <text:s/><text:span text:style-name="T11">call <text:s/></text:span>leg is evaluated, this is the <text:span text:style-name="T1">argument</text:span>.</text:p>
        </text:list-item>
        <text:list-item>
          <text:p text:style-name="P26">The <text:s/><text:span text:style-name="T11">who</text:span> <text:s/>leg is evaluated, this is the <text:span text:style-name="T1">object</text:span>.</text:p>
        </text:list-item>
        <text:list-item>
          <text:p text:style-name="P27"><text:span text:style-name="T6">The </text:span><text:span text:style-name="T2">object </text:span><text:span text:style-name="T6">is searched for rules or bindings that can process the </text:span><text:span text:style-name="T2">argument.</text:span></text:p>
        </text:list-item>
        <text:list-item>
          <text:p text:style-name="P27"><text:span text:style-name="T6">If no rules or bindings take effect, a <text:s/></text:span><text:span text:style-name="T7">:who .call</text:span><text:span text:style-name="T6"> <text:s/>node is constructed and treated as a call in the current context, allowing fallback rules to supplement built-in operators and object calls with locally defined rules.</text:span></text:p>
        </text:list-item>
        <text:list-item>
          <text:p text:style-name="P27">If this errs or misses and the expression was the action of a <text:s/><text:span text:style-name="T11">:try</text:span> <text:s/>or <text:s/><text:span text:style-name="T11">:need</text:span> <text:s/>responder, the error or miss is treated by the responder.</text:p>
        </text:list-item>
        <text:list-item>
          <text:p text:style-name="P27">If this does not apply, an <text:s/><text:span text:style-name="T11">:error </text:span>-call is made in the current context. For misses, an error value is constructed, for errors, the supplied value is used.</text:p>
        </text:list-item>
        <text:list-item>
          <text:p text:style-name="P27"><text:span text:style-name="T6">If the <text:s/></text:span><text:span text:style-name="T7">:error <text:s/></text:span><text:span text:style-name="T6">call</text:span><text:span text:style-name="T7"> </text:span><text:span text:style-name="T6">misses, the error value is returned and execution continues.</text:span></text:p>
        </text:list-item>
      </text:list>
      <text:p text:style-name="P2">Note that the argument is evaluated before the object. This convention was chosen mainly because it fits in with the optimization strategies used in the interpreter, especially the piping of lists. It is possible that future PILS implementations might evaluate them in parallel.</text:p>
      <text:h text:style-name="Heading_20_3" text:outline-level="3">Phrase breaking dot</text:h>
      <text:p text:style-name="P1">An open-air dot can be used to separate a name from a following constant, ruleset or parenthesised expression, to prevent the forming of a phrase.</text:p>
      <text:p text:style-name="P1"><text:tab/><text:span text:style-name="T11">a . 3</text:span></text:p>
      <text:p text:style-name="P1">is read as:</text:p>
      <text:p text:style-name="P11"><text:tab/>:who (:call [a]) .call 3</text:p>
      <text:p text:style-name="P1">(If <text:span text:style-name="T11">a </text:span>yields a list, this will get the 3<text:span text:style-name="T13">rd</text:span> element.)</text:p>
      <text:p text:style-name="P1">An open air dot can also be used to separate a name or phrase from a preceding element, to indicate that the name or phrase should be embedded in a <text:s/>:call<text:span text:style-name="T11"> <text:s/></text:span>node.</text:p>
      <text:p text:style-name="P11"><text:tab/>a . b</text:p>
      <text:p text:style-name="P1">is the same as</text:p>
      <text:p text:style-name="P11"><text:tab/>(a) (b)</text:p>
      <text:p text:style-name="P1">or:</text:p>
      <text:p text:style-name="P11"><text:tab/>:who (:call [a]) .call :call [b]</text:p>
      <text:p text:style-name="P1">(If <text:s/><text:span text:style-name="T11">a</text:span> <text:s/>and <text:span text:style-name="T11"><text:s/>b</text:span> <text:s/>yield texts, this will concatenate them.)</text:p>
      <text:h text:style-name="Heading_20_3" text:outline-level="3">Operator precedence</text:h>
      <text:p text:style-name="P1">When an operator starts a sequence or follows another operator or relational operator, it is read as a prefix operator. Prefix operators have the highest operator precedence.</text:p>
      <text:p text:style-name="P11"><text:tab/>+ n</text:p>
      <text:p text:style-name="P1">is read as:</text:p>
      <text:p text:style-name="P11"><text:tab/>:who n .call [+]</text:p>
      <text:p text:style-name="P1">When an operator follows an operand, it is read as an infix operator.</text:p>
      <text:p text:style-name="P11"><text:tab/>a * b</text:p>
      <text:p text:style-name="P1">is read as</text:p>
      <text:p text:style-name="P11"><text:tab/>:who a .call *: b</text:p>
      <text:p text:style-name="P1">Operators ending in <text:s/><text:span text:style-name="T11">* / \ ^ # $ % &amp;</text:span> <text:s/>have the same high precedence as sequence calls.</text:p>
      <text:p text:style-name="P1">Additive operators, ending in <text:s/><text:span text:style-name="T11">+</text:span> <text:s/>or <text:s/><text:span text:style-name="T11">-</text:span> , have medium precedence.</text:p>
      <text:p text:style-name="P1">Relational operators, ending in <text:s/><text:span text:style-name="T11">=</text:span> , <text:s/><text:span text:style-name="T11">&lt;</text:span> , <text:s/><text:span text:style-name="T11">&gt;</text:span> <text:s/>or <text:s/><text:span text:style-name="T11">~</text:span> , have low precedence.</text:p>
      <text:p text:style-name="P1">Within the same precedence, expressions are assembled left-to-right.</text:p>
      <text:h text:style-name="Heading_20_2" text:outline-level="2">Rules, patterns and assignments</text:h>
      <text:h text:style-name="Heading_20_3" text:outline-level="3">Rulesets</text:h>
      <text:p text:style-name="P2">The building blocks of PILS objects are rulesets. A ruleset such as</text:p>
      <text:p text:style-name="P2"><text:tab/><text:span text:style-name="T11">{ </text:span><text:span text:style-name="T1">pattern2 </text:span><text:span text:style-name="T11">| </text:span><text:span text:style-name="T1">action2 </text:span><text:span text:style-name="T11">}<text:line-break/></text:span><text:span text:style-name="T11"><text:tab/>{ </text:span><text:span text:style-name="T1">pattern1 </text:span><text:span text:style-name="T11">| </text:span><text:span text:style-name="T1">action1 </text:span><text:span text:style-name="T11">}</text:span></text:p>
      <text:p text:style-name="P2">is represented by a :ruleset </text:p>
      <text:p text:style-name="P2"><text:tab/><text:span text:style-name="T11">:ruleset (;match </text:span><text:span text:style-name="T1">pattern2</text:span><text:span text:style-name="T11"> .action </text:span><text:span text:style-name="T1">action2</text:span><text:span text:style-name="T11">), (;match </text:span><text:span text:style-name="T1">pattern1</text:span><text:span text:style-name="T11"> .action </text:span><text:span text:style-name="T1">action1</text:span><text:span text:style-name="T11">)</text:span></text:p>
      <text:p text:style-name="P2">When a ruleset is evaluated in a given context, it is bound to the context by creating a node</text:p>
      <text:p text:style-name="P8"><text:tab/>:ruleset .where</text:p>
      <text:p text:style-name="P2">which can be used as an object. When a call is performed on a bound ruleset, the rules are tried, last-written rule first, using an internal index for fast skipping of irrelevant rules. When trying a rule, the call is first matched into the pattern, and if this succeeds, the action is evaluated, with bindings established by the pattern match.</text:p>
      <text:p text:style-name="P2">For the rule to have any effect, the action must <text:span text:style-name="T1">respond </text:span>to the call by performing a <text:span text:style-name="T1">responder statement</text:span>, typically <text:s/><text:span text:style-name="T11">:ok </text:span><text:span text:style-name="T3"><text:s/></text:span>but other responders allow refined control. If no action responds, control passes to the next rule. If no rule responds to the call, it falls through.</text:p>
      <text:p text:style-name="Text_20_body"><text:span text:style-name="T6">Rules can query various aspects of the call by the </text:span><text:span text:style-name="T2">implicit binders</text:span><text:span text:style-name="T6">, of which </text:span><text:span text:style-name="T2"><text:s/></text:span><text:span text:style-name="T7">:who</text:span><text:span text:style-name="T6"> <text:s/>is the most important and roughly corresponds to the </text:span><text:span text:style-name="T2">this <text:s/></text:span><text:span text:style-name="T6">pointer of C++ and the like.</text:span></text:p>
      <text:h text:style-name="Heading_20_3" text:outline-level="3">Patterns</text:h>
      <text:p text:style-name="P2">Patterns are data with a structure similar to that of the data to be matched. Any constant is a pattern that accepts itself and nothing else. Expressive lists match lists with the same length and matching elements. Expressive nodes generally match nodes with the same cliche and matching legs, though some nodes have special interpretations in patterns.</text:p>
      <text:p text:style-name="P2">Variables are bound to the corresponding value, testing for identity if a variable occurs more than once in a pattern. They are written simply as names, represented by nodes <text:s/><text:span text:style-name="T11">:call [</text:span><text:span text:style-name="T1">name</text:span><text:span text:style-name="T11">] </text:span>.</text:p>
      <text:p text:style-name="P2">The joker – written as <text:s/><text:span text:style-name="T11">?</text:span> <text:s/>and represented as <text:s/><text:span text:style-name="T11">:call []</text:span> <text:s/>– is not bound or tested.</text:p>
      <text:p text:style-name="P2">Other special nodes allow named sub-patterns, typechecks, compares with numeric literals, text and list search constraints and length extraction, matching specific positions in a list of unspecified length, simple translations of scalar values, and partial specifications of nodes with default values. </text:p>
      <text:p text:style-name="P2">The special nodes can be used as ordinary nodes by escaping them:</text:p>
      <text:p text:style-name="P2"><text:tab/><text:span text:style-name="T11">: </text:span><text:span text:style-name="T1">special-node</text:span></text:p>
      <text:h text:style-name="Heading_20_3" text:outline-level="3">Assignments</text:h>
      <text:p text:style-name="Text_20_body">Though generally a pure functional language, PILS has an assignment statement which is used in various list processing commands, and to set attributes of special objects.</text:p>
      <text:p text:style-name="Text_20_body">It looks like:</text:p>
      <text:p text:style-name="Text_20_body"><text:tab/><text:span text:style-name="T1">target </text:span><text:span text:style-name="T7">:=</text:span><text:span text:style-name="T1"> value<text:line-break/></text:span><text:span text:style-name="T5"><text:tab/></text:span><text:span text:style-name="T1">target </text:span><text:span text:style-name="T7">:=</text:span><text:span text:style-name="T1"> value</text:span><text:span text:style-name="T7">;</text:span><text:span text:style-name="T1"> tail</text:span></text:p>
      <text:p text:style-name="P6"><text:span text:style-name="T12">Assignments are evaluated by first evaluating </text:span><text:span text:style-name="T2">value</text:span><text:span text:style-name="T12">, then </text:span><text:span text:style-name="T2">target </text:span><text:span text:style-name="T12">is evaluated with a special variant of calling that searches for assignment rules or assignment-sensitive built-in operations.</text:span></text:p>
      <text:p text:style-name="P6"><text:span text:style-name="T12">If </text:span><text:span text:style-name="T2">tail </text:span><text:span text:style-name="T12">is present, the result is discarded after performing the assignment, and </text:span><text:span text:style-name="T2">tail </text:span><text:span text:style-name="T12">is evaluated and returned. The tail form is equivalent to:</text:span></text:p>
      <text:p text:style-name="P6"><text:span text:style-name="T12"><text:tab/></text:span><text:span text:style-name="T11">(</text:span><text:span text:style-name="T2">target </text:span><text:span text:style-name="T11">:=</text:span><text:span text:style-name="T2"> value</text:span><text:span text:style-name="T11">) and: </text:span><text:span text:style-name="T2">tail</text:span></text:p>
      <text:p text:style-name="P2">Rules for assignments look like:</text:p>
      <text:p text:style-name="P1"><text:span text:style-name="T5"><text:tab/></text:span><text:span text:style-name="T7">{ </text:span><text:span text:style-name="T1">target</text:span><text:span text:style-name="T7"> := </text:span><text:span text:style-name="T1">value </text:span><text:span text:style-name="T7">| </text:span><text:span text:style-name="T1">action </text:span><text:span text:style-name="T7">}</text:span></text:p>
      <text:p text:style-name="P1"><text:span text:style-name="T5">These rules are dealt with separately by the rule compiler. General rules like <text:s/></text:span><text:span text:style-name="T7">{x|...} <text:s/></text:span><text:span text:style-name="T5">cannot be invoked by assignments, and assignment rules cannot be invoked by ordinary calls, even with </text:span><text:span text:style-name="T5">arguments that look like assignments.</text:span></text:p>
      <text:p text:style-name="P2">The PILS parser does not recognize assignments as such; they are parsed as sequences that end with a greedy node, and represented as:</text:p>
      <text:p text:style-name="P2"><text:tab/><text:span text:style-name="T11">:who</text:span> <text:span text:style-name="T11">(</text:span><text:span text:style-name="T1">target</text:span><text:span text:style-name="T11">)</text:span><text:span text:style-name="T3"> .</text:span><text:span text:style-name="T11">call (:=</text:span> <text:span text:style-name="T1">value</text:span><text:span text:style-name="T11">)</text:span><text:span text:style-name="T1"><text:line-break/></text:span><text:tab/><text:span text:style-name="T11">:who</text:span> <text:span text:style-name="T11">(</text:span><text:span text:style-name="T1">target</text:span><text:span text:style-name="T11">)</text:span><text:span text:style-name="T3"> .</text:span><text:span text:style-name="T11">call (:=</text:span> <text:span text:style-name="T1">value</text:span><text:span text:style-name="T11">;</text:span><text:span text:style-name="T1"> tail</text:span><text:span text:style-name="T11">)</text:span></text:p>
      <text:h text:style-name="Heading_20_2" text:outline-level="2">Syntactical sugar</text:h>
      <text:p text:style-name="Text_20_body">The following conventions apply to expressions only; they are not valid within constant brackets <text:span text:style-name="T11">[] </text:span>.</text:p>
      <text:h text:style-name="Heading_20_3" text:outline-level="3">Hidden leg values</text:h>
      <text:p text:style-name="P1">In the common case where a named leg holds a call to its name, the leg value can be omitted.</text:p>
      <text:p text:style-name="P1">This is used in patterns as well as expressions, in the very common case when the name of an leg is bound to its value, i.e. named parameters.</text:p>
      <text:p text:style-name="P1">The rule also applies to principal legs, but not to tails.</text:p>
      <text:p text:style-name="P1"><text:tab/><text:span text:style-name="T11">message: .</text:span> <text:s text:c="3"/>is the same as <text:s text:c="3"/><text:span text:style-name="T11">message: .message message</text:span></text:p>
      <text:p text:style-name="P1">A hidden leg is often used with the <text:s/><text:span text:style-name="T11">:ok <text:s/></text:span>responder for simple extraction rules. To extract the tail of a node:</text:p>
      <text:p text:style-name="P11"><text:tab/>{* ;: tail|:ok tail}</text:p>
      <text:p text:style-name="P1">or shorter:</text:p>
      <text:p text:style-name="P11"><text:tab/>{* ;: ok|:ok} <text:s text:c="3"/><text:span text:style-name="T12">which is the same as</text:span> <text:s text:c="3"/>{* ;: ok|:ok ok}</text:p>
      <text:h text:style-name="Heading_20_3" text:outline-level="3">Pattern dots</text:h>
      <text:p text:style-name="P1">If a rule pattern starts with a dot, an immediately following phrase or name is not made into a call. This is handy for specifying parameterless operations:</text:p>
      <text:p text:style-name="P11"><text:tab/>{ .name | ... }</text:p>
      <text:p text:style-name="P1">is easier to type than</text:p>
      <text:p text:style-name="P11"><text:tab/>{ [name] | ... }</text:p>
      <text:h text:style-name="Heading_20_3" text:outline-level="3">Inversions</text:h>
      <text:p text:style-name="P1">A sequence of the form</text:p>
      <text:p text:style-name="P1"><text:tab/><text:span text:style-name="T1">completion</text:span> <text:span text:style-name="T11">.(</text:span><text:span text:style-name="T1">incomplete-expression</text:span><text:span text:style-name="T7">)</text:span></text:p>
      <text:p text:style-name="P2">is read as:</text:p>
      <text:p text:style-name="P14"><text:tab/>incomplete-expression completion</text:p>
      <text:p text:style-name="P2">In the original form, <text:span text:style-name="T1">completion </text:span>is parsed with the priority of a sequence; it can be a series of operations. When <text:span text:style-name="T1">incomplete-expression </text:span>is parsed and <text:s/><text:span text:style-name="T11">)</text:span> <text:s/>is reached, <text:span text:style-name="T1">completion</text:span> is inserted as a unit.</text:p>
      <text:p text:style-name="P2"><text:tab/><text:span text:style-name="T11">a b .(c d:)</text:span> <text:s text:c="3"/>is the same as: <text:s text:c="3"/><text:span text:style-name="T11">c d: a b</text:span></text:p>
      <text:p text:style-name="P2">An abbreviated form exists for single-leg action nodes, escapes and double-escapes:</text:p>
      <text:p text:style-name="P1"><text:span text:style-name="T5"><text:tab/></text:span><text:span text:style-name="T1">expression </text:span><text:span text:style-name="T7">.:</text:span><text:span text:style-name="T1">name <text:s text:c="3"/></text:span><text:span text:style-name="T5">is the same as <text:s text:c="3"/></text:span><text:span text:style-name="T7">:</text:span><text:span text:style-name="T1">name expression</text:span></text:p>
      <text:p text:style-name="P1"><text:span text:style-name="T5"><text:tab/></text:span><text:span text:style-name="T1">expression </text:span><text:span text:style-name="T7">.::</text:span><text:span text:style-name="T1"> <text:s text:c="3"/></text:span><text:span text:style-name="T5">is the same as <text:s text:c="3"/></text:span><text:span text:style-name="T7">:: </text:span><text:span text:style-name="T1">expression</text:span></text:p>
      <text:p text:style-name="P1"><text:span text:style-name="T5">The <text:s/></text:span><text:span text:style-name="T7">:need <text:s/></text:span><text:span text:style-name="T5">and <text:s/>:</text:span><text:span text:style-name="T7">list <text:s/></text:span><text:span text:style-name="T5">constructs are often used in this form:</text:span></text:p>
      <text:p text:style-name="P1"><text:span text:style-name="T7"><text:tab/></text:span><text:span text:style-name="T1">expression</text:span><text:span text:style-name="T5"> </text:span><text:span text:style-name="T7">.:need</text:span><text:span text:style-name="T1"> <text:s text:c="3"/></text:span><text:span text:style-name="T5">is the same as <text:s text:c="3"/></text:span><text:span text:style-name="T7">:need </text:span><text:span text:style-name="T1">expression</text:span></text:p>
      <text:p text:style-name="P1"><text:span text:style-name="T7"><text:tab/>(</text:span><text:span text:style-name="T1">...</text:span><text:span text:style-name="T7"> list := </text:span><text:span text:style-name="T1">...</text:span><text:span text:style-name="T7">) .:list</text:span><text:span text:style-name="T1"> <text:s text:c="3"/></text:span><text:span text:style-name="T5">is the same as <text:s text:c="3"/></text:span><text:span text:style-name="T7">:list (</text:span><text:span text:style-name="T1">...</text:span><text:span text:style-name="T7"> list := </text:span><text:span text:style-name="T1">...</text:span><text:span text:style-name="T7">)</text:span></text:p>
      <text:p text:style-name="P2">Inversions can be used to give complex expressions a narrative flow: you can write an expression and test it, then embed it in a control structure by adding an inversion at the bottom, without the need to change the part you already wrote.</text:p>
      <text:p text:style-name="P2">The construct is modeled after a feature of natural language, as in this English phrase:</text:p>
      <text:p text:style-name="P1"><text:span text:style-name="T5"><text:tab/></text:span><text:span text:style-name="T1">Things I like to do</text:span></text:p>
      <text:p text:style-name="P2">Strictly speaking, <text:span text:style-name="T1">things </text:span>should follow <text:span text:style-name="T1">do</text:span>, but natural languages allow us to put essentials first, and so does PILS, to some degree.</text:p>
      <text:h text:style-name="Heading_20_3" text:outline-level="3">Comments</text:h>
      <text:p text:style-name="P1">PILS supports 3 types of comments:</text:p>
      <text:p text:style-name="P1"><text:tab/><text:span text:style-name="T11">! </text:span><text:span text:style-name="T1">comment (until the first CR or LF character)</text:span></text:p>
      <text:p text:style-name="P1"><text:span text:style-name="T1"><text:tab/></text:span><text:span text:style-name="T7">!! </text:span><text:span text:style-name="T1">comment (may include newlines) </text:span><text:span text:style-name="T7">!!</text:span></text:p>
      <text:p text:style-name="P1"><text:span text:style-name="T7"><text:tab/>:- </text:span><text:span text:style-name="T1">comment-expression</text:span><text:span text:style-name="T7">; </text:span><text:span text:style-name="T1">expression</text:span></text:p>
      <text:p text:style-name="P2"><text:span text:style-name="T11">! <text:s/></text:span>and <text:s/><text:span text:style-name="T11">!!</text:span> <text:s/>comments are treated as white space when parsing; <text:s/><text:span text:style-name="T11">:- <text:s/></text:span>comments are parsed as action nodes,<text:span text:style-name="T1"> </text:span>allowing comment-expressions to be embedded in expressions and patterns.</text:p>
      <text:p text:style-name="P2">They correspond vaguely to <text:s/>//<text:span text:style-name="T1">comment newline, <text:s/></text:span><text:span text:style-name="T11">/*</text:span><text:span text:style-name="T1">comment</text:span><text:span text:style-name="T11">*/</text:span><text:span text:style-name="T1"> <text:s/></text:span>and <text:s/><text:span text:style-name="T11">#pragma</text:span> <text:s/>of C++.</text:p>
      <text:h text:style-name="Heading_20_3" text:outline-level="3">Numbered recurrences</text:h>
      <text:p text:style-name="P4">Often, the same substructure is used in many places in a larger structure. Numbered recurrences were introduced for the purpose of saving space when such structures are stored as text. They are generally not used in PILS source code.</text:p>
      <text:p text:style-name="P4">Strings, rulesets and expressions in square or round braces can be prefixed by a positive integer, and later referred by same integer followed by a <text:s/><text:span text:style-name="T11">.</text:span> <text:s/>(full stop).</text:p>
      <text:p text:style-name="P1"><text:span text:style-name="T7"><text:tab/>1"toot", 1., 1.</text:span><text:span text:style-name="T1"> <text:s text:c="3"/></text:span><text:span text:style-name="T5">is the same as <text:s text:c="3"/></text:span><text:span text:style-name="T7">"toot", "toot", "toot"</text:span></text:p>
      <text:p text:style-name="P2"><text:span text:style-name="T11"><text:tab/>123(x) + 123.</text:span><text:span text:style-name="T1"> <text:s text:c="3"/></text:span>is the same as <text:s text:c="3"/><text:span text:style-name="T11">x + x</text:span></text:p>
      <text:h text:style-name="Heading_20_1" text:outline-level="1">Built-in operations</text:h>
      <text:p text:style-name="P2">Most built-in operations are implemented as intercepted object calls. They are represented by nodes of form <text:s text:c="2"/><text:span text:style-name="T11">:who .call <text:s/></text:span>which are given special treatment by the interpreter.</text:p>
      <text:p text:style-name="P2">Most of these operations only work when called directly, not through other constructions such as the <text:s/>(<text:span text:style-name="T1">argument) </text:span><text:span text:style-name="T11">call </text:span><text:span text:style-name="T1">(object) <text:s/></text:span>form. However, list element extraction by index and the operations defined on language objects also work when called indirectly.</text:p>
      <text:p text:style-name="P2">Note the difference: This is a direct call:</text:p>
      <text:p text:style-name="P2"><text:tab/><text:span text:style-name="T11">{.cliche|:ok [my-cliche]} cliche</text:span> <text:s text:c="3"/>returns <text:s text:c="3"/><text:span text:style-name="T11">[[|action]|where|ruleset]</text:span></text:p>
      <text:p text:style-name="P2">The builtin <text:span text:style-name="T11">cliche </text:span>operation gets the cliche of the node used to represent a bound ruleset.</text:p>
      <text:p text:style-name="P2">This is an indirect call and invokes the <text:s/><text:span text:style-name="T11">[cliche] <text:s/></text:span>method defined by the ruleset:</text:p>
      <text:p text:style-name="P2"><text:tab/><text:span text:style-name="T11">[cliche] call {.cliche|:ok [my-cliche]} <text:s text:c="3"/></text:span>returns <text:s text:c="3"/><text:span text:style-name="T11">[my-cliche]</text:span></text:p>
      <text:h text:style-name="Heading_20_2" text:outline-level="2">Numeric operations</text:h>
      <text:p text:style-name="Text_20_body"><text:span text:style-name="T12">All numeric operations are done using </text:span><text:span text:style-name="T2">doubles </text:span><text:span text:style-name="T6">(typically 64 bit floating point with 52 bit mantissa, but implementations may differ). After a chain of operations, a trial conversion of the result is made to a 32 bit signed integer value and back to </text:span><text:span text:style-name="T2">double</text:span><text:span text:style-name="T6">. If this results in the same </text:span><text:span text:style-name="T2">double</text:span><text:span text:style-name="T6"> as before, the number is recognized as an integer. Both integers and non-integers are hashed and boxed, though the integers 0 – 2</text:span><text:span text:style-name="T14">16</text:span><text:span text:style-name="T6">-1 have prefabricated boxes, to speed indexing calculations.</text:span></text:p>
      <text:p text:style-name="P2">The overhead of interpretation, hashing and boxing makes numeric performance slow. This is by design: fast pattern matching and node lookup are of greater importance.</text:p>
      <text:p text:style-name="P1">Infinities, not-a-number etc. are not supported by PILS. Handling them has only been sporadically tested, so they may create havoc.</text:p>
      <text:p text:style-name="P6">Binary operations are</text:p>
      <text:p text:style-name="Text_20_body"><text:tab/><text:span text:style-name="T11">+ <text:s text:c="3"/></text:span><text:span text:style-name="T6">addition</text:span><text:span text:style-name="T11"><text:line-break/><text:tab/>- <text:s text:c="3"/></text:span><text:span text:style-name="T6">subtraction</text:span><text:span text:style-name="T11"><text:line-break/><text:tab/>* <text:s text:c="3"/></text:span><text:span text:style-name="T6">multiplication</text:span><text:span text:style-name="T11"><text:line-break/><text:tab/>/ <text:s text:c="3"/></text:span><text:span text:style-name="T6">floating point division (even when supplied with integer arguments)</text:span><text:span text:style-name="T11"><text:line-break/><text:tab/>\</text:span><text:span text:style-name="T6"> <text:s text:c="3"/>integer division</text:span><text:span text:style-name="T11"><text:line-break/><text:tab/>% <text:s text:c="3"/></text:span><text:span text:style-name="T6">modulo</text:span></text:p>
      <text:p text:style-name="P6"><text:span text:style-name="T3">Beware:</text:span><text:span text:style-name="T2"> all infix operators have the same precedence: the result of</text:span><text:span text:style-name="T12"> <text:s/></text:span><text:span text:style-name="T11">1 + 2 * 3 <text:s/></text:span><text:span text:style-name="T12">is</text:span><text:span text:style-name="T11"> <text:s/>9</text:span><text:span text:style-name="T3"> </text:span><text:span text:style-name="T2">, not</text:span><text:span text:style-name="T11"> <text:s/>7</text:span><text:span text:style-name="T3"> </text:span><text:span text:style-name="T2">.</text:span></text:p>
      <text:p text:style-name="P1"><text:span text:style-name="T5">Prefix <text:s/></text:span><text:span text:style-name="T7">-</text:span><text:span text:style-name="T5"> <text:s/>(minus) works as you expect: <text:s text:c="2"/></text:span><text:span text:style-name="T7">;x 7; - x</text:span><text:span text:style-name="T5"> <text:s text:c="3"/>returns <text:s/></text:span><text:span text:style-name="T7">-7</text:span><text:span text:style-name="T5"> .</text:span></text:p>
      <text:p text:style-name="Text_20_body"><text:span text:style-name="T11"><text:tab/>abs <text:s/></text:span><text:span text:style-name="T6">returns the absolute value</text:span></text:p>
      <text:p text:style-name="Text_20_body"><text:span text:style-name="T6"><text:tab/></text:span><text:span text:style-name="T7">round <text:s/></text:span><text:span text:style-name="T6">returns the nearest integral value, exact halves are rounded away from 0</text:span></text:p>
      <text:p text:style-name="Text_20_body"><text:span text:style-name="T6"><text:tab/></text:span><text:span text:style-name="T7">trunc <text:s/></text:span><text:span text:style-name="T6">truncates towards 0</text:span></text:p>
      <text:p text:style-name="P2">These postfix operators are like the corresponding C++ functions with double values:</text:p>
      <text:p text:style-name="P11"><text:tab/>sin cos tan asin acos atan sqrt log exp</text:p>
      <text:p text:style-name="Text_20_body"><text:span text:style-name="T12">The <text:s/></text:span><text:span text:style-name="T11">round</text:span><text:span text:style-name="T12"> <text:s/>and <text:s/></text:span><text:span text:style-name="T11">truncate</text:span><text:span text:style-name="T12"> <text:s/>operators can be used with a unit argument:</text:span></text:p>
      <text:p text:style-name="Text_20_body"><text:span text:style-name="T12"><text:tab/>x </text:span><text:span text:style-name="T11">round</text:span><text:span text:style-name="T12"> </text:span><text:span text:style-name="T11">10</text:span></text:p>
      <text:p text:style-name="P1">rounds x to the nearest 10.</text:p>
      <text:p text:style-name="Text_20_body"><text:span text:style-name="T12">Comparisons </text:span><text:span text:style-name="T11"><text:s/>= &lt;&gt; &lt; &lt;= &gt; &gt;= </text:span><text:span text:style-name="T12"><text:s/>succeed and return the first argument if the comparison is true, but fail if it is false; PILS has no boolean type.</text:span></text:p>
      <text:p text:style-name="P2">PILS attempts to write numbers so that parsing them will produce the exact same number but unfortunately this cannot be relied on for large exponents.</text:p>
      <text:p text:style-name="P2">There is no support for format strings.</text:p>
      <text:h text:style-name="Heading_20_2" text:outline-level="2">Operations on timestamps, datings and durations</text:h>
      <text:p text:style-name="P2">Ordinary arithmetic operations can be used with timestamps and durations in these combinations:</text:p>
      <text:p text:style-name="P2"><text:tab/><text:span text:style-name="T1">timestamp</text:span> <text:span text:style-name="T11">+</text:span> <text:span text:style-name="T1">duration</text:span><text:line-break/><text:tab/><text:span text:style-name="T1">dating</text:span> <text:span text:style-name="T11">+</text:span> <text:span text:style-name="T1">duration</text:span><text:line-break/><text:tab/><text:span text:style-name="T1">duration</text:span> <text:span text:style-name="T11">+</text:span> <text:span text:style-name="T1">timestamp</text:span><text:line-break/><text:tab/><text:span text:style-name="T1">duration</text:span> <text:span text:style-name="T11">+</text:span> <text:span text:style-name="T1">dating</text:span><text:line-break/><text:tab/><text:span text:style-name="T1">duration</text:span> <text:span text:style-name="T11">+</text:span> <text:s/><text:span text:style-name="T1">duration</text:span></text:p>
      <text:p text:style-name="P2"><text:tab/><text:span text:style-name="T1">timestamp</text:span> <text:span text:style-name="T11">-</text:span> <text:span text:style-name="T1">timestamp</text:span><text:line-break/><text:tab/><text:span text:style-name="T1">timestamp</text:span> <text:span text:style-name="T11">-</text:span> <text:span text:style-name="T1">duration</text:span><text:line-break/><text:tab/><text:span text:style-name="T1">dating</text:span> <text:span text:style-name="T11">–</text:span> <text:span text:style-name="T1">dating<text:line-break/></text:span><text:tab/><text:span text:style-name="T1">dating</text:span> <text:span text:style-name="T11">–</text:span> <text:span text:style-name="T1">duration<text:line-break/></text:span><text:tab/><text:span text:style-name="T1">duration</text:span> <text:span text:style-name="T11">-</text:span> <text:span text:style-name="T1">duration</text:span></text:p>
      <text:p text:style-name="P2"><text:tab/><text:span text:style-name="T1">duration</text:span> <text:span text:style-name="T11">*</text:span> <text:span text:style-name="T1">number</text:span><text:line-break/><text:tab/><text:span text:style-name="T1">number</text:span> <text:span text:style-name="T11">*</text:span> <text:span text:style-name="T1">duration</text:span></text:p>
      <text:p text:style-name="P2"><text:tab/><text:span text:style-name="T1">duration</text:span> <text:span text:style-name="T11">/</text:span> <text:span text:style-name="T1">number</text:span><text:line-break/><text:tab/><text:span text:style-name="T1">duration</text:span> <text:span text:style-name="T11">/</text:span> <text:span text:style-name="T1">duration</text:span></text:p>
      <text:p text:style-name="P2"><text:tab/><text:span text:style-name="T1">duration</text:span> <text:span text:style-name="T11">\</text:span> <text:span text:style-name="T1">duration</text:span></text:p>
      <text:p text:style-name="P2"><text:tab/><text:span text:style-name="T1">timestamp</text:span> <text:span text:style-name="T11">round</text:span> <text:span text:style-name="T1">duration</text:span><text:line-break/><text:tab/><text:span text:style-name="T1">dating</text:span> <text:span text:style-name="T11">round</text:span> <text:span text:style-name="T1">duration</text:span><text:line-break/><text:tab/><text:span text:style-name="T1">duration</text:span> <text:span text:style-name="T11">round</text:span> <text:span text:style-name="T1">duration</text:span></text:p>
      <text:p text:style-name="P2"><text:tab/><text:span text:style-name="T1">timestamp</text:span> <text:span text:style-name="T11">truncate</text:span> <text:span text:style-name="T1">duration</text:span><text:line-break/><text:tab/><text:span text:style-name="T1">dating</text:span> <text:span text:style-name="T11">truncate</text:span> <text:span text:style-name="T1">duration</text:span><text:line-break/><text:tab/><text:span text:style-name="T1">duration</text:span> <text:span text:style-name="T11">truncate</text:span> <text:span text:style-name="T1">duration</text:span></text:p>
      <text:p text:style-name="P2">Two values of the same type can be compared using <text:span text:style-name="T11"><text:s/>= &lt;&gt; &lt; &lt;= &gt; &gt;=</text:span></text:p>
      <text:p text:style-name="P2"><text:tab/><text:span text:style-name="T1">timestamp</text:span> <text:span text:style-name="T1">comparison</text:span> <text:span text:style-name="T1">timestamp</text:span><text:line-break/><text:tab/><text:span text:style-name="T1">dating</text:span> <text:span text:style-name="T1">comparison</text:span> <text:span text:style-name="T1">dating</text:span><text:line-break/><text:tab/><text:span text:style-name="T1">duration</text:span> <text:span text:style-name="T1">comparison</text:span> <text:span text:style-name="T1">duration</text:span></text:p>
      <text:p text:style-name="P2">The system operations <text:s/><text:span text:style-name="T11">now <text:s/></text:span>and <text:s/><text:span text:style-name="T11">timestamp <text:s/></text:span>both get the current system time, but <text:s/><text:span text:style-name="T11">timestamp <text:s/></text:span>will produce unique values within each process, incrementing when necessary.</text:p>
      <text:h text:style-name="Heading_20_2" text:outline-level="2">String operations</text:h>
      <text:h text:style-name="Heading_20_3" text:outline-level="3">Conversions</text:h>
      <text:p text:style-name="Text_20_body"><text:span text:style-name="T2">s</text:span><text:span text:style-name="T12"> </text:span><text:span text:style-name="T11">utf-8 <text:s text:c="3"/></text:span><text:span text:style-name="T12">converts between utf-8 encoded strings and lists of unicode values as integers.</text:span></text:p>
      <text:p text:style-name="Text_20_body"><text:span text:style-name="T2">s</text:span><text:span text:style-name="T12"> </text:span><text:span text:style-name="T11">utf-16 <text:s text:c="3"/></text:span><text:span text:style-name="T12">converts between utf-16-encoded strings with byte order mark, and integer unicode value lists</text:span></text:p>
      <text:p text:style-name="Text_20_body"><text:span text:style-name="T2">s</text:span><text:span text:style-name="T12"> </text:span><text:span text:style-name="T11">utf-16le <text:s text:c="3"/></text:span><text:span text:style-name="T12">same, for little-endian utf-16 without byte order mark</text:span></text:p>
      <text:p text:style-name="Text_20_body"><text:span text:style-name="T2">s</text:span><text:span text:style-name="T12"> </text:span><text:span text:style-name="T11">utf-16be <text:s text:c="3"/></text:span><text:span text:style-name="T12">same, big-endian</text:span></text:p>
      <text:p text:style-name="Text_20_body"><text:span text:style-name="T2">s</text:span><text:span text:style-name="T12"> </text:span><text:span text:style-name="T11">bytes <text:s text:c="3"/></text:span><text:span text:style-name="T12">converts between strings and list of byte vales 0 – 255.</text:span></text:p>
      <text:p text:style-name="P1">This concatenates 2 strings:</text:p>
      <text:p text:style-name="P1"><text:tab/><text:span text:style-name="T11">(</text:span><text:span text:style-name="T1">s</text:span><text:span text:style-name="T11">) (</text:span><text:span text:style-name="T1">t</text:span><text:span text:style-name="T11">)</text:span></text:p>
      <text:p text:style-name="P1">This concatenates a list of strings <text:span text:style-name="T1">ss <text:s/></text:span><text:span text:style-name="T5">using a separator string </text:span><text:span text:style-name="T1">t</text:span><text:span text:style-name="T8">:</text:span></text:p>
      <text:p text:style-name="P12"><text:span text:style-name="T7"><text:tab/></text:span><text:span text:style-name="T1">ss </text:span><text:span text:style-name="T7">splice (</text:span><text:span text:style-name="T1">t</text:span><text:span text:style-name="T7">)</text:span></text:p>
      <text:p text:style-name="P9">To split it again:</text:p>
      <text:p text:style-name="P12"><text:span text:style-name="T7"><text:tab/></text:span><text:span text:style-name="T1">s </text:span><text:span text:style-name="T7">split (</text:span><text:span text:style-name="T1">t</text:span><text:span text:style-name="T7">)</text:span></text:p>
      <text:p text:style-name="P9">The replacement operator</text:p>
      <text:p text:style-name="P12"><text:span text:style-name="T5"><text:tab/></text:span><text:span text:style-name="T1">s </text:span><text:span text:style-name="T7">*=*</text:span><text:span text:style-name="T1"> ss</text:span></text:p>
      <text:p text:style-name="P9">expects <text:span text:style-name="T1">ss </text:span>to be an even-length list of strings and interprets them as replacement pairs. For each position in <text:span text:style-name="T1">s</text:span>, the pairs are tried. If a match is found, the replacement is done and the search advances to the position after the replaced text, starting from the beginning of <text:span text:style-name="T1">ss</text:span>.</text:p>
      <text:p text:style-name="P9">The prefix/suffix-replacement operator</text:p>
      <text:p text:style-name="P12"><text:span text:style-name="T5"><text:tab/></text:span><text:span text:style-name="T1">s (</text:span><text:span text:style-name="T7">&lt;</text:span><text:span text:style-name="T1">)</text:span><text:span text:style-name="T7">$*=*</text:span><text:span text:style-name="T1"> ss</text:span></text:p>
      <text:p text:style-name="P9">only covers matches at the beginning/end of <text:span text:style-name="T1">s </text:span>and never replaces more than once.</text:p>
      <text:p text:style-name="Text_20_body"><text:span text:style-name="T9">Strings can be compared with the relational operators <text:s/></text:span><text:span text:style-name="T10">= &lt;&gt; &lt; &lt;= &gt; &gt;=</text:span><text:span text:style-name="T9"> .</text:span><text:span text:style-name="T10"> <text:s/></text:span><text:span text:style-name="T9">As always, </text:span><text:span text:style-name="T10"><text:s/>= <text:s/></text:span><text:span text:style-name="T9">and <text:s/>&lt;&gt; <text:s/>test for identity; the unique constants mechanism ensures that equal strings are identical. The other operators use bytewise unsigned comparisons – for utf-8 data, this is equivalent to character-wise comparison. For case-insensitive comparisons, use the <text:s/></text:span><text:span text:style-name="T10">lower</text:span><text:span text:style-name="T9"> operation on both operands. For proper alphabetical sorting, use the <text:s/></text:span><text:span text:style-name="T10">order <text:s/></text:span><text:span text:style-name="T9">operation with a key-function that produces collation keys, i.e. strings that, when sorted by raw comparisons, get sorted in the proper localized alphabetical order of the original strings.</text:span></text:p>
      <text:h text:style-name="Heading_20_3" text:outline-level="3">Casing conversions and the İstanbul express</text:h>
      <text:p text:style-name="P6">To convert a string to upper or lower casing:</text:p>
      <text:p text:style-name="Text_20_body"><text:span text:style-name="T1"><text:tab/>s</text:span> <text:span text:style-name="T11">upper<text:line-break/><text:tab/></text:span><text:span text:style-name="T1">s</text:span> <text:span text:style-name="T11">lower</text:span></text:p>
      <text:p text:style-name="P1">To convert the first character of a string to title or upper casing, leaving the rest untouched:</text:p>
      <text:p text:style-name="Text_20_body"><text:span text:style-name="T3"><text:tab/></text:span><text:span text:style-name="T1">s</text:span> <text:span text:style-name="T11">title</text:span></text:p>
      <text:p text:style-name="P1">The casing operations are implemented by code generated from unicode tables to work directly on utf-8, and should work with most languages.</text:p>
      <text:p text:style-name="P1">Unfortunately, the Turks won't like this:</text:p>
      <text:p text:style-name="P11"><text:tab/>"istanbul" title <text:s text:c="3"/><text:span text:style-name="T6">returns</text:span><text:span text:style-name="T1"> <text:s text:c="3"/>"</text:span>Istanbul"</text:p>
      <text:p text:style-name="P1">To get the correct capital letter, the operator must be supplemented by a replacement operation:</text:p>
      <text:p text:style-name="P11"><text:tab/>"istanbul" <text:span text:style-name="T8">$*=* ["i", "İ", "ı", "I"]</text:span> title <text:s text:c="3"/><text:span text:style-name="T6">returns</text:span><text:span text:style-name="T1"> <text:s text:c="3"/>"</text:span><text:span text:style-name="T8">İ</text:span>stanbul"</text:p>
      <text:p text:style-name="Text_20_body">The <text:span text:style-name="T9">İstanbul Express is a workaround designed to make this easier:</text:span></text:p>
      <text:p text:style-name="Text_20_body">The <text:s/><text:span text:style-name="T11">[===,] <text:s/></text:span><text:span text:style-name="T12">module, available to all PILS modules, defines these operator replacements, combining the casing conversion operators with appropriate replacements:</text:span></text:p>
      <text:p text:style-name="P10"><text:tab/>{ text . ([upper] // replace) | :try text *=* replace .:need upper }<text:line-break/><text:tab/>{ text . ([lower] // replace) | :try text *=* replace .:need lower }<text:line-break/><text:tab/>{ text . ([title] // replace) | :try text $*=* replace .:need title }</text:p>
      <text:p text:style-name="P9">By replacing the untranslated principal namespace with a translating version that intercepts the <text:s/><text:span text:style-name="T11">upper </text:span>, <text:span text:style-name="T11"><text:s/>lower <text:s/></text:span>and<text:span text:style-name="T3"> <text:s/></text:span><text:span text:style-name="T11">title</text:span> <text:s/>operators as follows:</text:p>
      <text:p text:style-name="P10"><text:tab/>{} **=** ;[[?:?]:]<text:line-break/><text:tab/>[ [?:?]:<text:line-break/><text:tab/> <text:s/>."upper" [upper|"i", "İ", "ı", "I"]<text:line-break/><text:tab/> <text:s/>."lower" [lower|"I", "ı", "İ", "I"]<text:line-break/><text:tab/> <text:s/>."title" [title|"i", "İ", "ı", "I"]<text:line-break/><text:tab/>]</text:p>
      <text:p text:style-name="P9">and using this language to parse our test expression, we get</text:p>
      <text:p text:style-name="P11"><text:tab/>"istanbul" title <text:s text:c="3"/><text:span text:style-name="T6">returns</text:span><text:span text:style-name="T1"> <text:s text:c="3"/>"</text:span><text:span text:style-name="T8">İ</text:span>stanbul"</text:p>
      <text:p text:style-name="P2">So the casing conversion is configurable by means of the language object.</text:p>
      <text:h text:style-name="Heading_20_3" text:outline-level="3">String splitters</text:h>
      <text:p text:style-name="P9">The <text:span text:style-name="T1">splitter </text:span>is an extended <text:s/><text:span text:style-name="T11">split <text:s/></text:span>operation, designed for writing tokenizers but useful for text analysis in general. The splitter was added to PILS mainly because of difficulties with integrating regular expressions with the uniquely represented strings of PILS.</text:p>
      <text:p text:style-name="P9">A splitter is a constant node specifying a grammar for recursive descent parsing. The tail is a prioritized list of top level target names (<text:span text:style-name="T1">start nonterminals</text:span>); the corresponding legs specify roads to the targets (<text:span text:style-name="T1">productions</text:span>). The roads consist of targets, text snippets and control instructions. Targets can be invoked recursively, including internal targets not found in the priority list.</text:p>
      <text:p text:style-name="P9">A road can have alternate lanes, each of which can have several steps and tests. Tests are steps that test a condition without advancing.</text:p>
      <text:p text:style-name="P9"><text:tab/><text:span text:style-name="T1">s </text:span><text:span text:style-name="T11">split<text:line-break/><text:tab/>[ </text:span><text:span text:style-name="T1">target</text:span><text:span text:style-name="T11">,</text:span><text:span text:style-name="T1"> ...<text:line-break/><text:tab/> <text:s/>.target road<text:line-break/><text:tab/> <text:s/>...<text:line-break/><text:tab/></text:span><text:span text:style-name="T11">]</text:span></text:p>
      <text:p text:style-name="P9">This walks through <text:span text:style-name="T1">s</text:span> and produces a list of pairs <text:span text:style-name="T11">(</text:span><text:span text:style-name="T1">target</text:span><text:span text:style-name="T11">,</text:span><text:span text:style-name="T1"> substring</text:span><text:span text:style-name="T11">), </text:span>identifying top level matches. When no targets match, <text:span text:style-name="T11">(,</text:span><text:span text:style-name="T1"> singlebyte-string</text:span><text:span text:style-name="T11">) </text:span>is produced.</text:p>
      <text:p text:style-name="P9">Empty matches are rejected at the top level and by the repeaters <text:s/><text:span text:style-name="T11">[*: </text:span><text:span text:style-name="T1">...</text:span><text:span text:style-name="T11">] <text:s/></text:span>and <text:s/><text:span text:style-name="T11">[+:</text:span> <text:span text:style-name="T1">...</text:span><text:span text:style-name="T11">] </text:span>, to prevent infinite loops, but allowed elsewhere.</text:p>
      <text:p text:style-name="P9">Valid match instructions are:</text:p>
      <text:p text:style-name="P9"><text:tab/><text:span text:style-name="T11">1</text:span> – wildcard, matches any single byte<text:line-break/><text:tab/><text:span text:style-name="T11">"</text:span><text:span text:style-name="T1">a</text:span><text:span text:style-name="T11">-</text:span><text:span text:style-name="T1">z</text:span><text:span text:style-name="T11">" – </text:span>a 3 byte string, matches one byte in the range<text:line-break/><text:tab/>any<text:span text:style-name="T11"> </text:span>other string – requires exact match<text:line-break/><text:tab/><text:span text:style-name="T11">[*: </text:span><text:span text:style-name="T1">road</text:span><text:span text:style-name="T11">]</text:span> – zero or more <text:span text:style-name="T1">road </text:span>runs<text:line-break/><text:tab/><text:span text:style-name="T11">[+: </text:span><text:span text:style-name="T1">road</text:span><text:span text:style-name="T11">]</text:span> – one or more <text:span text:style-name="T1">road </text:span>runs<text:line-break/><text:tab/><text:span text:style-name="T11">[=*: </text:span><text:span text:style-name="T1">road</text:span><text:span text:style-name="T11">]</text:span> – skip while <text:span text:style-name="T1">road</text:span> is blocked, then take it<text:line-break/><text:tab/><text:span text:style-name="T11">[^*: </text:span><text:span text:style-name="T1">road</text:span><text:span text:style-name="T11">]</text:span> – <text:s/>skip while <text:span text:style-name="T1">road</text:span> is blocked, don't take it</text:p>
      <text:p text:style-name="P9">Valid test instructions are:</text:p>
      <text:p text:style-name="P9"><text:tab/><text:span text:style-name="T11">[-: </text:span><text:span text:style-name="T1">road</text:span><text:span text:style-name="T11">]</text:span> – <text:span text:style-name="T1">road</text:span> must fail<text:line-break/><text:tab/><text:span text:style-name="T11">[/: </text:span><text:span text:style-name="T1">target</text:span><text:span text:style-name="T11">]</text:span> – the last successful top-level target must be <text:span text:style-name="T1">target...<text:line-break/><text:tab/></text:span><text:span text:style-name="T11">[/: </text:span><text:span text:style-name="T1">target, ...</text:span><text:span text:style-name="T11">]</text:span> – ...or one of them. <text:s/><text:span text:style-name="T11">$</text:span> <text:s/>means no top level targets emitted yet.</text:p>
      <text:p text:style-name="P9">Lists are used in two levels with different interpretation:</text:p>
      <text:p text:style-name="P9"><text:tab/><text:span text:style-name="T1">lane</text:span><text:span text:style-name="T11">, </text:span><text:span text:style-name="T1">... – </text:span>one of the lanes must be taken.<text:line-break/><text:tab/>A <text:span text:style-name="T1">lane</text:span><text:span text:style-name="T11"> </text:span>can be a list<text:span text:style-name="T1"> </text:span>of <text:span text:style-name="T1">steps </text:span>that must be taken consecutively.</text:p>
      <text:p text:style-name="P9">For clarity, lanes should be separated by commas while multiple steps should be written as shortlists.</text:p>
      <text:p text:style-name="P9">In the common case where a step list is the only lane in a road, append a comma to make it into a 1-element alternative list, like the <text:span text:style-name="T11"><text:s/>.hexnumber <text:s/></text:span>below.</text:p>
      <text:p text:style-name="P9">This example recognizes C-style hexadecimal numbers:</text:p>
      <text:p text:style-name="P9"><text:tab/><text:span text:style-name="T1">s </text:span><text:span text:style-name="T11">split<text:line-break/></text:span><text:span text:style-name="T11"><text:tab/>[ hexnumber,<text:line-break/><text:tab/> <text:s/>.hexnumber "0x" [+: hexdigit],<text:line-break/></text:span><text:span text:style-name="T11"><text:tab/> <text:s/>.hexdigit "0-9", "A-F", "a-f"<text:line-break/><text:tab/>]</text:span></text:p>
      <text:p text:style-name="P9">This splits <text:span text:style-name="T1">s</text:span> in single utf-8 characters (valid) and lumps of non utf-8 conformant data (invalid):</text:p>
      <text:p text:style-name="P9"><text:tab/><text:span text:style-name="T1">s </text:span><text:span text:style-name="T11">split<text:line-break/><text:tab/>[ valid invalid<text:line-break/><text:tab/> <text:s/>.valid ""00"-"7f, ""c0"-"df x, <text:s/>""e0"-"ef x x, ""f0"-"f7 x x x<text:line-break/><text:tab/> <text:s/>.x "80"-"bf<text:line-break/><text:tab/> <text:s/>.invalid [^*: valid]<text:line-break/><text:tab/>]</text:span></text:p>
      <text:p text:style-name="P9">The <text:s/><text:span text:style-name="T11">-:</text:span> <text:s/>instruction is useful for tests like these.</text:p>
      <text:p text:style-name="P9"><text:span text:style-name="T3"><text:tab/></text:span><text:span text:style-name="T11">[-: 1]</text:span><text:span text:style-name="T1"> <text:s text:c="3"/>–</text:span> end of string<text:span text:style-name="T1"><text:line-break/><text:tab/></text:span><text:span text:style-name="T11">[-: -:</text:span><text:span text:style-name="T3"> </text:span><text:span text:style-name="T1">road</text:span><text:span text:style-name="T11">]</text:span><text:span text:style-name="T1"> <text:s text:c="3"/>– </text:span>lookahead, <text:span text:style-name="T1">road</text:span> must be possible but is not taken</text:p>
      <text:h text:style-name="Heading_20_3" text:outline-level="3">Operations common to strings and lists</text:h>
      <text:p text:style-name="P1">The operations in this section work on strings as well as lists. Strings are processed bytewise, so certain operations can produces unexpected results with utf-8 multibyte characters.</text:p>
      <text:p text:style-name="P1">String and list handling is optimized to avoid creating and hashing of temporary objects. Binding the temporaries to variables breaks these optimizations – if you have performance problems, use chained operations when possible.</text:p>
      <text:p text:style-name="P1">In the following, <text:span text:style-name="T1">s </text:span><text:span text:style-name="T5">and </text:span><text:span text:style-name="T1">t</text:span><text:span text:style-name="T5"> are strings or lists, </text:span><text:span text:style-name="T1">n</text:span><text:span text:style-name="T5"> a non-negative integer and </text:span><text:span text:style-name="T1">op</text:span><text:span text:style-name="T5"> an operator. An <text:s/></text:span><text:span text:style-name="T1">(</text:span><text:span text:style-name="T7">&lt;</text:span><text:span text:style-name="T1">)</text:span><text:span text:style-name="T5"> <text:s/>in front of an operator – such as <text:s text:c="2"/></text:span><text:span text:style-name="T1">(</text:span><text:span text:style-name="T7">&lt;</text:span><text:span text:style-name="T1">)</text:span><text:span text:style-name="T7">+#</text:span><text:span text:style-name="T5"> <text:s/>– indicates that the operator <text:s/></text:span><text:span text:style-name="T7">+#</text:span><text:span text:style-name="T5"> <text:s/>has a pendant <text:s/></text:span><text:span text:style-name="T7">&lt;+# <text:s/></text:span><text:span text:style-name="T5">that works in the reverse direction, counting indexes backwards.</text:span></text:p>
      <text:p text:style-name="P1"><text:span text:style-name="T1">s </text:span><text:span text:style-name="T7">.</text:span><text:span text:style-name="T1"> n</text:span><text:span text:style-name="T5"> <text:s text:c="3"/>– the </text:span><text:span text:style-name="T1">n</text:span><text:span text:style-name="T15">th</text:span><text:span text:style-name="T5"> byte/element of s, counting from 1, fails unless </text:span><text:span text:style-name="T7">1 &lt;=</text:span><text:span text:style-name="T5"> </text:span><text:span text:style-name="T1">n</text:span><text:span text:style-name="T5"> </text:span><text:span text:style-name="T7">&lt;=</text:span><text:span text:style-name="T5"> </text:span><text:span text:style-name="T1">s</text:span><text:span text:style-name="T5"> </text:span><text:span text:style-name="T7">count</text:span><text:span text:style-name="T5"> </text:span><text:span text:style-name="T7">.</text:span></text:p>
      <text:p text:style-name="P1"><text:span text:style-name="T1">s</text:span><text:span text:style-name="T5"> </text:span><text:span text:style-name="T7">count <text:s text:c="3"/></text:span><text:span text:style-name="T5">yields the byte/element count of </text:span><text:span text:style-name="T1">s</text:span><text:span text:style-name="T5">. <text:s/>Use <text:s/></text:span><text:span text:style-name="T1">s </text:span><text:span text:style-name="T7">utf-8 count <text:s/></text:span><text:span text:style-name="T5">for character count.</text:span></text:p>
      <text:p text:style-name="P1"><text:span text:style-name="T1">s</text:span><text:span text:style-name="T5"> </text:span><text:span text:style-name="T7">count (</text:span><text:span text:style-name="T1">t</text:span><text:span text:style-name="T7">) <text:s text:c="3"/></text:span><text:span text:style-name="T5">counts non-overlapping occurrences of </text:span><text:span text:style-name="T1">t</text:span><text:span text:style-name="T5"> within </text:span><text:span text:style-name="T1">s</text:span><text:span text:style-name="T5">.</text:span></text:p>
      <text:p text:style-name="P1"><text:span text:style-name="T1">s</text:span><text:span text:style-name="T7"> reverse <text:s text:c="3"/></text:span><text:span text:style-name="T5">– s</text:span><text:span text:style-name="T7"> </text:span><text:span text:style-name="T5">backwards. Use <text:s/></text:span><text:span text:style-name="T1">s </text:span><text:span text:style-name="T7">utf-8 reverse</text:span><text:span text:style-name="T5"> </text:span><text:span text:style-name="T7">utf-8 <text:s/></text:span><text:span text:style-name="T5">if you need character based reversal.</text:span></text:p>
      <text:p text:style-name="P1"><text:span text:style-name="T1">s</text:span><text:span text:style-name="T5"> </text:span><text:span text:style-name="T1">(</text:span><text:span text:style-name="T7">&lt;</text:span><text:span text:style-name="T1">)</text:span><text:span text:style-name="T7">+#</text:span><text:span text:style-name="T5"> </text:span><text:span text:style-name="T1">n</text:span><text:span text:style-name="T5"> <text:s text:c="3"/>– the first </text:span><text:span text:style-name="T1">n</text:span><text:span text:style-name="T5"> <text:s/>elements of </text:span><text:span text:style-name="T1">s</text:span><text:span text:style-name="T5">; fails if <text:s/></text:span><text:span text:style-name="T1">n</text:span><text:span text:style-name="T5"> </text:span><text:span text:style-name="T7">&gt;</text:span><text:span text:style-name="T5"> </text:span><text:span text:style-name="T1">s</text:span><text:span text:style-name="T5"> </text:span><text:span text:style-name="T7">count </text:span><text:span text:style-name="T5">.</text:span></text:p>
      <text:p text:style-name="P1"><text:span text:style-name="T1">s</text:span><text:span text:style-name="T5"> </text:span><text:span text:style-name="T1">(</text:span><text:span text:style-name="T7">&lt;</text:span><text:span text:style-name="T1">)</text:span><text:span text:style-name="T7">-#</text:span><text:span text:style-name="T5"> </text:span><text:span text:style-name="T1">n</text:span><text:span text:style-name="T5"> <text:s text:c="3"/>– </text:span><text:span text:style-name="T1">s</text:span><text:span text:style-name="T5"> without the first </text:span><text:span text:style-name="T1">n</text:span><text:span text:style-name="T5"> elements; fails if <text:s/></text:span><text:span text:style-name="T1">n</text:span><text:span text:style-name="T5"> </text:span><text:span text:style-name="T7">&gt;</text:span><text:span text:style-name="T5"> </text:span><text:span text:style-name="T1">s</text:span><text:span text:style-name="T5"> </text:span><text:span text:style-name="T7">count </text:span><text:span text:style-name="T5">.</text:span></text:p>
      <text:p text:style-name="P1"><text:span text:style-name="T1">s</text:span><text:span text:style-name="T5"> </text:span><text:span text:style-name="T1">(</text:span><text:span text:style-name="T7">&lt;</text:span><text:span text:style-name="T1">)+</text:span><text:span text:style-name="T7">+#</text:span><text:span text:style-name="T5"> </text:span><text:span text:style-name="T1">n</text:span><text:span text:style-name="T5"> <text:s text:c="3"/>– the first </text:span><text:span text:style-name="T1">n</text:span><text:span text:style-name="T5"> elements of </text:span><text:span text:style-name="T1">s, </text:span><text:span text:style-name="T5">or all of </text:span><text:span text:style-name="T1">s </text:span><text:span text:style-name="T5">if <text:s/></text:span><text:span text:style-name="T1">n</text:span><text:span text:style-name="T5"> </text:span><text:span text:style-name="T7">&gt;</text:span><text:span text:style-name="T5"> </text:span><text:span text:style-name="T1">s</text:span><text:span text:style-name="T5"> </text:span><text:span text:style-name="T7">count </text:span><text:span text:style-name="T5">.<text:line-break/>For lists, <text:s/></text:span><text:span text:style-name="T7">++#</text:span><text:span text:style-name="T5"> <text:s/>is piped and only evaluates the first </text:span><text:span text:style-name="T1">n </text:span><text:span text:style-name="T5">elements of </text:span><text:span text:style-name="T1">s</text:span><text:span text:style-name="T5">.</text:span></text:p>
      <text:p text:style-name="P1"><text:span text:style-name="T1">s</text:span><text:span text:style-name="T5"> </text:span><text:span text:style-name="T1">(</text:span><text:span text:style-name="T7">&lt;</text:span><text:span text:style-name="T1">)</text:span><text:span text:style-name="T7">--#</text:span><text:span text:style-name="T5"> </text:span><text:span text:style-name="T1">n</text:span><text:span text:style-name="T5"> <text:s text:c="3"/>– </text:span><text:span text:style-name="T1">s</text:span><text:span text:style-name="T5"> without the first </text:span><text:span text:style-name="T1">n</text:span><text:span text:style-name="T5"> elements; </text:span><text:span text:style-name="T7">""</text:span><text:span text:style-name="T5"> if <text:s/></text:span><text:span text:style-name="T1">n</text:span><text:span text:style-name="T5"> </text:span><text:span text:style-name="T7">&gt;</text:span><text:span text:style-name="T5"> </text:span><text:span text:style-name="T1">s</text:span><text:span text:style-name="T5"> </text:span><text:span text:style-name="T7">count </text:span><text:span text:style-name="T5">.</text:span></text:p>
      <text:p text:style-name="P1"><text:span text:style-name="T5">In the following, </text:span><text:span text:style-name="T1"><text:s/>(</text:span><text:span text:style-name="T7">&lt;</text:span><text:span text:style-name="T1">)(</text:span><text:span text:style-name="T7">+#</text:span><text:span text:style-name="T1">/</text:span><text:span text:style-name="T7">-#</text:span><text:span text:style-name="T1">)op</text:span><text:span text:style-name="T5"> <text:s/>indicates that </text:span><text:span text:style-name="T1">op</text:span><text:span text:style-name="T5"> has 2 pendants:<text:line-break/></text:span><text:span text:style-name="T5"><text:tab/></text:span><text:span text:style-name="T1">s</text:span><text:span text:style-name="T5"> +</text:span><text:span text:style-name="T7">#</text:span><text:span text:style-name="T1">op</text:span><text:span text:style-name="T5"> </text:span><text:span text:style-name="T1">t <text:s text:c="3"/>=</text:span><text:span text:style-name="T5"> <text:s text:c="4"/></text:span><text:span text:style-name="T1">s</text:span><text:span text:style-name="T5"> +</text:span><text:span text:style-name="T7"># (</text:span><text:span text:style-name="T1">s</text:span><text:span text:style-name="T7"> </text:span><text:span text:style-name="T1">op</text:span><text:span text:style-name="T5"> </text:span><text:span text:style-name="T1">t</text:span><text:span text:style-name="T7">)<text:line-break/></text:span><text:span text:style-name="T5"><text:tab/></text:span><text:span text:style-name="T1">s</text:span><text:span text:style-name="T5"> </text:span><text:span text:style-name="T7">-#</text:span><text:span text:style-name="T1">op</text:span><text:span text:style-name="T5"> </text:span><text:span text:style-name="T1">t <text:s text:c="3"/>=</text:span><text:span text:style-name="T5"> <text:s text:c="4"/></text:span><text:span text:style-name="T1">s</text:span><text:span text:style-name="T5"> </text:span><text:span text:style-name="T7">-# (</text:span><text:span text:style-name="T1">s</text:span><text:span text:style-name="T7"> </text:span><text:span text:style-name="T1">op</text:span><text:span text:style-name="T5"> </text:span><text:span text:style-name="T1">t</text:span><text:span text:style-name="T7">)<text:line-break/></text:span><text:span text:style-name="T5">as well as reverse direction pendants </text:span><text:span text:style-name="T7">&lt;</text:span><text:span text:style-name="T1">op <text:s/></text:span><text:span text:style-name="T7">&lt;+#</text:span><text:span text:style-name="T1">op <text:s/></text:span><text:span text:style-name="T7">&lt;+#</text:span><text:span text:style-name="T1">op</text:span></text:p>
      <text:p text:style-name="P2">These are safe with utf-8 multibyte characters:</text:p>
      <text:p text:style-name="P1"><text:span text:style-name="T1">s (</text:span><text:span text:style-name="T7">&lt;</text:span><text:span text:style-name="T1">)(</text:span><text:span text:style-name="T7">+#</text:span><text:span text:style-name="T1">/</text:span><text:span text:style-name="T7">-#</text:span><text:span text:style-name="T1">)</text:span><text:span text:style-name="T7">=*</text:span><text:span text:style-name="T1"> t <text:s text:c="3"/></text:span><text:span text:style-name="T5">– count of </text:span><text:span text:style-name="T1">s </text:span><text:span text:style-name="T5">to and including first occurrence of </text:span><text:span text:style-name="T1">t</text:span><text:span text:style-name="T5">, or <text:s/></text:span><text:span text:style-name="T7">0</text:span><text:span text:style-name="T5"> <text:s/>if </text:span><text:span text:style-name="T1">t</text:span><text:span text:style-name="T5"> is not found</text:span><text:span text:style-name="T1">.</text:span></text:p>
      <text:p text:style-name="P1"><text:span text:style-name="T1">s (</text:span><text:span text:style-name="T7">&lt;</text:span><text:span text:style-name="T1">)(</text:span><text:span text:style-name="T7">+#</text:span><text:span text:style-name="T1">/</text:span><text:span text:style-name="T7">-#</text:span><text:span text:style-name="T1">)^</text:span><text:span text:style-name="T7">*</text:span><text:span text:style-name="T1"> t <text:s text:c="3"/></text:span><text:span text:style-name="T5">– <text:s/>count of </text:span><text:span text:style-name="T1">s </text:span><text:span text:style-name="T5">to but excluding first occurrence of </text:span><text:span text:style-name="T1">t</text:span><text:span text:style-name="T5">, or <text:s/></text:span><text:span text:style-name="T1">s</text:span><text:span text:style-name="T5"> </text:span><text:span text:style-name="T7">count <text:s/></text:span><text:span text:style-name="T5">if </text:span><text:span text:style-name="T1">t</text:span><text:span text:style-name="T5"> is not found</text:span><text:span text:style-name="T1">.</text:span></text:p>
      <text:p text:style-name="P1"><text:span text:style-name="T1">s (</text:span><text:span text:style-name="T7">&lt;</text:span><text:span text:style-name="T1">)(</text:span><text:span text:style-name="T7">+#</text:span><text:span text:style-name="T1">/</text:span><text:span text:style-name="T7">-#</text:span><text:span text:style-name="T1">)$</text:span><text:span text:style-name="T7">*</text:span><text:span text:style-name="T1"> t <text:s text:c="3"/></text:span><text:span text:style-name="T5">– count of </text:span><text:span text:style-name="T1">t</text:span><text:span text:style-name="T5"> if </text:span><text:span text:style-name="T1">s</text:span><text:span text:style-name="T5"> begins with t, else <text:s/></text:span><text:span text:style-name="T7">0 </text:span><text:span text:style-name="T5">.</text:span></text:p>
      <text:p text:style-name="P1"><text:span text:style-name="T5">These are unsafe if </text:span><text:span text:style-name="T1">t</text:span><text:span text:style-name="T5"> has utf-8 multibyte characters:</text:span></text:p>
      <text:p text:style-name="P1"><text:span text:style-name="T1">s (</text:span><text:span text:style-name="T7">&lt;</text:span><text:span text:style-name="T1">)(</text:span><text:span text:style-name="T7">+#</text:span><text:span text:style-name="T1">/</text:span><text:span text:style-name="T7">-#</text:span><text:span text:style-name="T1">)#</text:span><text:span text:style-name="T7">*</text:span><text:span text:style-name="T1"> t <text:s text:c="3"/></text:span><text:span text:style-name="T5">– count of common start of </text:span><text:span text:style-name="T1">s </text:span><text:span text:style-name="T5">and </text:span><text:span text:style-name="T1">t</text:span><text:span text:style-name="T5">.</text:span></text:p>
      <text:p text:style-name="P1"><text:span text:style-name="T1">s (</text:span><text:span text:style-name="T7">&lt;</text:span><text:span text:style-name="T1">)(</text:span><text:span text:style-name="T7">+#</text:span><text:span text:style-name="T1">/</text:span><text:span text:style-name="T7">-#</text:span><text:span text:style-name="T1">)~</text:span><text:span text:style-name="T7">*</text:span><text:span text:style-name="T1"> t <text:s text:c="3"/></text:span><text:span text:style-name="T5">– count of </text:span><text:span text:style-name="T1">s </text:span><text:span text:style-name="T5">to and including last element of sparse occurrence of </text:span><text:span text:style-name="T1">t, </text:span><text:span text:style-name="T5">or <text:s/></text:span><text:span text:style-name="T7">0</text:span><text:span text:style-name="T5"> .</text:span></text:p>
      <text:p text:style-name="P1"><text:span text:style-name="T1">s (</text:span><text:span text:style-name="T7">&lt;</text:span><text:span text:style-name="T1">)(</text:span><text:span text:style-name="T7">+#</text:span><text:span text:style-name="T1">/</text:span><text:span text:style-name="T7">-#</text:span><text:span text:style-name="T1">)+</text:span><text:span text:style-name="T7">*</text:span><text:span text:style-name="T1"> t <text:s text:c="3"/></text:span><text:span text:style-name="T5">– count of initial elements of </text:span><text:span text:style-name="T1">s</text:span><text:span text:style-name="T5"> also found somewhere in </text:span><text:span text:style-name="T1">t</text:span><text:span text:style-name="T5">.</text:span></text:p>
      <text:p text:style-name="P1"><text:span text:style-name="T1">s (</text:span><text:span text:style-name="T7">&lt;</text:span><text:span text:style-name="T1">)(</text:span><text:span text:style-name="T7">+#</text:span><text:span text:style-name="T1">/</text:span><text:span text:style-name="T7">-#</text:span><text:span text:style-name="T1">)-</text:span><text:span text:style-name="T7">*</text:span><text:span text:style-name="T1"> t <text:s text:c="3"/></text:span><text:span text:style-name="T5">– count of initial elements of </text:span><text:span text:style-name="T1">s</text:span><text:span text:style-name="T5"> not present in </text:span><text:span text:style-name="T1">t</text:span><text:span text:style-name="T5">.</text:span></text:p>
      <text:p text:style-name="P1">To illustrate the workings of the combined operators, the expression below extracts the name part of a filename by excluding directory and extension, allowing for <text:s/><text:span text:style-name="T11">\</text:span> <text:s/>or <text:s/><text:span text:style-name="T11">/</text:span> <text:s/>as directory separators:</text:p>
      <text:p text:style-name="P1"><text:tab/><text:span text:style-name="T1">fn </text:span><text:span text:style-name="T7">&lt;+#-* "\/" &lt;-#=* "."</text:span></text:p>
      <text:p text:style-name="P1"><text:span text:style-name="T5">The</text:span><text:span text:style-name="T7"> &lt;+#-* </text:span><text:span text:style-name="T5">operator is safe with utf-8 filenames because ASCII characters <text:s/></text:span><text:span text:style-name="T7">\ <text:s/></text:span><text:span text:style-name="T5">and <text:s/>/ <text:s text:c="2"/>never occur in utf-8 multibyte sequences.</text:span></text:p>
      <text:h text:style-name="Heading_20_2" text:outline-level="2">List operations</text:h>
      <text:p text:style-name="Text_20_body">The following paragraphs describe operations specific to lists.</text:p>
      <text:h text:style-name="Heading_20_3" text:outline-level="3">Simple list operations</text:h>
      <text:p text:style-name="P6">The built-in list operations of PILS work by piping: – instead of constructing lists directly, elements are passed one by one to pending list operations. If no list operations are pending, the elements are collected in an internal structure and the list is built when the operation is finished.</text:p>
      <text:p text:style-name="P6">In the following, <text:span text:style-name="T1">m</text:span> and <text:span text:style-name="T1">n</text:span> are integers, <text:span text:style-name="T1">s</text:span> and <text:span text:style-name="T1">t</text:span> are lists unless otherwise mentioned.</text:p>
      <text:p text:style-name="P6"><text:span text:style-name="T11">listwise <text:s/></text:span>and <text:s/><text:span text:style-name="T11">singlewise <text:s/></text:span><text:span text:style-name="T12">are convenience </text:span>operations are used for handling situations where a single element or a list of elements may be passed interchangeably, such as parameter lists vs. passing a single parameter.</text:p>
      <text:p text:style-name="Text_20_body"><text:span text:style-name="T1"><text:tab/>s </text:span><text:span text:style-name="T7">listwise <text:s text:c="3"/></text:span><text:span text:style-name="T6">is like <text:s text:c="3"/></text:span><text:span text:style-name="T2">s </text:span><text:span text:style-name="T7">call {e|:ok e,} {&amp; ok|:ok}</text:span></text:p>
      <text:p text:style-name="P13"><text:span text:style-name="T6">If </text:span><text:span text:style-name="T12">s</text:span><text:span text:style-name="T6"> is a list, it is simply passed on. If not, it is wrapped in a single element list.</text:span></text:p>
      <text:p text:style-name="Text_20_body"><text:span text:style-name="T1"><text:tab/>s </text:span><text:span text:style-name="T7">singlewise <text:s text:c="3"/></text:span><text:span text:style-name="T6">is like <text:s text:c="3"/></text:span><text:span text:style-name="T2">s </text:span><text:span text:style-name="T7">try {ok,|:ok}</text:span></text:p>
      <text:p text:style-name="P13"><text:span text:style-name="T6">The opposite of <text:s/></text:span><text:span text:style-name="T7">listwise</text:span><text:span text:style-name="T6"> : if </text:span><text:span text:style-name="T12">s</text:span><text:span text:style-name="T6"> is a single-element list, the element is extracted; all other values are simply passed on.</text:span></text:p>
      <text:p text:style-name="Text_20_body"><text:span text:style-name="T1"><text:tab/>s</text:span> <text:span text:style-name="T11">&amp;</text:span> <text:span text:style-name="T1">t <text:s/></text:span><text:span text:style-name="T5">concatenates <text:s/></text:span><text:span text:style-name="T1">s</text:span><text:span text:style-name="T5"> </text:span><text:span text:style-name="T7">listwise <text:s/></text:span><text:span text:style-name="T5">and <text:s/></text:span><text:span text:style-name="T1">t </text:span><text:span text:style-name="T7">listwise </text:span><text:span text:style-name="T5">.</text:span></text:p>
      <text:p text:style-name="P6"><text:tab/><text:span text:style-name="T1">s </text:span><text:span text:style-name="T11">first </text:span><text:span text:style-name="T2">(</text:span><text:span text:style-name="T1">e) <text:s text:c="3"/></text:span>prepends <text:span text:style-name="T1">e </text:span>to <text:span text:style-name="T1">s</text:span>, for use with <text:span text:style-name="T12">the <text:s/></text:span><text:span text:style-name="T11">fold</text:span><text:span text:style-name="T12"> <text:s/>operation</text:span></text:p>
      <text:p text:style-name="P6">The <text:s/><text:span text:style-name="T11">up <text:s/></text:span>and <text:s text:c="2"/><text:span text:style-name="T11">down <text:s/></text:span>operations produce lists of increasing and decreasing integers:</text:p>
      <text:p text:style-name="Text_20_body"><text:span text:style-name="T1"><text:tab/>m </text:span><text:span text:style-name="T7">up (</text:span><text:span text:style-name="T1">n</text:span><text:span text:style-name="T7">) <text:s text:c="3"/></text:span><text:span text:style-name="T2">m, m + 1, m + 2 ... n</text:span><text:span text:style-name="T7"> <text:s/></text:span><text:span text:style-name="T6">or <text:s/></text:span><text:span text:style-name="T7">[] <text:s/></text:span><text:span text:style-name="T6">if <text:s/>n &lt; m<text:line-break/></text:span><text:span text:style-name="T1"><text:tab/>m </text:span><text:span text:style-name="T7">down (</text:span><text:span text:style-name="T1">n</text:span><text:span text:style-name="T7">) <text:s text:c="3"/></text:span><text:span text:style-name="T2">m, m - 1, ... n</text:span><text:span text:style-name="T7"> <text:s/></text:span><text:span text:style-name="T6">or <text:s/></text:span><text:span text:style-name="T7">[] <text:s/></text:span><text:span text:style-name="T6">if <text:s/>n &gt; m<text:line-break/></text:span><text:span text:style-name="T1"><text:tab/>n </text:span><text:span text:style-name="T7">up <text:s text:c="3"/></text:span><text:span text:style-name="T6">same as <text:s text:c="3"/></text:span><text:span text:style-name="T7">1 up (</text:span><text:span text:style-name="T2">n</text:span><text:span text:style-name="T7">)</text:span><text:span text:style-name="T6"><text:line-break/></text:span><text:span text:style-name="T3"><text:tab/></text:span><text:span text:style-name="T2">n</text:span><text:span text:style-name="T3"> down</text:span><text:span text:style-name="T7"> <text:s text:c="3"/></text:span><text:span text:style-name="T6">same as <text:s text:c="3"/></text:span><text:span text:style-name="T2">n</text:span><text:span text:style-name="T7"> down 1</text:span></text:p>
      <text:p text:style-name="P2">Lists can be split in sublists of a certain length:</text:p>
      <text:p text:style-name="P1"><text:span text:style-name="T5"><text:tab/></text:span><text:span text:style-name="T1">s </text:span><text:span text:style-name="T7">split</text:span><text:span text:style-name="T5"> </text:span><text:span text:style-name="T1">(n)<text:line-break/></text:span><text:span text:style-name="T1"><text:tab/>s </text:span><text:span text:style-name="T7">split 2 <text:s text:c="3"/></text:span><text:span text:style-name="T5">splits </text:span><text:span text:style-name="T1">s</text:span><text:span text:style-name="T5"> in pairs.</text:span></text:p>
      <text:p text:style-name="P2">A list of lists can be joined to a simple list:</text:p>
      <text:p text:style-name="P1"><text:span text:style-name="T5"><text:tab/></text:span><text:span text:style-name="T1">s</text:span><text:span text:style-name="T5"> </text:span><text:span text:style-name="T7">splice</text:span></text:p>
      <text:p text:style-name="P1"><text:span text:style-name="T5">Non-list elements of </text:span><text:span text:style-name="T1">s</text:span><text:span text:style-name="T5"> are included in the spliced list.</text:span></text:p>
      <text:h text:style-name="Heading_20_3" text:outline-level="3">Building, filtering and and folding of lists</text:h>
      <text:p text:style-name="P2">Lists can be built by the list builder:</text:p>
      <text:p text:style-name="P2"><text:tab/><text:span text:style-name="T11">:list </text:span><text:span text:style-name="T1">...</text:span><text:span text:style-name="T11"> list := </text:span><text:span text:style-name="T1">value</text:span><text:span text:style-name="T11"> </text:span><text:span text:style-name="T1">... ...</text:span><text:span text:style-name="T11"><text:line-break/></text:span><text:span text:style-name="T11"><text:tab/>:list [</text:span><text:span text:style-name="T1">tag</text:span><text:span text:style-name="T11">]; </text:span><text:span text:style-name="T1">...</text:span><text:span text:style-name="T11"> list [</text:span><text:span text:style-name="T1">tag</text:span><text:span text:style-name="T11">] := </text:span><text:span text:style-name="T1">value ...</text:span></text:p>
      <text:p text:style-name="P2">This produces a list of all the values assigned. The tagged form allows selective writing in nested list builders.</text:p>
      <text:p text:style-name="P2">List builders are often written as inversions: <text:span text:style-name="T1">(</text:span><text:span text:style-name="T11">... list := </text:span><text:span text:style-name="T1">value</text:span><text:span text:style-name="T11"> ... ...</text:span><text:span text:style-name="T1">)</text:span><text:span text:style-name="T11"> .:list</text:span></text:p>
      <text:p text:style-name="P2">List can be filtered by the operations below. The filters are usually rulesets and do not need parentheses.</text:p>
      <text:p text:style-name="P6"><text:tab/><text:span text:style-name="T1">s</text:span> <text:span text:style-name="T11">each </text:span><text:span text:style-name="T2">(filter)</text:span></text:p>
      <text:p text:style-name="P6">Try to apply the <text:span text:style-name="T1">filter </text:span>function to all elements of <text:span text:style-name="T1">s </text:span>in turn. Pass a list of the results, ignoring misses.</text:p>
      <text:p text:style-name="P6"><text:tab/><text:span text:style-name="T1">s</text:span> <text:span text:style-name="T11">except </text:span><text:span text:style-name="T2">(filter)</text:span></text:p>
      <text:p text:style-name="P6"><text:span text:style-name="T12">Like </text:span><text:span text:style-name="T11">each, </text:span><text:span text:style-name="T12">but pass only the elements that miss the filter. Results returned by the filter are ignored.</text:span></text:p>
      <text:p text:style-name="P6"><text:tab/><text:span text:style-name="T1">s</text:span> <text:span text:style-name="T11">legs </text:span><text:span text:style-name="T2">(assign-filter)</text:span></text:p>
      <text:p text:style-name="P6"><text:span text:style-name="T12">Like </text:span><text:span text:style-name="T11">each, </text:span><text:span text:style-name="T12">but for each element </text:span><text:span text:style-name="T2">e </text:span><text:span text:style-name="T12">at position </text:span><text:span text:style-name="T2">n </text:span><text:span text:style-name="T12">(starting from 1 as always), the assignment <text:s/></text:span><text:span text:style-name="T2">n </text:span><text:span text:style-name="T11">:=</text:span><text:span text:style-name="T2"> e <text:s/></text:span><text:span text:style-name="T16">is tried, instead of just </text:span><text:span text:style-name="T4">e</text:span><text:span text:style-name="T17">.</text:span></text:p>
      <text:p text:style-name="P6"><text:tab/><text:span text:style-name="T1">s</text:span> <text:span text:style-name="T11">every </text:span><text:span text:style-name="T2">(filter)</text:span></text:p>
      <text:p text:style-name="P6">Like<text:span text:style-name="T1"> </text:span><text:s/><text:span text:style-name="T11">each</text:span><text:span text:style-name="T2"> <text:s/></text:span><text:span text:style-name="T12">but requires the filter function to succeed for all elements.</text:span></text:p>
      <text:p text:style-name="P6"><text:tab/><text:span text:style-name="T1">s</text:span> <text:span text:style-name="T11">find </text:span><text:span text:style-name="T2">(filter)</text:span></text:p>
      <text:p text:style-name="P6">Like <text:s/><text:span text:style-name="T1">a</text:span> <text:span text:style-name="T11">each </text:span><text:span text:style-name="T2">(filter)</text:span><text:span text:style-name="T11"> 1 </text:span><text:span text:style-name="T12">but faster – returns the first filtered element, fails if the filter never succeeds.</text:span></text:p>
      <text:p text:style-name="P2">To eliminate dublets from a list:</text:p>
      <text:p text:style-name="P6"><text:span text:style-name="T12"><text:tab/></text:span><text:span text:style-name="T2">s</text:span><text:span text:style-name="T12"> </text:span><text:span text:style-name="T11">distinct</text:span></text:p>
      <text:p text:style-name="P2">To eliminate dublets based on a key function rather than the element:</text:p>
      <text:p text:style-name="P6"><text:span text:style-name="T12"><text:tab/></text:span><text:span text:style-name="T2">s</text:span><text:span text:style-name="T12"> </text:span><text:span text:style-name="T11">distinct </text:span><text:span text:style-name="T2">(filter)</text:span></text:p>
      <text:p text:style-name="P6"><text:span text:style-name="T12">All elements of </text:span><text:span text:style-name="T2">s</text:span><text:span text:style-name="T12"> will be tried by the filter. If this produces a constant that has not been used, the original element is passed through. If a <text:s/></text:span><text:span text:style-name="T11">:name </text:span><text:span text:style-name="T2">name</text:span><text:span text:style-name="T11">; </text:span><text:span text:style-name="T2">value</text:span><text:span text:style-name="T12"> <text:s/>node is produced and the name has not been used, the value is passed through, instead of the original element.</text:span></text:p>
      <text:p text:style-name="P2">To consume a list:</text:p>
      <text:p text:style-name="P6"><text:tab/><text:span text:style-name="T1">s</text:span> <text:span text:style-name="T11">fold </text:span><text:span text:style-name="T2">(assign-filter)</text:span></text:p>
      <text:p text:style-name="P6"><text:span text:style-name="T12">Implements a list consumer with state. </text:span><text:span text:style-name="T2">s </text:span><text:span text:style-name="T12">must have at least one element; the first element will be the initial state. This is usually specified like</text:span></text:p>
      <text:p text:style-name="P6"><text:span text:style-name="T2"><text:tab/>s</text:span><text:span text:style-name="T12"> </text:span><text:span text:style-name="T11">first </text:span><text:span text:style-name="T2">(initial-state)</text:span><text:span text:style-name="T11"> fold </text:span><text:span text:style-name="T2">(assign-filter)</text:span></text:p>
      <text:p text:style-name="P6"><text:span text:style-name="T12">For all following elements </text:span><text:span text:style-name="T2">e</text:span><text:span text:style-name="T12">, </text:span><text:span text:style-name="T2">assign-filter</text:span><text:span text:style-name="T12"> is required to process the assignment <text:s/>{</text:span><text:span text:style-name="T2">state </text:span><text:span text:style-name="T11">:=</text:span><text:span text:style-name="T2"> e</text:span><text:span text:style-name="T12">|...}, resulting in a new state. Finally, the state is returned.</text:span></text:p>
      <text:p text:style-name="P6"><text:span text:style-name="T12">The <text:s/></text:span><text:span text:style-name="T11">fold </text:span><text:span text:style-name="T12">operation is often combined with a list builder to create stateful filtering. Example:</text:span></text:p>
      <text:p text:style-name="P8"><text:tab/>["Rene" male "John" "Peter" female "Jane" "Susan"]<text:line-break/><text:tab/>first [unknown] fold<text:line-break/><text:tab/>{ gender := $ name | :ok list := gender, name; gender }<text:line-break/><text:tab/>{ ? := / gender | :ok gender }<text:line-break/><text:tab/>.:list</text:p>
      <text:p text:style-name="P6"><text:span text:style-name="T11"><text:s/></text:span><text:span text:style-name="T12">The result is:</text:span></text:p>
      <text:p text:style-name="P8"><text:tab/>[unknown "Rene", male "John", male "Peter", female "Jane", female "Susan"]</text:p>
      <text:p text:style-name="P2">($ <text:s/>and <text:s/>/ <text:s/>are typechecks, as explained in the section on patterns.)</text:p>
      <text:h text:style-name="Heading_20_3" text:outline-level="3">Sorting, summing, grouping and rearranging of lists</text:h>
      <text:p text:style-name="P2">To sort a list by keys, use:</text:p>
      <text:p text:style-name="P2"><text:tab/><text:span text:style-name="T1">s</text:span> <text:span text:style-name="T11">order</text:span> (<text:span text:style-name="T1">key-function</text:span>)<text:line-break/><text:tab/>s <text:span text:style-name="T11">order [ok]</text:span> <text:s text:c="3"/>(simple sorting using a trivial <text:span text:style-name="T1">key-function</text:span>)</text:p>
      <text:p text:style-name="P2"><text:span text:style-name="T1">key-function</text:span> is required to process all elements of a. A sorted copy is then passed, based on comparing the resulting keys. Numbers and time values are compared numerically; for strings, binary comparison is used. To achieve collated ordering, the key-function must transform the strings to collation keys. For multiple-key sorting, the key-function should return a list.</text:p>
      <text:p text:style-name="P2">To extract a single element of a list by smallest/largest key:</text:p>
      <text:p text:style-name="P6"><text:span text:style-name="T11"><text:tab/></text:span><text:span text:style-name="T2">s</text:span><text:span text:style-name="T11"> smallest </text:span><text:span text:style-name="T2">(key-function)<text:line-break/></text:span><text:span text:style-name="T11"><text:tab/></text:span><text:span text:style-name="T2">s</text:span><text:span text:style-name="T11"> largest </text:span><text:span text:style-name="T2">(key-function)</text:span></text:p>
      <text:p text:style-name="P2">To simply get the smallest/largest element:</text:p>
      <text:p text:style-name="P6"><text:span text:style-name="T2"><text:tab/>s</text:span><text:span text:style-name="T11"> smallest<text:line-break/></text:span><text:span text:style-name="T2"><text:tab/>s</text:span><text:span text:style-name="T11"> largest</text:span></text:p>
      <text:p text:style-name="P2">To get the longest string in a list:</text:p>
      <text:p text:style-name="P6"><text:span text:style-name="T12"><text:tab/></text:span><text:span text:style-name="T2">s</text:span><text:span text:style-name="T11"> largest {? $ ok|:ok}</text:span></text:p>
      <text:p text:style-name="P2">If the largest key is shared by several elements, the first of them is returned.</text:p>
      <text:p text:style-name="P2">To sum a list of numbers:</text:p>
      <text:p text:style-name="P2"><text:tab/><text:span text:style-name="T1">s</text:span><text:span text:style-name="T11"> sum</text:span></text:p>
      <text:p text:style-name="P2">To group data by key<text:span text:style-name="T11">:</text:span></text:p>
      <text:p text:style-name="P6"><text:span text:style-name="T12"><text:tab/></text:span><text:span text:style-name="T2">list-expression </text:span><text:span text:style-name="T11">groups </text:span><text:span text:style-name="T2">(key-function)</text:span></text:p>
      <text:p text:style-name="P6"><text:span text:style-name="T12">The </text:span><text:span text:style-name="T2">key-function </text:span><text:span text:style-name="T12">is tried for all list elements, and should either return a constant name or a <text:s/></text:span><text:span text:style-name="T11">:name </text:span><text:span text:style-name="T2">name</text:span><text:span text:style-name="T11">; </text:span><text:span text:style-name="T2">value</text:span><text:span text:style-name="T12"> <text:s/>node or fail; returning an expressive other than a <text:s/></text:span><text:span text:style-name="T11">:name </text:span><text:span text:style-name="T2">name</text:span><text:span text:style-name="T11">; </text:span><text:span text:style-name="T2">value</text:span><text:span text:style-name="T12"> <text:s/>node is an error. Returning a constant name is equivalent to returning a <text:s text:c="2"/></text:span><text:span text:style-name="T11">:name </text:span><text:span text:style-name="T2">name</text:span><text:span text:style-name="T11">; </text:span><text:span text:style-name="T2">value</text:span><text:span text:style-name="T12"> <text:s/>node with that name, and the original element as a value.</text:span></text:p>
      <text:p text:style-name="P2">This resulting lists of values for each name are assembled in a node:</text:p>
      <text:p text:style-name="P6"><text:span text:style-name="T12"><text:tab/></text:span><text:span text:style-name="T11">groups: .</text:span><text:span text:style-name="T2">name value-list ...</text:span></text:p>
      <text:p text:style-name="P2">If no values are present, <text:s/><text:span text:style-name="T11">[] <text:s/></text:span>is returned.</text:p>
      <text:p text:style-name="P2">The expression</text:p>
      <text:p text:style-name="P8"><text:tab/>15 up groups {n|:ok {} write (n) count}{13|?}</text:p>
      <text:p text:style-name="P2">will group the numbers from 1 to 15 by digit count, leaving out 13. The result is:</text:p>
      <text:p text:style-name="P2"><text:tab/><text:span text:style-name="T11">[groups: .2 10 11 12 14 15 .1 1 2 3 4 5 6 7 8 9]</text:span></text:p>
      <text:p text:style-name="P5">For each name, the values are listed in the order in which they occur in the original list, however the order of the keys is arbitrary, as is always the case with attribute names.</text:p>
      <text:p text:style-name="P2">For the common case where only the first or last value for each key is wanted:</text:p>
      <text:p text:style-name="P6"><text:span text:style-name="T12"><text:tab/></text:span><text:span text:style-name="T2">list-expression </text:span><text:span text:style-name="T11">firsts </text:span><text:span text:style-name="T2">(key-function)<text:line-break/></text:span><text:span text:style-name="T12"><text:tab/></text:span><text:span text:style-name="T2">list-expression </text:span><text:span text:style-name="T11">lasts </text:span><text:span text:style-name="T2">(key-function)</text:span></text:p>
      <text:p text:style-name="P6"><text:span text:style-name="T12">works like <text:s/></text:span><text:span text:style-name="T11">groups</text:span><text:span text:style-name="T12"> , but records only the first/last element for each key, instead of a list of all its elements.</text:span></text:p>
      <text:p text:style-name="P6"><text:span text:style-name="T12"><text:tab/></text:span><text:span text:style-name="T2">list-expression </text:span><text:span text:style-name="T11">singles </text:span><text:span text:style-name="T2">(key-function)</text:span></text:p>
      <text:p text:style-name="P6"><text:span text:style-name="T12">like <text:s/></text:span><text:span text:style-name="T11">firsts</text:span><text:span text:style-name="T12"> <text:s/>but fails if a key is used more than once</text:span></text:p>
      <text:p text:style-name="P6"><text:span text:style-name="T12"><text:tab/></text:span><text:span text:style-name="T2">list-expression </text:span><text:span text:style-name="T11">folds </text:span><text:span text:style-name="T2">(combined-key-function-and-assign-filter)</text:span></text:p>
      <text:p text:style-name="P6"><text:span text:style-name="T12">like <text:s/></text:span><text:span text:style-name="T11">firsts <text:s/></text:span><text:span text:style-name="T12">but when an already-used key is encountered, the old and new value are folded, using assign rules of the same filter that was used for key extraction. The whole expression misses if a fold misse.</text:span></text:p>
      <text:p text:style-name="P2">This can be used for summing etc.:</text:p>
      <text:p text:style-name="P8"><text:tab/>[apples 1, oranges 2, bananas 3, apples 4]<text:line-break/><text:tab/>folds {kind, count|:ok :name kind; count} {a := b|:try a + b}</text:p>
      <text:p text:style-name="P2">returns</text:p>
      <text:p text:style-name="P8"><text:tab/>[folds: .apples 5 .bananas 3 .oranges 2]</text:p>
      <text:p text:style-name="P6"><text:span text:style-name="T12">as the </text:span><text:span text:style-name="T11">apples</text:span><text:span text:style-name="T12"> <text:s/>counts are added in the folding rule.</text:span></text:p>
      <text:p text:style-name="P6"><text:span text:style-name="T12">The <text:s/></text:span><text:span text:style-name="T11">traverse <text:s/></text:span><text:span text:style-name="T12">operation rearranges a rectangular two-dimensional list, swapping dimensions:</text:span></text:p>
      <text:p text:style-name="Text_20_body"><text:span text:style-name="T6"><text:tab/></text:span><text:span text:style-name="T7">[one 1, two 2, three 3] traverse <text:s text:c="3"/></text:span><text:span text:style-name="T6">returns <text:s text:c="3"/></text:span><text:span text:style-name="T7">[one two three, 1 2 3]</text:span></text:p>
      <text:h text:style-name="Heading_20_2" text:outline-level="2">Node and cliche operations</text:h>
      <text:p text:style-name="P1">Named nodes can be constructed by simple evaluation:</text:p>
      <text:p text:style-name="P1"><text:tab/><text:span text:style-name="T11">oops: 1 + 2 <text:s text:c="3"/></text:span>returns the node constant <text:s text:c="3"/><text:span text:style-name="T11">[oops: 3]</text:span></text:p>
      <text:p text:style-name="P1">Action and binding nodes can be constructed similarly with escapes.</text:p>
      <text:p text:style-name="P1"><text:tab/><text:span text:style-name="T11">: 4 + 5 + 6</text:span></text:p>
      <text:p text:style-name="P1">is the same as</text:p>
      <text:p text:style-name="P11"><text:tab/>::who (:who 4 .call +: 5) .call +: 6</text:p>
      <text:p text:style-name="P1">and returns</text:p>
      <text:p text:style-name="P1"><text:s text:c="5"/><text:span text:style-name="T11">9 + 6<text:line-break/><text:tab/>:: 4 + 5 + 6 <text:s text:c="3"/></text:span>returns <text:s text:c="3"/><text:span text:style-name="T11">: 15 <text:s text:c="3"/></text:span>– the double escape constructs an escape.</text:p>
      <text:p text:style-name="P1">An escaped ruleset evaluates all patterns and actions, and constructs a new ruleset from them.</text:p>
      <text:p text:style-name="P1">To process the legs of a node in turn:</text:p>
      <text:p text:style-name="P1"><text:tab/><text:span text:style-name="T1">node </text:span><text:span text:style-name="T7">legs</text:span><text:span text:style-name="T1"> (assign-filter)</text:span></text:p>
      <text:p text:style-name="P2">For each leg, the assignment <text:s/><text:span text:style-name="T1">name </text:span>:=<text:span text:style-name="T1"> value <text:s/></text:span>is tried in the filter; the results are passed as a list, ignoring misses.</text:p>
      <text:p text:style-name="P2">To copy a node but without a specific leg:</text:p>
      <text:p text:style-name="P2"><text:tab/><text:span text:style-name="T1">node </text:span><text:span text:style-name="T11">without </text:span><text:span text:style-name="T3">(</text:span><text:span text:style-name="T1">leg-name)</text:span></text:p>
      <text:p text:style-name="P2">To add or replace a leg:</text:p>
      <text:p text:style-name="P2"><text:tab/><text:span text:style-name="T1">node </text:span><text:span text:style-name="T11">merge (</text:span><text:span text:style-name="T1">leg-name</text:span><text:span text:style-name="T11">, </text:span><text:span text:style-name="T1">leg-value</text:span><text:span text:style-name="T11">)</text:span></text:p>
      <text:p text:style-name="P2">To merge two nodes <text:span text:style-name="T1">a</text:span> and <text:span text:style-name="T1">b</text:span>:</text:p>
      <text:p text:style-name="P2"><text:tab/><text:span text:style-name="T1">a</text:span> <text:span text:style-name="T11">merge (</text:span><text:span text:style-name="T1">b</text:span><text:span text:style-name="T11">)</text:span></text:p>
      <text:p text:style-name="P2">When merging nodes <text:span text:style-name="T1">a</text:span> and <text:span text:style-name="T1">b</text:span> this way, the<text:span text:style-name="T1"> </text:span>legs of <text:span text:style-name="T1">b</text:span> override legs of <text:span text:style-name="T1">a</text:span> with the same names. The head of <text:span text:style-name="T1">b </text:span>is used unless it is <text:s/><text:span text:style-name="T11">[] ;</text:span> in that case the head of <text:span text:style-name="T1">a </text:span>is used.</text:p>
      <text:p text:style-name="P2">If either argument of <text:s/><text:span text:style-name="T11">merge <text:s/></text:span>is <text:s/><text:span text:style-name="T11">[]</text:span> , the other argument is returned, except for this case:</text:p>
      <text:p text:style-name="P2"><text:tab/><text:span text:style-name="T11">[] merge (</text:span><text:span text:style-name="T1">nonempty-list</text:span><text:span text:style-name="T11">)</text:span></text:p>
      <text:p text:style-name="P2">which is undefined unless <text:span text:style-name="T1">nonempty-list </text:span>is a pair <text:s/><text:span text:style-name="T11">(</text:span><text:span text:style-name="T1">name</text:span><text:span text:style-name="T11">,</text:span><text:span text:style-name="T1"> value</text:span><text:span text:style-name="T11">) <text:s/></text:span>where <text:span text:style-name="T1">name</text:span> is a constant. In that case, the result is a node <text:s/><text:span text:style-name="T11">anyway: .</text:span><text:span text:style-name="T1">name</text:span><text:span text:style-name="T11"> </text:span><text:span text:style-name="T1">value</text:span></text:p>
      <text:p text:style-name="P2">This convention serves for building nodes with <text:s/><text:span text:style-name="T11">merge, <text:s/></text:span>starting with the empty list.</text:p>
      <text:p text:style-name="P2">To replace the name of a node or cliche:</text:p>
      <text:p text:style-name="P2"><text:tab/><text:span text:style-name="T1">a</text:span> <text:span text:style-name="T11">head (</text:span><text:span text:style-name="T1">h</text:span><text:span text:style-name="T11">)</text:span></text:p>
      <text:p text:style-name="P2">To build a single-leg cliche as used for names:</text:p>
      <text:p text:style-name="P2"><text:tab/><text:span text:style-name="T1">namespace-identifier </text:span><text:span text:style-name="T11">//</text:span><text:span text:style-name="T1"> local-name</text:span></text:p>
      <text:p text:style-name="P2">This operation is mostly used with text strings but works with other constants as well.</text:p>
      <text:h text:style-name="Heading_20_3" text:outline-level="3">Deep search and replace with <text:s/>**=**</text:h>
      <text:p text:style-name="P2">To search a structure of nodes or lists recursively, possibly replacing some parts:</text:p>
      <text:p text:style-name="P2"><text:tab/><text:span text:style-name="T1">s</text:span> <text:span text:style-name="T11">**=**</text:span> <text:span text:style-name="T1">filter</text:span></text:p>
      <text:p text:style-name="P2">First,<text:span text:style-name="T1"> filter </text:span>gets a chance to process <text:span text:style-name="T1">s</text:span>. If this succeeds, the result is returned with no further processing. If it misses and <text:span text:style-name="T1">s </text:span>is a list or node, its leg values or elements are processed by first calling the assignment <text:s/><text:span text:style-name="T1">n</text:span><text:span text:style-name="T11"> :=</text:span> <text:span text:style-name="T1">value </text:span>,<text:span text:style-name="T1"> <text:s/>n </text:span>being the name or number of the leg, and then simly <text:s/><text:span text:style-name="T1">value </text:span>, in <text:span text:style-name="T1">filter</text:span>; if<text:span text:style-name="T1"> </text:span>both miss and <text:span text:style-name="T1">value</text:span> is a node or list, the process is applied recursively. When the filter calls succeed and return other values than the original, new nodes or lists are generated if the result of the operation is to be used.</text:p>
      <text:p text:style-name="P2">This example will zero all numbers except price legs which are doubled. Note that the assignment is tried first, regardless of rule order.</text:p>
      <text:p text:style-name="P2"><text:tab/><text:span text:style-name="T1">s </text:span><text:span text:style-name="T11">**=** {[price] := # ok|:ok . * 2} {#?|:ok 0}</text:span></text:p>
      <text:p text:style-name="P2">Similarly, when transforming a list element, the <text:s/>assignment <text:s/><text:span text:style-name="T1">count</text:span><text:span text:style-name="T3"> </text:span><text:span text:style-name="T11">:=</text:span><text:span text:style-name="T3"> </text:span><text:span text:style-name="T1">value</text:span><text:span text:style-name="T3"> <text:s/></text:span>is tried before <text:s/><text:span text:style-name="T1">value </text:span>;<text:span text:style-name="T1"> <text:s/>count <text:s/></text:span>being the position in the list, starting from 1.</text:p>
      <text:p text:style-name="P2">To search a structure without transforming it, simply do a transformation in a statement where the result is not used – typically a list builder. To list all node names in <text:span text:style-name="T1">s</text:span>:</text:p>
      <text:p text:style-name="P2"><text:tab/><text:span text:style-name="T1">s </text:span><text:span text:style-name="T11">**=** {name * ?|list := name} .:list</text:span></text:p>
      <text:p text:style-name="P15">Tip: <text:span text:style-name="T12">If the filter only has assignment rules, the top level will not be matched. If the topmost rule (which is the last to be searched) is:</text:span></text:p>
      <text:p text:style-name="P15"><text:span text:style-name="T6"><text:tab/></text:span><text:span text:style-name="T5">{ ? := ok | :ok }</text:span></text:p>
      <text:p text:style-name="P14">only direct legs of the top node or list will be searched.</text:p>
      <text:h text:style-name="Heading_20_2" text:outline-level="2">Various control structures</text:h>
      <text:h text:style-name="Heading_20_3" text:outline-level="3">Evaluating and quoting</text:h>
      <text:p text:style-name="P2">PILS expressions can be evaluated by the <text:span text:style-name="T1">evaluate-operator</text:span> <text:s/><text:span text:style-name="T11">--- <text:s/></text:span>which can be used as a prefix or infix operator:</text:p>
      <text:p text:style-name="P2"><text:tab/><text:span text:style-name="T11">---</text:span> <text:span text:style-name="T1">e <text:s text:c="3"/></text:span>evaluates the value of <text:span text:style-name="T1">e</text:span> in the current context (<text:span text:style-name="T1">e</text:span> gets evaluated twice).</text:p>
      <text:p text:style-name="P2"><text:span text:style-name="T1"><text:tab/>e </text:span><text:span text:style-name="T11">---</text:span><text:span text:style-name="T1"> c <text:s text:c="3"/></text:span>evaluates the value of <text:span text:style-name="T1">e</text:span> using the value of <text:span text:style-name="T1">c</text:span> as context.</text:p>
      <text:p text:style-name="P2">Expressions can be quoted with the <text:s/><text:span text:style-name="T11">:quote <text:s/></text:span>statement:</text:p>
      <text:p text:style-name="P2"><text:tab/><text:span text:style-name="T11">:quote</text:span> <text:span text:style-name="T1">e <text:s text:c="3"/></text:span>or, using an inversion: <text:s text:c="3"/><text:span text:style-name="T1">e </text:span><text:span text:style-name="T11">.:quote</text:span></text:p>
      <text:p text:style-name="P2">This returns <text:span text:style-name="T1">e </text:span>as it stands, without evaluation.</text:p>
      <text:p text:style-name="P15">Note: <text:s/><text:span text:style-name="T5">:quote </text:span><text:span text:style-name="T12">is rarely needed in PILS. There is no reason to use it for constant nodes or listes.</text:span></text:p>
      <text:h text:style-name="Heading_20_3" text:outline-level="3">Declaring local bindings and rules</text:h>
      <text:p text:style-name="P6">To bind names to values locally:</text:p>
      <text:p text:style-name="Text_20_body"><text:span text:style-name="T5"><text:tab/></text:span><text:span text:style-name="T7">;</text:span><text:span text:style-name="T1">name expression</text:span><text:span text:style-name="T7">;</text:span><text:span text:style-name="T5"> </text:span><text:span text:style-name="T1">tail</text:span></text:p>
      <text:p text:style-name="P6"><text:span text:style-name="T1">expression</text:span> is evaluated in the current context <text:span text:style-name="T1">cc</text:span>,<text:span text:style-name="T1"> </text:span>and <text:span text:style-name="T1">tail </text:span>is evaluated in a context <text:s/><text:span text:style-name="T11">;</text:span><text:span text:style-name="T2">name</text:span><text:span text:style-name="T3"> </text:span><text:span text:style-name="T2">ev</text:span><text:span text:style-name="T11">; </text:span><text:span text:style-name="T2">cc <text:s/></text:span><text:span text:style-name="T12">where </text:span><text:span text:style-name="T2">ev </text:span><text:span text:style-name="T12">is the value of </text:span><text:span text:style-name="T2">expression</text:span><text:span text:style-name="T12">.</text:span></text:p>
      <text:p text:style-name="P2">Several names can be bound in one go:</text:p>
      <text:p text:style-name="P6"><text:span text:style-name="T12"><text:tab/></text:span><text:span text:style-name="T11">;</text:span><text:span text:style-name="T2">name1 expr1 </text:span><text:span text:style-name="T11">.</text:span><text:span text:style-name="T2">name2 expr2 ...</text:span><text:span text:style-name="T12">; </text:span><text:span text:style-name="T2">tail</text:span></text:p>
      <text:p text:style-name="P6"><text:span text:style-name="T12">All the </text:span><text:span text:style-name="T2">expr</text:span><text:span text:style-name="T12">s are evaluated in the original current context, in undefined order. (Future PILS implementations might evaluate them in parallel.)</text:span></text:p>
      <text:p text:style-name="P6"><text:span text:style-name="T12">All constants except <text:s/></text:span><text:span text:style-name="T11">[]</text:span><text:span text:style-name="T12"> <text:s/>are valid names for binding.</text:span></text:p>
      <text:p text:style-name="P2">To use a ruleset locally:</text:p>
      <text:p text:style-name="P7"><text:span text:style-name="T12"><text:tab/></text:span><text:span text:style-name="T11">:use</text:span><text:span text:style-name="T12"> </text:span><text:span text:style-name="T2">rules</text:span><text:span text:style-name="T11">;<text:line-break/><text:tab/></text:span><text:span text:style-name="T2">expression</text:span></text:p>
      <text:p text:style-name="P3">or</text:p>
      <text:p text:style-name="P7"><text:span text:style-name="T12"><text:tab/></text:span><text:span text:style-name="T2">expression<text:line-break/><text:tab/></text:span><text:span text:style-name="T11">===<text:line-break/></text:span><text:span text:style-name="T11"><text:tab/></text:span><text:span text:style-name="T2">rules</text:span></text:p>
      <text:p text:style-name="P7"><text:span text:style-name="T12">These have the same effect: </text:span><text:span text:style-name="T2">rules </text:span><text:span text:style-name="T12">is evaluated in the current ruleset and used to extend it, then <text:s/></text:span><text:span text:style-name="T2">expression </text:span><text:span text:style-name="T12">is evaluated in the extended context. Typically, </text:span><text:span text:style-name="T2">rules </text:span><text:span text:style-name="T12">is a ruleset and gets bound by the evaluation, but any expressions – in particular, references to PILS modules – can be used.</text:span></text:p>
      <text:h text:style-name="Heading_20_3" text:outline-level="3">Conditionals</text:h>
      <text:p text:style-name="P1">A conditional has this general form:</text:p>
      <text:p text:style-name="P1"><text:tab/><text:span text:style-name="T11">:if </text:span><text:span text:style-name="T1">condition</text:span><text:span text:style-name="T7">;</text:span><text:span text:style-name="T5"> </text:span><text:span text:style-name="T1">success-expression </text:span><text:span text:style-name="T7">.else </text:span><text:span text:style-name="T1">else-expression</text:span></text:p>
      <text:p text:style-name="P2">The<text:span text:style-name="T1"> else-expression</text:span> is optional:</text:p>
      <text:p text:style-name="P1"><text:tab/><text:span text:style-name="T11">:if </text:span><text:span text:style-name="T1">cc</text:span><text:span text:style-name="T7">;</text:span><text:span text:style-name="T5"> </text:span><text:span text:style-name="T1">e <text:s text:c="3"/></text:span><text:span text:style-name="T5">is like <text:s text:c="3"/></text:span><text:span text:style-name="T7">:if </text:span><text:span text:style-name="T1">cc</text:span><text:span text:style-name="T7">; </text:span><text:span text:style-name="T1">e </text:span><text:span text:style-name="T7">.else []</text:span></text:p>
      <text:p text:style-name="P2">If <text:s/><text:span text:style-name="T1">condition</text:span> <text:s/>succeeds, its value is ignored and <text:s/><text:span text:style-name="T1">success-expression </text:span><text:s/>is evaluated. If <text:s/><text:span text:style-name="T1">condition <text:s/></text:span>fails, the failure is ignored and <text:span text:style-name="T1">else-expression</text:span> is evaluated.</text:p>
      <text:p text:style-name="P2">Conditions can be combined with <text:s/><text:span text:style-name="T11">and</text:span><text:span text:style-name="T1"> <text:s/></text:span>and <text:s/><text:span text:style-name="T11">or</text:span> .</text:p>
      <text:p text:style-name="P2"><text:span text:style-name="T11"><text:tab/>:if (item price &lt;= maxprice) and ((item quality = [good]) or (item quality = [excellent])); buy (item)</text:span></text:p>
      <text:h text:style-name="Heading_20_3" text:outline-level="3">Explicit calls</text:h>
      <text:p text:style-name="P1">As an alternative to the form <text:s/><text:span text:style-name="T1">(object)</text:span><text:span text:style-name="T5"> (</text:span><text:span text:style-name="T1">argument) </text:span><text:span text:style-name="T5">,</text:span><text:span text:style-name="T1"> </text:span><text:span text:style-name="T5">object calls can be specified with the <text:s/></text:span><text:span text:style-name="T7">call <text:s/></text:span><text:span text:style-name="T5">operation:</text:span></text:p>
      <text:p text:style-name="P1"><text:span text:style-name="T5"><text:tab/>(</text:span><text:span text:style-name="T1">argument) </text:span><text:span text:style-name="T7">call </text:span><text:span text:style-name="T1">(object)</text:span></text:p>
      <text:p text:style-name="P1"><text:span text:style-name="T5">The operation applies <text:s/></text:span><text:span text:style-name="T1">object <text:s/></text:span><text:span text:style-name="T5">to</text:span><text:span text:style-name="T3"> <text:s/></text:span><text:span text:style-name="T1">argument </text:span><text:span text:style-name="T3">.</text:span></text:p>
      <text:p text:style-name="P1"><text:span text:style-name="T5">This differs from <text:s/></text:span><text:span text:style-name="T1">(object)</text:span><text:span text:style-name="T5"> (</text:span><text:span text:style-name="T1">argument) <text:s/></text:span><text:span text:style-name="T5">in the following ways:</text:span></text:p>
      <text:list xml:id="list35480266" text:style-name="L5">
        <text:list-item>
          <text:p text:style-name="P23"><text:span text:style-name="T5">The <text:s/></text:span><text:span text:style-name="T1">(object)</text:span><text:span text:style-name="T5"> (</text:span><text:span text:style-name="T1">argument) </text:span><text:span text:style-name="T5"><text:s/>form may interpret <text:s/></text:span><text:span text:style-name="T1">argument </text:span><text:span text:style-name="T5"><text:s/>as a built-in operation. The <text:s/></text:span><text:span text:style-name="T7">call <text:s/></text:span><text:span text:style-name="T5">operation does not.</text:span></text:p>
        </text:list-item>
        <text:list-item>
          <text:p text:style-name="P23"><text:span text:style-name="T5">If <text:s/></text:span><text:span text:style-name="T1">object <text:s/></text:span><text:span text:style-name="T5">does not accept </text:span><text:span text:style-name="T1">argument </text:span><text:span text:style-name="T5">,</text:span><text:span text:style-name="T1"> </text:span><text:span text:style-name="T5">the <text:s/></text:span><text:span text:style-name="T1">(object)</text:span><text:span text:style-name="T5"> (</text:span><text:span text:style-name="T1">argument) </text:span><text:span text:style-name="T5"><text:s/>form proceeds to create a call node <text:s/></text:span><text:span text:style-name="T7">:who</text:span><text:span text:style-name="T3"> </text:span><text:span text:style-name="T1">object </text:span><text:span text:style-name="T7">.call </text:span><text:span text:style-name="T1">argument <text:s/></text:span><text:span text:style-name="T5">and call it in the current context, allowing backing rules to deal with failed operations – whereas the </text:span><text:span text:style-name="T7">call </text:span><text:span text:style-name="T5">operation simply fails.</text:span></text:p>
        </text:list-item>
      </text:list>
      <text:p text:style-name="P2"><text:span text:style-name="T1">object </text:span>gets evaluated before <text:span text:style-name="T1">argument</text:span></text:p>
      <text:h text:style-name="Heading_20_3" text:outline-level="3">Trials and loops</text:h>
      <text:p text:style-name="P2">A call can be attempted with the <text:s/><text:span text:style-name="T11">try <text:s/></text:span>operation:</text:p>
      <text:p text:style-name="P1"><text:span text:style-name="T5"><text:tab/></text:span><text:span text:style-name="T1">(argument) </text:span><text:span text:style-name="T7">try </text:span><text:span text:style-name="T1">(filter)</text:span></text:p>
      <text:p text:style-name="P2">This is like the <text:s/><text:span text:style-name="T11">call <text:s/></text:span>operation, but if <text:s/><text:span text:style-name="T1">object <text:s/></text:span>does not accept <text:s/><text:span text:style-name="T1">argument </text:span>,<text:span text:style-name="T1"> <text:s/>argument <text:s/></text:span>is simply passed on.</text:p>
      <text:p text:style-name="P2">Looping is done with the <text:s/><text:span text:style-name="T11">repeat <text:s/></text:span>operation:</text:p>
      <text:p text:style-name="P1"><text:span text:style-name="T5"><text:tab/></text:span><text:span text:style-name="T1">(argument) </text:span><text:span text:style-name="T7">repeat </text:span><text:span text:style-name="T5">(</text:span><text:span text:style-name="T1">filter)</text:span></text:p>
      <text:p text:style-name="P2">This is like the <text:s/><text:span text:style-name="T11">try <text:s/></text:span>operation, but <text:s/><text:span text:style-name="T1">filter <text:s/></text:span>is repeatedly applied on the last value. When <text:span text:style-name="T1">filter</text:span> fails, the last value is returned.</text:p>
      <text:p text:style-name="P2">This example lists the integers from 1 to 10 <text:s/>(though <text:s/><text:span text:style-name="T11">10 up</text:span> <text:s/>is an easier way):</text:p>
      <text:p text:style-name="P8"><text:tab/>1 repeat {n &lt;= 10|:ok list := n; n + 1} .:list</text:p>
      <text:p text:style-name="P2">To iterate a constant as long as it changes:</text:p>
      <text:p text:style-name="P1"><text:span text:style-name="T5"><text:tab/></text:span><text:span text:style-name="T1">(argument) </text:span><text:span text:style-name="T7">again </text:span><text:span text:style-name="T5">(</text:span><text:span text:style-name="T1">filter)</text:span></text:p>
      <text:p text:style-name="P2"><text:span text:style-name="T1">argument </text:span>is evaluated and must return a constant, or the operation will fail. Then, <text:span text:style-name="T1">filter</text:span> is repeatedly applied and must always return a constant, or the operation will fail. When this constant is the same as the last value, it is returned.</text:p>
      <text:p text:style-name="P8"><text:tab/>1 again {x|:ok 1 / x + 1}</text:p>
      <text:p text:style-name="P2">is similar to:</text:p>
      <text:p text:style-name="P8"><text:tab/>1 repeat {x|;new 1 / x + 1; :if new &lt;&gt; x; :ok new}</text:p>
      <text:p text:style-name="P2">and returns <text:s/><text:span text:style-name="T11">1.618033988749895</text:span> <text:s/>on the x86 (it may fail on architectures with different floating-point rounding characteristics).</text:p>
      <text:p text:style-name="P2">To prevent infinite loops, the <text:s/><text:span text:style-name="T11">again <text:s/></text:span>operator has built-in cycle detection: at iterations 64, 128, 256, 512, 1024... a value is sampled and compared against the following values. If it reappears after at least one other value, a cycle has been detected and the <text:s/><text:span text:style-name="T11">again</text:span> <text:s/>operation fails. In examples like the above, floating point rounding errors may cause the loop to end up flipping between a two or more values – without the cycle detection, this would result in an endless loop.</text:p>
      <text:h text:style-name="Heading_20_3" text:outline-level="3">Recall</text:h>
      <text:p text:style-name="P1">Mindful recursive analysis is supported by the <text:s/><text:span text:style-name="T11">recall</text:span> <text:s/>operation:</text:p>
      <text:p text:style-name="P1"><text:span text:style-name="T5"><text:tab/></text:span><text:span text:style-name="T1">(initial-constant) </text:span><text:span text:style-name="T7">recall </text:span><text:span text:style-name="T1">(analysis-rules)</text:span></text:p>
      <text:p text:style-name="P2">Like the <text:s/><text:span text:style-name="T11">call</text:span> <text:s/>operation, but occurrences of the the <text:s/><text:span text:style-name="T11">:who</text:span> <text:s/>binder inside <text:span text:style-name="T1">analysis-rules</text:span> refer to a wrapper object that remembers both ongoing and completed calls; only constants are allowed as calls. If an already completed call is repeated, the old value is returned. If an ongoing call directly or indirectly repeats itself recursively, the inner call misses.</text:p>
      <text:h text:style-name="Heading_20_3" text:outline-level="3">Exits</text:h>
      <text:p text:style-name="P2">The <text:s/><text:span text:style-name="T11">:exit <text:s/></text:span>statement looks similar to the <text:s/><text:span text:style-name="T11">:list</text:span> <text:s/>statement:</text:p>
      <text:p text:style-name="P2"><text:tab/><text:span text:style-name="T11">:exit ... exit := </text:span><text:span text:style-name="T1">value</text:span><text:span text:style-name="T11"> </text:span><text:span text:style-name="T1">... ...</text:span><text:span text:style-name="T11"><text:line-break/><text:tab/>:exit [</text:span><text:span text:style-name="T1">tag</text:span><text:span text:style-name="T11">]; </text:span><text:span text:style-name="T1">...</text:span><text:span text:style-name="T11"> exit [</text:span><text:span text:style-name="T1">tag</text:span><text:span text:style-name="T11">] := </text:span><text:span text:style-name="T1">value ...</text:span></text:p>
      <text:p text:style-name="P2">Like the list statement, exit statements are often written using inversion:</text:p>
      <text:p text:style-name="P2"><text:tab/><text:span text:style-name="T1">(</text:span><text:span text:style-name="T11">... exit := </text:span><text:span text:style-name="T1">value</text:span><text:span text:style-name="T11"> ... ...</text:span><text:span text:style-name="T1">)</text:span><text:span text:style-name="T11"> .:exit</text:span></text:p>
      <text:p text:style-name="P2">If the assignment is performed, <text:span text:style-name="T1">value </text:span>is returned immediately from the <text:s/><text:span text:style-name="T11">:exit <text:s/></text:span>statement.</text:p>
      <text:h text:style-name="Heading_20_3" text:outline-level="3">Expression sequencers</text:h>
      <text:p text:style-name="P1">Two expressions can be combined by the operators <text:s/><text:span text:style-name="T11">and , <text:s/>or <text:s/></text:span>and <text:s/><text:span text:style-name="T11">anyway</text:span> :</text:p>
      <text:p text:style-name="P1"><text:tab/><text:span text:style-name="T1">e1 </text:span><text:span text:style-name="T11">and: </text:span><text:span text:style-name="T1">e2</text:span></text:p>
      <text:p text:style-name="P1"><text:span text:style-name="T1">e1 </text:span>is evaluated. If successful, the result is discarded and control passes to <text:span text:style-name="T1">e2</text:span>. If <text:span text:style-name="T1">e1 </text:span>fails, an error is raised and e2 is not evaluated.</text:p>
      <text:p text:style-name="P1"><text:tab/><text:span text:style-name="T1">e1 </text:span><text:span text:style-name="T11">or: </text:span><text:span text:style-name="T1">e2</text:span></text:p>
      <text:p text:style-name="P1"><text:span text:style-name="T1">e1 </text:span>is evaluated and returned if successful. If <text:span text:style-name="T1">e1 </text:span>fails, control passes to <text:span text:style-name="T1">e2</text:span>.</text:p>
      <text:p text:style-name="P1"><text:tab/><text:span text:style-name="T1">e1 </text:span><text:span text:style-name="T11">anyway:</text:span> <text:span text:style-name="T1">e2</text:span></text:p>
      <text:p text:style-name="P1"><text:span text:style-name="T1"><text:s/>e1 </text:span><text:span text:style-name="T5">is evaluated. Whether it fails or succeeds, control is passed to </text:span><text:span text:style-name="T1">e2</text:span><text:span text:style-name="T5">.</text:span></text:p>
      <text:h text:style-name="Heading_20_2" text:outline-level="2">Composite objects</text:h>
      <text:h text:style-name="Heading_20_3" text:outline-level="3">Callarounds</text:h>
      <text:p text:style-name="P2">Callarounds - nodes of form</text:p>
      <text:p text:style-name="P2"><text:tab/><text:span text:style-name="T11">call:</text:span> <text:span text:style-name="T1">argument</text:span></text:p>
      <text:p text:style-name="P2">have a special interpretation when used as objects: they switch the argument with the object. To illustrate its use, consider this expression:</text:p>
      <text:p text:style-name="P2"><text:tab/><text:span text:style-name="T1">list </text:span><text:span text:style-name="T11">each {item|:try item price}</text:span></text:p>
      <text:p text:style-name="P2">The expression above will return a list of the prices of those list items that have a price. However, a shorter and faster way to get it is:</text:p>
      <text:p text:style-name="P2"><text:tab/><text:span text:style-name="T1">list </text:span><text:span text:style-name="T11">each [call: price]</text:span></text:p>
      <text:p text:style-name="P2">This works as follows: each item from <text:span text:style-name="T1">list </text:span>is given as argument to the object <text:s/><text:span text:style-name="T11">[call: price]</text:span> , which deals with them by trying to call their <text:s/><text:span text:style-name="T11">price</text:span> <text:s/>methods.</text:p>
      <text:h text:style-name="Heading_20_3" text:outline-level="3">Aggregates</text:h>
      <text:p text:style-name="P6">Two objects <text:span text:style-name="T1">a</text:span> and <text:span text:style-name="T1">b</text:span> can be combined into an extending aggregate with the <text:s/><text:span text:style-name="T11">+++</text:span> <text:s/>operator:</text:p>
      <text:p text:style-name="P6"><text:tab/><text:span text:style-name="T1">a</text:span> <text:span text:style-name="T11">+++</text:span> <text:span text:style-name="T1">b</text:span></text:p>
      <text:p text:style-name="P6">When the extending aggregate is called upon, <text:span text:style-name="T1">b</text:span> gets a try first. If <text:span text:style-name="T1">b</text:span> does not handle the call, <text:span text:style-name="T1">a</text:span> gets a try.</text:p>
      <text:p text:style-name="P6">Extender aggregates are similar to subclassing in traditional object oriented languages, but aggregates are a runtime concept and work directly on objects, as PILS has no class concept.</text:p>
      <text:p text:style-name="P6">If <text:s/><text:span text:style-name="T1">b</text:span> <text:span text:style-name="T11">= []</text:span> , the <text:s/><text:span text:style-name="T11">+++</text:span> operator simply returns <text:s/><text:span text:style-name="T1">a </text:span>.</text:p>
      <text:p text:style-name="P6">A filtering aggregate can be created with the <text:s/><text:span text:style-name="T11">-&gt;</text:span> <text:s/>operator:</text:p>
      <text:p text:style-name="P6"><text:tab/><text:span text:style-name="T1">a</text:span> <text:span text:style-name="T11">-&gt;</text:span> <text:span text:style-name="T1">b</text:span></text:p>
      <text:p text:style-name="P6">When this aggregate is called upon, <text:span text:style-name="T1">a</text:span> must process the call, and <text:span text:style-name="T1">b</text:span> must process the result, or the call fails.</text:p>
      <text:p text:style-name="P6">Serial compounds cannot process assignments.</text:p>
      <text:p text:style-name="P6">Note: the <text:s/><text:span text:style-name="T11">-&gt;</text:span> <text:s/>operator has the priority of a relational operator, associating from the right. The priority follows from the last character.</text:p>
      <text:h text:style-name="Heading_20_2" text:outline-level="2">Controlling the :who binder</text:h>
      <text:p text:style-name="P6">The <text:span text:style-name="T11"><text:s/>:who <text:s/></text:span><text:span text:style-name="T12">binders will refer to the entire aggregate if used in </text:span><text:span text:style-name="T2">a</text:span><text:span text:style-name="T12"> or </text:span><text:span text:style-name="T2">b</text:span><text:span text:style-name="T12">, allowing the component objects to call methods on the aggregate; this is similar to virtual methods. To isolate an aggregate component, wrap it like this:</text:span></text:p>
      <text:p text:style-name="P13"><text:span text:style-name="T6"><text:tab/></text:span><text:span text:style-name="T7">who:</text:span><text:span text:style-name="T6"> </text:span><text:span text:style-name="T12">object</text:span></text:p>
      <text:p text:style-name="P6"><text:span text:style-name="T12">Any <text:s/></text:span><text:span text:style-name="T11">:who</text:span><text:span text:style-name="T12"> <text:s/>binders in </text:span><text:span text:style-name="T2">object </text:span><text:span text:style-name="T12">will now refer to </text:span><text:span text:style-name="T2">object, </text:span><text:span text:style-name="T12">rather than the containing aggregate.</text:span></text:p>
      <text:p text:style-name="P2">For use with the programming system's wrapping of platform specific objects, an extended form is supported:</text:p>
      <text:p text:style-name="P6"><text:span text:style-name="T12"><text:tab/></text:span><text:span text:style-name="T11">who: .</text:span><text:span text:style-name="T12"> </text:span><text:span text:style-name="T2">who-binding</text:span><text:span text:style-name="T12"> </text:span><text:span text:style-name="T11">;</text:span><text:span text:style-name="T12"> </text:span><text:span text:style-name="T2">object</text:span></text:p>
      <text:p text:style-name="P6"><text:span text:style-name="T12">where <text:s/></text:span><text:span text:style-name="T2">who-binding</text:span><text:span text:style-name="T12"> <text:s/>specifies the value of <text:s/></text:span><text:span text:style-name="T11">:who</text:span><text:span text:style-name="T12"> -bindings inside </text:span><text:span text:style-name="T2">object</text:span><text:span text:style-name="T12">.</text:span></text:p>
      <text:h text:style-name="Heading_20_2" text:outline-level="2">Not-filters</text:h>
      <text:p text:style-name="P2">Aggregates of form</text:p>
      <text:p text:style-name="P13"><text:span text:style-name="T6"><text:tab/></text:span><text:span text:style-name="T7">not:</text:span><text:span text:style-name="T6"> </text:span><text:span text:style-name="T12">object</text:span></text:p>
      <text:p text:style-name="P6"><text:span text:style-name="T12">will miss calls that are processed by </text:span><text:span text:style-name="T2">object</text:span><text:span text:style-name="T12">. If however </text:span><text:span text:style-name="T2">object</text:span><text:span text:style-name="T12"> misses the call, the call is successfully returned unchanged.</text:span></text:p>
      <text:h text:style-name="Heading_20_1" text:outline-level="1">Rules and patterns</text:h>
      <text:h text:style-name="Heading_20_2" text:outline-level="2">Patterns</text:h>
      <text:p text:style-name="P2">Patterns are used in rules; they specify a structure into which data can be fitted.</text:p>
      <text:h text:style-name="Heading_20_3" text:outline-level="3">Constants, variables and jokers</text:h>
      <text:p text:style-name="P1">A constant matches the exact same constant and nothing else.</text:p>
      <text:p text:style-name="P1">A standalone name (written simply as <text:s/><text:span text:style-name="T1">name <text:s/></text:span>but represented by a node <text:s/><text:span text:style-name="T11">:call [</text:span><text:span text:style-name="T1">name</text:span><text:span text:style-name="T7">]</text:span><text:span text:style-name="T1"> </text:span><text:span text:style-name="T5">)</text:span><text:span text:style-name="T1"> </text:span>is a <text:span text:style-name="T1">variable </text:span>that matches anything and binds it to the name. If a name is bound more than once in the same pattern, the values must be identical.</text:p>
      <text:p text:style-name="P1">The joker <text:s/><text:span text:style-name="T11">?</text:span> <text:s/>or, to spell it out: <text:s/><text:span text:style-name="T11">:call []</text:span> , matches anything and ignores it.</text:p>
      <text:p text:style-name="P1">Any other node <text:s/><text:span text:style-name="T11">:call</text:span> constant <text:s/>is treated as a variable.</text:p>
      <text:p text:style-name="P14"><text:span text:style-name="T11">Beware:</text:span> this rule:</text:p>
      <text:p text:style-name="P1"><text:tab/>{ fac (0) | :ok 1 }</text:p>
      <text:p text:style-name="P1"><text:span text:style-name="T1">may not do what you expect. The phrase</text:span> <text:s/><text:span text:style-name="T11">fac (0)</text:span> <text:s/><text:span text:style-name="T1">is read as</text:span> <text:s/><text:span text:style-name="T11">:call [fac: 0]</text:span> <text:s/><text:span text:style-name="T1">which is a variable with the name</text:span> <text:s/><text:span text:style-name="T11">[fac: 0]</text:span> .</text:p>
      <text:h text:style-name="Heading_20_3" text:outline-level="3">Lists, nodes and escapes</text:h>
      <text:p text:style-name="P2">A list pattern matches a list of the same length, with matching elements.</text:p>
      <text:p text:style-name="P2">A node pattern matches a node with the same name and leg names, and matching leg values, unless otherwise specified in the following paragraphs. As always, leg order has no significance.</text:p>
      <text:p text:style-name="P2">For constant nodes and lists, this is equivalent to matching the exact same constant, as specified for constants.</text:p>
      <text:p text:style-name="P2">Action nodes should generally be escaped when used in patterns with the intention of matching a similar node, as some action nodes have special meaning in patterns.</text:p>
      <text:p text:style-name="P2">An escaped pattern</text:p>
      <text:p text:style-name="P2"><text:tab/> <text:span text:style-name="T11">:</text:span> <text:span text:style-name="T1">pattern</text:span></text:p>
      <text:p text:style-name="P2">works the same as if <text:s/><text:span text:style-name="T1">pattern <text:s text:c="2"/></text:span>had been specified directly, except that if <text:span text:style-name="T1">pattern </text:span>is a node, any special conventions for node patterns are ignored. This allows the use of node patterns that would otherwise mean something else. A double-escape</text:p>
      <text:p text:style-name="P2"><text:tab/><text:span text:style-name="T11">::</text:span> <text:span text:style-name="T1">x</text:span></text:p>
      <text:p text:style-name="P2">matches a single escape – the outer escape tells the pattern compiler to treat the inner escape as a normal node, i.e. to match a node of the same structure, which is an escape.</text:p>
      <text:h text:style-name="Heading_20_3" text:outline-level="3">Type checks</text:h>
      <text:p text:style-name="P2">These operations specify type checks. <text:span text:style-name="T1">s </text:span>is typically a variable or <text:s/><text:span text:style-name="T11">? </text:span>.</text:p>
      <text:p text:style-name="P2"><text:tab/><text:span text:style-name="T11">#</text:span> <text:span text:style-name="T1">s <text:s text:c="3"/>– </text:span>number<text:line-break/><text:tab/><text:span text:style-name="T11">% </text:span><text:span text:style-name="T1">s <text:s text:c="3"/>– </text:span>integer<text:line-break/><text:tab/><text:span text:style-name="T11">+ </text:span><text:span text:style-name="T1">s <text:s text:c="3"/>– </text:span>integer &gt; 0, same as <text:s/><text:span text:style-name="T11">%</text:span> <text:span text:style-name="T1">s</text:span> <text:span text:style-name="T11">&gt; 0</text:span> , see below<text:line-break/><text:tab/><text:span text:style-name="T1">s </text:span><text:span text:style-name="T11">count <text:s text:c="2"/>– </text:span>integer &gt;= 0, same as <text:s/><text:span text:style-name="T11">%</text:span> <text:span text:style-name="T1">s</text:span> <text:span text:style-name="T11">&gt;= 0</text:span></text:p>
      <text:p text:style-name="P2"><text:tab/><text:span text:style-name="T1">s</text:span> <text:span text:style-name="T11">time</text:span> <text:s text:c="3"/>– timestamp<text:line-break/><text:tab/><text:span text:style-name="T1">s</text:span> <text:span text:style-name="T11">duration</text:span> <text:s text:c="3"/>– duration<text:line-break/><text:tab/><text:span text:style-name="T1">s</text:span> <text:span text:style-name="T11">dating</text:span> <text:s text:c="3"/>– dating</text:p>
      <text:p text:style-name="P2"><text:tab/><text:span text:style-name="T11">$</text:span> <text:span text:style-name="T1">s <text:s text:c="3"/>– </text:span>string<text:line-break/><text:tab/><text:span text:style-name="T11">+$ </text:span><text:span text:style-name="T1">s <text:s text:c="3"/>– </text:span>nonempty string, same as <text:s/><text:span text:style-name="T1">s</text:span> <text:span text:style-name="T11">$ (? &gt; 0)</text:span> , see below...<text:line-break/><text:tab/><text:span text:style-name="T11">++$ </text:span><text:span text:style-name="T1">s <text:s text:c="3"/>– </text:span>string of 2 or more bytes, same as <text:s/><text:span text:style-name="T1">s</text:span> <text:span text:style-name="T11">$ (? &gt; 1)</text:span></text:p>
      <text:p text:style-name="P2"><text:tab/><text:span text:style-name="T11">&amp;</text:span> <text:span text:style-name="T1">s <text:s text:c="3"/>– </text:span>list<text:line-break/><text:tab/><text:span text:style-name="T11">+&amp; </text:span><text:span text:style-name="T1">s <text:s text:c="3"/>– </text:span>nonempty list, same as <text:s/><text:span text:style-name="T1">s</text:span> <text:span text:style-name="T11">&amp; (? &gt; 0)</text:span><text:line-break/><text:tab/><text:span text:style-name="T11">++&amp; </text:span><text:span text:style-name="T1">s <text:s text:c="3"/>– </text:span>list of length &gt; 1, same as <text:s/><text:span text:style-name="T1">s</text:span> <text:span text:style-name="T11">&amp; (? &gt; 1)</text:span></text:p>
      <text:p text:style-name="P2"><text:span text:style-name="T11"><text:tab/>*</text:span> <text:span text:style-name="T1">s <text:s text:c="3"/>– </text:span>node<text:line-break/><text:span text:style-name="T11"><text:tab/>/</text:span> <text:span text:style-name="T1">s <text:s text:c="3"/>– </text:span>cliche<text:line-break/><text:tab/><text:span text:style-name="T11">=</text:span> <text:span text:style-name="T1">s</text:span> <text:s text:c="3"/>– any constant<text:line-break/><text:tab/>s <text:span text:style-name="T11">legs</text:span> <text:s text:c="3"/>– node or list</text:p>
      <text:p text:style-name="P2">The <text:s/><text:span text:style-name="T11">=</text:span> <text:s/>type check can be combined with other typechecks:</text:p>
      <text:p text:style-name="P2"><text:tab/><text:span text:style-name="T11">=</text:span> <text:span text:style-name="T11">&amp;</text:span> <text:span text:style-name="T1">s <text:s text:c="3"/>– </text:span>list constant</text:p>
      <text:p text:style-name="P2">The system interface may defines additional type checks for various system objects.</text:p>
      <text:h text:style-name="Heading_20_3" text:outline-level="3">Searches</text:h>
      <text:p text:style-name="P1"><text:span text:style-name="T5">The search operators <text:s text:c="2"/></text:span><text:span text:style-name="T1"><text:s/>(</text:span><text:span text:style-name="T7">&lt;</text:span><text:span text:style-name="T1">)</text:span><text:span text:style-name="T7">=* <text:s text:c="3"/></text:span><text:span text:style-name="T1">(</text:span><text:span text:style-name="T7">&lt;</text:span><text:span text:style-name="T1">)^</text:span><text:span text:style-name="T7">*</text:span><text:span text:style-name="T1"> <text:s text:c="3"/>(</text:span><text:span text:style-name="T7">&lt;</text:span><text:span text:style-name="T1">)$</text:span><text:span text:style-name="T7">*</text:span><text:span text:style-name="T1"> </text:span><text:span text:style-name="T5"><text:s text:c="3"/></text:span><text:span text:style-name="T1">(</text:span><text:span text:style-name="T7">&lt;</text:span><text:span text:style-name="T1">)#</text:span><text:span text:style-name="T7">* <text:s text:c="3"/></text:span><text:span text:style-name="T1">(</text:span><text:span text:style-name="T7">&lt;</text:span><text:span text:style-name="T1">)~</text:span><text:span text:style-name="T7">*</text:span><text:span text:style-name="T1"> <text:s text:c="3"/>(</text:span><text:span text:style-name="T7">&lt;</text:span><text:span text:style-name="T1">)+</text:span><text:span text:style-name="T7">*</text:span><text:span text:style-name="T1"> t <text:s text:c="3"/>(</text:span><text:span text:style-name="T7">&lt;</text:span><text:span text:style-name="T1">)-</text:span><text:span text:style-name="T7">*</text:span><text:span text:style-name="T5"> <text:s text:c="2"/>can be used against string literals and list constants. The resulting integer cannot be extracted in the pattern but is required to be </text:span><text:span text:style-name="T7"><text:s/>&gt; 0 </text:span><text:span text:style-name="T5">.</text:span></text:p>
      <text:p text:style-name="P1">To accept strings that begin with <text:s/><text:span text:style-name="T11">"http://"</text:span> <text:s/>and end with <text:s/><text:span text:style-name="T11">"/" </text:span>:</text:p>
      <text:p text:style-name="P1"><text:tab/><text:span text:style-name="T1">s</text:span> <text:span text:style-name="T11">$* "http://" &lt;$*</text:span> <text:span text:style-name="T11">"/"</text:span></text:p>
      <text:p text:style-name="P1">To accept lists containing the name <text:span text:style-name="T11">[language] </text:span>:</text:p>
      <text:p text:style-name="P1"><text:tab/><text:span text:style-name="T1">s </text:span><text:span text:style-name="T7">=* [language,]</text:span></text:p>
      <text:p text:style-name="P1"><text:span text:style-name="T5">(Note the <text:s/></text:span><text:span text:style-name="T7">,</text:span><text:span text:style-name="T5"> <text:s/>– the search operations use lists, not list elements.)</text:span></text:p>
      <text:h text:style-name="Heading_20_3" text:outline-level="3">Name splitters</text:h>
      <text:p text:style-name="Text_20_body"><text:span text:style-name="T5">Single attribute cliches like <text:s/></text:span><text:span text:style-name="T7">[</text:span><text:span text:style-name="T1">namespace</text:span><text:span text:style-name="T7">|</text:span><text:span text:style-name="T1">namestring</text:span><text:span text:style-name="T7">] <text:s/></text:span><text:span text:style-name="T6">can be split by a pattern like:</text:span></text:p>
      <text:p text:style-name="Text_20_body"><text:span text:style-name="T1"><text:tab/>namespace </text:span><text:span text:style-name="T11">//</text:span><text:span text:style-name="T1"> namestring</text:span></text:p>
      <text:p text:style-name="Text_20_body"><text:span text:style-name="T1">namespace <text:s/></text:span><text:span text:style-name="T12">and </text:span><text:span text:style-name="T2"><text:s/></text:span><text:span text:style-name="T1">namestring <text:s/></text:span><text:span text:style-name="T5">can be any constants, but typically they are strings.</text:span></text:p>
      <text:p text:style-name="P6">This pattern will match a name in the default namespace, binding <text:s/><text:span text:style-name="T11">name</text:span><text:span text:style-name="T12"> <text:s/>to the unsplit name and <text:s/></text:span><text:span text:style-name="T11">namestring <text:s/></text:span><text:span text:style-name="T12">to the namestring..</text:span></text:p>
      <text:p text:style-name="Text_20_body"><text:span text:style-name="T5"><text:tab/></text:span><text:span text:style-name="T7">name = ?:? // namestring</text:span></text:p>
      <text:p text:style-name="P6">Splitting of cliches with more than one leg name is, by design, not supported since the undefined order of the legs would lead to ill-defined semantics.</text:p>
      <text:h text:style-name="Heading_20_3" text:outline-level="3">Aliases</text:h>
      <text:p text:style-name="P2">A pattern like <text:s/><text:span text:style-name="T1">alias = pattern <text:s/></text:span>requires the data to match both <text:span text:style-name="T1">alias </text:span>and <text:span text:style-name="T1">pattern</text:span>. Typically, <text:span text:style-name="T1">alias </text:span>is a variable, used to bind a node or list that is processed further by <text:span text:style-name="T1">pattern</text:span>.</text:p>
      <text:h text:style-name="Heading_20_3" text:outline-level="3">Comparisons</text:h>
      <text:p text:style-name="P1">A value can be required to differ from a constant</text:p>
      <text:p text:style-name="P1"><text:tab/><text:span text:style-name="T1">s </text:span><text:span text:style-name="T7">&lt;&gt;</text:span><text:span text:style-name="T1"> constant</text:span></text:p>
      <text:p text:style-name="P2">or compared against numeric literals:</text:p>
      <text:p text:style-name="P2"><text:tab/><text:span text:style-name="T1">s compare-operator literal<text:line-break/></text:span><text:tab/><text:span text:style-name="T1">literal compare-operator s</text:span></text:p>
      <text:p text:style-name="P2">where <text:span text:style-name="T1">literal </text:span>is a numeric literal and <text:span text:style-name="T1">op </text:span>is one of the operators <text:s/><text:span text:style-name="T11">&lt; &gt; &lt;= &gt;=</text:span></text:p>
      <text:p text:style-name="P2">This pattern accepts an integer in the interval 10 – 20:</text:p>
      <text:p text:style-name="P8"><text:tab/>% x &gt;= 10 &lt;= 20</text:p>
      <text:h text:style-name="Heading_20_3" text:outline-level="3">Extracting the lengths of lists and strings</text:h>
      <text:p text:style-name="P2">To extract the length of a list or string:</text:p>
      <text:p text:style-name="P2"><text:tab/><text:span text:style-name="T1">list </text:span><text:span text:style-name="T11">&amp; </text:span><text:span text:style-name="T1">length</text:span></text:p>
      <text:p text:style-name="P2"><text:tab/><text:span text:style-name="T1">string </text:span><text:span text:style-name="T3">$</text:span><text:span text:style-name="T11"> </text:span><text:span text:style-name="T1">length</text:span></text:p>
      <text:p text:style-name="P2">Lengths can be constrained using conpares. This pattern matches a string of no less than 5, no more than 10 bytes:</text:p>
      <text:p text:style-name="P2"><text:tab/><text:span text:style-name="T1">string </text:span><text:span text:style-name="T11">$ (5 &lt;= </text:span><text:span text:style-name="T1">length </text:span><text:span text:style-name="T11">&lt;= 10)</text:span></text:p>
      <text:h text:style-name="Heading_20_3" text:outline-level="3">List indexers</text:h>
      <text:p text:style-name="P2">Specific list elements can be retrieved, using integer literals as indexes. Positive integers specify elements counting from <text:s/><text:span text:style-name="T11">1</text:span> <text:s/>(as usual), <text:s/><text:span text:style-name="T11">0</text:span> <text:s/>specifies the last element, <text:span text:style-name="T11">-1 <text:s/></text:span>the last but one etc.</text:p>
      <text:p text:style-name="P2">This extracts the 3<text:span text:style-name="T13">rd</text:span> element <text:s/><text:span text:style-name="T11">e</text:span> <text:s/>from a list:</text:p>
      <text:p text:style-name="P2"><text:tab/><text:span text:style-name="T11">(e) 3</text:span></text:p>
      <text:p text:style-name="P2">This accepts a list <text:s/><text:span text:style-name="T11">q</text:span> <text:s/>with identical first and last elements:</text:p>
      <text:p text:style-name="P8"><text:tab/>q = (e) 1 = (e) 0</text:p>
      <text:h text:style-name="Heading_20_3" text:outline-level="3">Partial node specifications and anyway-specifiers</text:h>
      <text:p text:style-name="P1">When specifying unescaped nodes in a pattern, the node name <text:s/><text:span text:style-name="T11">[] <text:s/></text:span>acts as a joker:</text:p>
      <text:p text:style-name="P11"><text:tab/>;x</text:p>
      <text:p text:style-name="P1">matches any node with an <text:s/><text:span text:style-name="T11">x</text:span> <text:s/>leg and no other legs, binding <text:s/><text:span text:style-name="T11">x</text:span> <text:s/>to the leg value.</text:p>
      <text:p text:style-name="P1">To extract the node name:</text:p>
      <text:p text:style-name="P11"><text:tab/>h ;x</text:p>
      <text:p text:style-name="P1">This is as <text:s/><text:span text:style-name="T11">;x <text:s/></text:span>but <text:s/><text:span text:style-name="T11">h</text:span> <text:s/>is bound to the node name.</text:p>
      <text:p text:style-name="P1">Using the node typecheck operator <text:s/><text:span text:style-name="T11">*</text:span> <text:s/>with a node allows nodes with more legs than those specified in the pattern:</text:p>
      <text:p text:style-name="P1"><text:tab/><text:span text:style-name="T11">* point: .x .y</text:span> <text:s text:c="3"/>will accepts nodes like <text:s text:c="2"/><text:span text:style-name="T11">point: .x .y .z</text:span> <text:s text:c="2"/>etc.</text:p>
      <text:p text:style-name="P1">Anyway-specifiers allow nodes with fewer legs to be accepted, specifying constant default values for the missing legs:</text:p>
      <text:p text:style-name="P11"><text:tab/>(<text:span text:style-name="T2">name</text:span>: .<text:span text:style-name="T2">leg</text:span> <text:span text:style-name="T2">...</text:span>) anyway [.<text:span text:style-name="T2">leg</text:span> <text:span text:style-name="T2">...</text:span>]</text:p>
      <text:p text:style-name="P2">This can be combined with the * operator to allow more legs as well:</text:p>
      <text:p text:style-name="P11"><text:tab/>(* <text:span text:style-name="T2">name</text:span>: .<text:span text:style-name="T2">leg</text:span> <text:span text:style-name="T2">...</text:span>) anyway [.<text:span text:style-name="T2">leg</text:span> <text:span text:style-name="T2">...</text:span>]</text:p>
      <text:p text:style-name="P2">When an anyway-specifier is used, the node name <text:s/><text:span text:style-name="T11">[] <text:s/></text:span>is not treated as a joker. If all the specified legs have defaults, the node name itself is acceptable to the pattern as a placeholder for a node with no legs.</text:p>
      <text:p text:style-name="P2">The anyway-specifier is designed to allow default values for named parameters.</text:p>
      <text:h text:style-name="Heading_20_3" text:outline-level="3">Constant replacers</text:h>
      <text:p text:style-name="P1">The constant replacer operations perform simple replacements on data before passing it to the qualified pattern. There are two variations:</text:p>
      <text:p text:style-name="P1"><text:tab/><text:span text:style-name="T1">pattern </text:span><text:span text:style-name="T7">call [.</text:span><text:span text:style-name="T1">key replacement ...</text:span><text:span text:style-name="T7">]</text:span></text:p>
      <text:p text:style-name="P1"><text:span text:style-name="T5">The keys are the only values accepted. The corresponding </text:span><text:span text:style-name="T1">replacement </text:span><text:span text:style-name="T5">is passed to </text:span><text:span text:style-name="T1">pattern</text:span><text:span text:style-name="T5">.</text:span></text:p>
      <text:p text:style-name="P1"><text:span text:style-name="T7"><text:tab/></text:span><text:span text:style-name="T1">pattern </text:span><text:span text:style-name="T7">try [.</text:span><text:span text:style-name="T1">key replacement ...</text:span><text:span text:style-name="T7">]</text:span></text:p>
      <text:p text:style-name="P2">The keys are replaced, <text:s/>other values are allowed and passed unchanged.</text:p>
      <text:p text:style-name="P2">Constant replacers are useful when dealing with enumerations in system interfacing, but they have other uses as well.</text:p>
      <text:h text:style-name="Heading_20_3" text:outline-level="3">System oriented extractors</text:h>
      <text:p text:style-name="Text_20_body">To extract the full paths of files and folders:</text:p>
      <text:p text:style-name="Text_20_body"><text:tab/><text:span text:style-name="T1">file</text:span> <text:span text:style-name="T11">file:</text:span> <text:span text:style-name="T1">filename</text:span></text:p>
      <text:p text:style-name="Text_20_body"><text:tab/><text:span text:style-name="T1">folder</text:span> <text:span text:style-name="T11">folder:</text:span> <text:span text:style-name="T1">path</text:span></text:p>
      <text:p text:style-name="Text_20_body">To extract PILS extenders of system objects:</text:p>
      <text:p text:style-name="Text_20_body"><text:tab/><text:span text:style-name="T1">systemobjekt</text:span> <text:span text:style-name="T11">når:</text:span> <text:span text:style-name="T1">pils-extender</text:span></text:p>
      <text:h text:style-name="Heading_20_3" text:outline-level="3">On the implementation of patterns</text:h>
      <text:p text:style-name="Text_20_body">While PILS is generally an interpreted language, patterns are compiled into an intermediate form called <text:span text:style-name="T1">quicksteps</text:span>, which are substantially faster than the interpreted structures. During a match, quicksteps never perform reference counting or create objects, or use the context. When a match has succeeded, bindings are created and reference counters updated.</text:p>
      <text:p text:style-name="Text_20_body">Compilation is a fast process that happens automatically whenever rulesets are read by the parser or generated by PILS code.</text:p>
      <text:p text:style-name="Text_20_body">To speed up rule search, the rules of a ruleset are indexed when possible. For a pattern to be indexable, the top level must be a directly specified list, a node with fully specified head and leg names, or a cliche, string or number.</text:p>
      <text:p text:style-name="Text_20_body">Aliases do not affect indexing, so rules like <text:s/><text:span text:style-name="T11">{ </text:span><text:span text:style-name="T2">alias</text:span><text:span text:style-name="T3"> = </text:span><text:span text:style-name="T2">indexable-pattern</text:span><text:span text:style-name="T11"> | </text:span><text:span text:style-name="T1">... </text:span><text:span text:style-name="T11">} </text:span><text:span text:style-name="T12">are indexed as well.</text:span></text:p>
      <text:p text:style-name="Text_20_body">Assignment rules are indexed by the left side of the assignment, and kept separate from normal rules.</text:p>
      <text:p text:style-name="Text_20_body">Indexing is transparent to the programmer, except for the performance implications. When constructing large rulesets, such as state machines for parsers, the rules should be constructed as indexable whenever possible, and non-indexable rules should be lumped together, preferably near the top of the ruleset.</text:p>
      <text:h text:style-name="Heading_20_2" text:outline-level="2">Rule actions</text:h>
      <text:p text:style-name="P2">When a rule action is entered, the rule call is <text:span text:style-name="T1">unresponded</text:span>: it has not been decided whether the rule will succeed or fail. The responders and binders described below are valid in unresponded rule calls only; in a responded rule call, they will fail.</text:p>
      <text:h text:style-name="Heading_20_3" text:outline-level="3">Responders</text:h>
      <text:p text:style-name="P2">PILS has four responders:</text:p>
      <text:p text:style-name="Text_20_body"><text:span text:style-name="T6"><text:tab/></text:span><text:span text:style-name="T7">:ok </text:span><text:span text:style-name="T2">tail<text:line-break/><text:tab/></text:span><text:span text:style-name="T7">:try </text:span><text:span text:style-name="T2">tail<text:line-break/><text:tab/></text:span><text:span text:style-name="T7">:need </text:span><text:span text:style-name="T2">expression <text:s text:c="3"/></text:span><text:span text:style-name="T6">(often written as <text:s/></text:span><text:span text:style-name="T2">expression </text:span><text:span text:style-name="T7">.:need</text:span><text:span text:style-name="T2"> </text:span><text:span text:style-name="T6">) </text:span><text:span text:style-name="T2"><text:line-break/><text:tab/></text:span><text:span text:style-name="T7">:do </text:span><text:span text:style-name="T2">tail<text:line-break/><text:tab/></text:span><text:span text:style-name="T7">:error </text:span><text:span text:style-name="T2">expression</text:span></text:p>
      <text:p text:style-name="Text_20_body"><text:span text:style-name="T12">The lexical scoping of responders and their use for individual operations rather than statement blocks allow a more fine-grained error handling than the </text:span><text:span text:style-name="T2">try-catch</text:span><text:span text:style-name="T12"> <text:s/>approach used in mainstream languages.</text:span></text:p>
      <text:p text:style-name="Text_20_body"><text:span text:style-name="T12">The</text:span> <text:s/><text:span text:style-name="T11">:ok</text:span> <text:s/><text:span text:style-name="T12">responder is the preferred way of getting a result form a rule. The responder takes responsibility for the call and returns the evaluated <text:s/></text:span><text:span text:style-name="T2">expression </text:span><text:span text:style-name="T6">which should not contain further responders for the call.</text:span></text:p>
      <text:p text:style-name="Text_20_body"><text:span text:style-name="T6">This is similar to the </text:span><text:span text:style-name="T2">return statement </text:span><text:span text:style-name="T6">of C and its derivatives, with tail flattening granted.</text:span></text:p>
      <text:p text:style-name="Text_20_body"><text:span text:style-name="T3">Implementation note:</text:span><text:span text:style-name="T2"> Whenever the</text:span><text:span text:style-name="T6"> <text:s/></text:span><text:span text:style-name="T7">:ok</text:span><text:span text:style-name="T6"> <text:s/></text:span><text:span text:style-name="T2">responder is the first and only rule action, with nothing but binders before it, it is compiled and the stack setup required for responders is eliminated. If the following expression is a constant, a parameter value or a simple node or list construction based only on constants and parameter values, the rule will be fully compiled.</text:span></text:p>
      <text:p text:style-name="Text_20_body"><text:span text:style-name="T6">The</text:span><text:span text:style-name="T7"> <text:s/>:try <text:s/></text:span><text:span text:style-name="T6">responder</text:span><text:span text:style-name="T7"> </text:span><text:span text:style-name="T6">tries to pass the responsibility to </text:span><text:span text:style-name="T2">tail</text:span><text:span text:style-name="T6">,</text:span><text:span text:style-name="T2"> </text:span><text:span text:style-name="T6">without taking responsibility by itself. If the top level construct of <text:s/></text:span><text:span text:style-name="T2">tail</text:span><text:span text:style-name="T6"> <text:s/>succeeds or fails, the same happens to the original call, with tail flattening all the way. If the <text:s/></text:span><text:span text:style-name="T7">:try</text:span><text:span text:style-name="T6"> <text:s/>falls through, an empty list is returned. The rule will then miss, unless another responder is used.</text:span></text:p>
      <text:p text:style-name="Text_20_body"><text:span text:style-name="T6">Unlike the </text:span><text:span text:style-name="T2">try </text:span><text:span text:style-name="T6">statement of C++ and derivatives, the <text:s/></text:span><text:span text:style-name="T7">:try <text:s/></text:span><text:span text:style-name="T6">responder does not cover subexpressions that might fail or miss.</text:span></text:p>
      <text:p text:style-name="Text_20_body"><text:span text:style-name="T6">The <text:s/></text:span><text:span text:style-name="T7">:need <text:s/></text:span><text:span text:style-name="T6">responder is used for partial results that are required but not sufficient for the rule to succeed.</text:span></text:p>
      <text:p text:style-name="Text_20_body"><text:span text:style-name="T6">Failure will be forwarded to the original call, whereas success will be returned as result of the <text:s/></text:span><text:span text:style-name="T7">:need <text:s/></text:span><text:span text:style-name="T6">statement. Fall-throughs will make the innermost <text:s/></text:span><text:span text:style-name="T7">:try</text:span><text:span text:style-name="T6"> <text:s/>for the same rule miss. If no <text:s/></text:span><text:span text:style-name="T7">:try</text:span><text:span text:style-name="T6"> <text:s/>is active, the rule will miss.</text:span></text:p>
      <text:p text:style-name="Text_20_body"><text:span text:style-name="T6">If a needed <text:s/></text:span><text:span text:style-name="T2">expression </text:span><text:span text:style-name="T6">has subexpressions susceptible of failure, nested <text:s/></text:span><text:span text:style-name="T7">:need <text:s/></text:span><text:span text:style-name="T6">responders can be used to cover these. The inversion form <text:s/></text:span><text:span text:style-name="T2">expression</text:span><text:span text:style-name="T3"> </text:span><text:span text:style-name="T7">.:need <text:s/></text:span><text:span text:style-name="T6">is convenient for this use. </text:span></text:p>
      <text:p text:style-name="Text_20_body"><text:span text:style-name="T6">The <text:s/></text:span><text:span text:style-name="T7">:possibly</text:span><text:span text:style-name="T6"> <text:s/>responder returns the evaluated <text:s/></text:span><text:span text:style-name="T2">expression</text:span><text:span text:style-name="T6">, but in contrast to the <text:s/></text:span><text:span text:style-name="T7">:ok <text:s/></text:span><text:span text:style-name="T6">responder, <text:s/>embedded responders are allowed, especially the <text:s/></text:span><text:span text:style-name="T7">:need</text:span><text:span text:style-name="T6"> <text:s/>responder which as the same effect as when used inside a </text:span><text:span text:style-name="T7">:try</text:span><text:span text:style-name="T6"> responder.</text:span></text:p>
      <text:p text:style-name="Text_20_body"><text:span text:style-name="T6">The <text:s/></text:span><text:span text:style-name="T7">:error <text:s/></text:span><text:span text:style-name="T6">responder throws an error directly to the original call.</text:span></text:p>
      <text:h text:style-name="Heading_20_3" text:outline-level="3">Binders</text:h>
      <text:p text:style-name="Text_20_body">These <text:span text:style-name="T5">binder statements</text:span>:</text:p>
      <text:p text:style-name="Text_20_body"><text:span text:style-name="T1"><text:tab/></text:span><text:span text:style-name="T7">:self</text:span><text:span text:style-name="T1"> tail<text:line-break/></text:span><text:tab/><text:span text:style-name="T11">:who</text:span> <text:span text:style-name="T1">tail<text:line-break/><text:tab/></text:span><text:span text:style-name="T7">:where</text:span><text:span text:style-name="T1"> tail<text:line-break/><text:tab/></text:span><text:span text:style-name="T7">:what</text:span><text:span text:style-name="T1"> tail</text:span></text:p>
      <text:p text:style-name="P6">bind their names to data circumstantial to the call, as follows.</text:p>
      <text:p text:style-name="Text_20_body"><text:span text:style-name="T7">self <text:s/></text:span><text:span text:style-name="T6">is bound to the bound ruleset.</text:span></text:p>
      <text:p text:style-name="Text_20_body"><text:span text:style-name="T7">who</text:span><text:span text:style-name="T6"> <text:s/>is bound to the object being called, possibly an aggregate containing the bound ruleset. For object calls on a bound ruleset that is not aggregated, <text:s/></text:span><text:span text:style-name="T7">who <text:s/></text:span><text:span text:style-name="T6">is the same as <text:s/></text:span><text:span text:style-name="T7">self </text:span><text:span text:style-name="T6">.</text:span></text:p>
      <text:p text:style-name="Text_20_body"><text:span text:style-name="T6">For simple calls that do not specify an object, <text:s/></text:span><text:span text:style-name="T7">who <text:s/></text:span><text:span text:style-name="T6">is the context in which the call was made, i.e. </text:span><text:span text:style-name="T6">the same as <text:s/></text:span><text:span text:style-name="T7">where .</text:span></text:p>
      <text:p text:style-name="Text_20_body"><text:span text:style-name="T7">where <text:s/></text:span><text:span text:style-name="T6">is bound to the context in which the call was made.</text:span></text:p>
      <text:p text:style-name="Text_20_body"><text:span text:style-name="T7">what <text:s/></text:span><text:span text:style-name="T6">is bound to the call node that initiated the call.</text:span></text:p>
      <text:p text:style-name="Text_20_body"><text:span text:style-name="T6">The <text:s/></text:span><text:span text:style-name="T7">self <text:s/></text:span><text:span text:style-name="T6">and <text:s/></text:span><text:span text:style-name="T7">who <text:s/></text:span><text:span text:style-name="T6">binders are typically used when an object needs to use its own methods. Using the <text:s/></text:span><text:span text:style-name="T7">who</text:span><text:span text:style-name="T6"> <text:s/>binder is similar to </text:span><text:span text:style-name="T2">virtual calls</text:span><text:span text:style-name="T6"> of OO languages.</text:span></text:p>
      <text:p text:style-name="Text_20_body"><text:span text:style-name="T6">The <text:s/></text:span><text:span text:style-name="T7">where <text:s/></text:span><text:span text:style-name="T6">and <text:s/></text:span><text:span text:style-name="T7">what <text:s/></text:span><text:span text:style-name="T6">binders are used by the bug pinner to locate failing calls. When a call is forwarded by the <text:s/></text:span><text:span text:style-name="T7">:try</text:span><text:span text:style-name="T6"> <text:s/>or <text:s/></text:span><text:span text:style-name="T7">:need</text:span><text:span text:style-name="T6"> <text:s/>responder, binders in the forwarded call will behave as follows:</text:span></text:p>
      <text:p text:style-name="Text_20_body"><text:span text:style-name="T6"><text:tab/></text:span><text:span text:style-name="T7">:where</text:span><text:span text:style-name="T6"> <text:s/>and <text:s/></text:span><text:span text:style-name="T7">:what <text:s/></text:span><text:span text:style-name="T6">refer to the original call.</text:span></text:p>
      <text:p text:style-name="Text_20_body"><text:span text:style-name="T6"><text:tab/></text:span><text:span text:style-name="T7">:self </text:span><text:span text:style-name="T6"><text:s/>and <text:s/></text:span><text:span text:style-name="T7">:who <text:s/></text:span><text:span text:style-name="T6">refer to the forwarded call.</text:span></text:p>
      <text:h text:style-name="Heading_20_3" text:outline-level="3">Tags</text:h>
      <text:p text:style-name="P2">The binders and responders exist in tagged versions, for use within embedded rules.</text:p>
      <text:p text:style-name="P6">The tagged binders</text:p>
      <text:p text:style-name="Text_20_body"><text:tab/><text:span text:style-name="T11">:</text:span><text:span text:style-name="T7">self [</text:span><text:span text:style-name="T2">tag</text:span><text:span text:style-name="T7">];</text:span><text:span text:style-name="T3"> </text:span><text:span text:style-name="T2">tail</text:span><text:span text:style-name="T6"><text:line-break/></text:span><text:span text:style-name="T2"><text:tab/></text:span><text:span text:style-name="T6">:</text:span><text:span text:style-name="T11">who [</text:span><text:span text:style-name="T2">tag</text:span><text:span text:style-name="T11">];</text:span> <text:span text:style-name="T1">tail<text:line-break/><text:tab/></text:span><text:span text:style-name="T7">:where [</text:span><text:span text:style-name="T2">tag</text:span><text:span text:style-name="T7">];</text:span><text:span text:style-name="T1"> tail<text:line-break/><text:tab/></text:span><text:span text:style-name="T7">:what [</text:span><text:span text:style-name="T2">tag</text:span><text:span text:style-name="T7">];</text:span><text:span text:style-name="T1"> tail</text:span></text:p>
      <text:p text:style-name="P6"><text:span text:style-name="T12">bind <text:s/></text:span><text:span text:style-name="T2">name </text:span><text:span text:style-name="T11">[</text:span><text:span text:style-name="T2">tag</text:span><text:span text:style-name="T11">]</text:span><text:span text:style-name="T2"> <text:s/></text:span><text:span text:style-name="T12">instead of </text:span><text:span text:style-name="T2">name</text:span><text:span text:style-name="T12">.</text:span></text:p>
      <text:p text:style-name="P2">The tagged responders</text:p>
      <text:p text:style-name="Text_20_body"><text:span text:style-name="T6"><text:tab/></text:span><text:span text:style-name="T7">:ok [</text:span><text:span text:style-name="T2">tag</text:span><text:span text:style-name="T7">]; </text:span><text:span text:style-name="T2">tail<text:line-break/><text:tab/></text:span><text:span text:style-name="T7">:try [</text:span><text:span text:style-name="T2">tag</text:span><text:span text:style-name="T7">]; </text:span><text:span text:style-name="T2">tail<text:line-break/><text:tab/></text:span><text:span text:style-name="T7">:need [</text:span><text:span text:style-name="T2">tag</text:span><text:span text:style-name="T7">]; </text:span><text:span text:style-name="T2">expression</text:span><text:span text:style-name="T6"> </text:span><text:span text:style-name="T2"><text:line-break/><text:tab/></text:span><text:span text:style-name="T7">:error [</text:span><text:span text:style-name="T2">tag</text:span><text:span text:style-name="T7">]; </text:span><text:span text:style-name="T2">expression</text:span></text:p>
      <text:p text:style-name="P6"><text:span text:style-name="T12">are used with the </text:span><text:span text:style-name="T2">tagger</text:span><text:span text:style-name="T12">:</text:span></text:p>
      <text:p text:style-name="P6"><text:span text:style-name="T12"><text:tab/></text:span><text:span text:style-name="T11">:tag [</text:span><text:span text:style-name="T2">tag</text:span><text:span text:style-name="T11">]; </text:span><text:span text:style-name="T2">tail</text:span></text:p>
      <text:p text:style-name="P2">allowing an inner rule to act on behalf of an encompassing rule.</text:p>
      <text:p text:style-name="P6"><text:span text:style-name="T12"><text:tab/></text:span><text:span text:style-name="T11">{ </text:span><text:span text:style-name="T2">...</text:span><text:span text:style-name="T11"><text:line-break/><text:tab/>| </text:span><text:span text:style-name="T2">... </text:span><text:span text:style-name="T11">:tag [</text:span><text:span text:style-name="T2">tag</text:span><text:span text:style-name="T11">]; ...<text:line-break/><text:tab/> <text:s/></text:span><text:span text:style-name="T2">...</text:span><text:span text:style-name="T11"> { </text:span><text:span text:style-name="T2">...</text:span><text:span text:style-name="T11"> | </text:span><text:span text:style-name="T2">... </text:span><text:span text:style-name="T11">:ok [</text:span><text:span text:style-name="T2">tag</text:span><text:span text:style-name="T11">];</text:span><text:span text:style-name="T2"> <text:s/>... </text:span><text:span text:style-name="T11">}<text:line-break/><text:tab/>}</text:span></text:p>
      <text:p text:style-name="P2">Generally, tagged responders are rarely used, though the PILS programming system uses them to deal with syntax errors in modules.</text:p>
      <text:h text:style-name="Heading_20_2" text:outline-level="2">Pinning bugs with responders</text:h>
      <text:p text:style-name="P2">The explicit managing of the responsibility of calls helps in locating bugs. A major problem of weakly typed languages will surface in situations as shown by the following simplistic example:</text:p>
      <text:p text:style-name="P2"><text:tab/> <text:span text:style-name="T1">! Anna's application tries to double a number using Benny's doubler library<text:line-break/></text:span><text:tab/><text:span text:style-name="T11">double "MMVII"</text:span><text:line-break/><text:tab/><text:span text:style-name="T11">===<text:line-break/></text:span><text:span text:style-name="T11"><text:tab/></text:span><text:span text:style-name="T1">! Bennys library uses Barry's library<text:line-break/></text:span><text:tab/><text:span text:style-name="T11">{ double: x | :ok multiply (x <text:s/>.by 2) }</text:span><text:span text:style-name="T1"><text:line-break/></text:span><text:tab/><text:span text:style-name="T11">===<text:line-break/></text:span><text:tab/> <text:span text:style-name="T1">! Barry's library routine expects numbers<text:line-break/></text:span><text:tab/><text:span text:style-name="T11">{ multiply: x .by | :ok x * by }</text:span></text:p>
      <text:p text:style-name="P2">When Anna executes her application, the operation <text:s/><text:span text:style-name="T11">x * by <text:s/></text:span><text:s/>in Barry's library will fail, leaving Anna mystified, not knowing how Barry's code got involved in her application.</text:p>
      <text:p text:style-name="P2">The situation is as illustrated by this nursery rhyme (by Halfdan Rasmussen, translation suggested by Ian Noble in a usenet discussion):</text:p>
      <text:p text:style-name="P13"><text:tab/>Benny's breeks were burning.<text:line-break/><text:tab/>Barry roared anon.<text:line-break/><text:tab/>Barry having, namely,<text:line-break/><text:tab/>Benny's britches on.</text:p>
      <text:p text:style-name="P2">This is a general problem with weakly typed programming languages – when the behaviour of the data is not defined by an explicit contract, programmers have to resort to stack dumps, single stepping, or test logs to find the real cause of such failures. In PILS however, a sensible use of responders can help pinning a bug in one swift move.</text:p>
      <text:p text:style-name="P2">Using the <text:s/><text:span text:style-name="T11">:try</text:span> <text:s/>or <text:s/><text:span text:style-name="T11">:need</text:span> <text:s/>responder, PILS allows the library routine to perform specific operations on behalf of its caller, so when things go wrong, the caller is blamed.</text:p>
      <text:p text:style-name="P2">In the above example, Barry should revamp his library to use a more pessimist approach that doesn't trust the arguments. Anna will now have this setup:</text:p>
      <text:p text:style-name="P2"><text:tab/><text:span text:style-name="T11">double "MMVII" </text:span><text:s/><text:span text:style-name="T1">! Anna's application</text:span><text:line-break/><text:tab/><text:span text:style-name="T11">===<text:line-break/></text:span><text:tab/><text:span text:style-name="T11">{ double: x | :ok multiply (x .by 2) } </text:span><text:span text:style-name="T1">! Benny's library<text:line-break/></text:span><text:tab/><text:span text:style-name="T11">===<text:line-break/></text:span><text:tab/><text:span text:style-name="T11">{ multiply: x .by | :try x * by }</text:span> <text:span text:style-name="T1">! Barry's revised library</text:span></text:p>
      <text:p text:style-name="P2">Now, the <text:s/><text:span text:style-name="T11">multiply (x .by 2) <text:s/></text:span>operation in Benny's library gets the blame. Benny might revise his library, so Anna gets this setup:</text:p>
      <text:p text:style-name="P2"><text:tab/><text:span text:style-name="T11">double "MMVII" </text:span><text:s/><text:span text:style-name="T1">! Anna's application</text:span><text:line-break/><text:tab/><text:span text:style-name="T11">===<text:line-break/></text:span><text:tab/><text:span text:style-name="T11">{ double: x | :try multiply (x .by 2) } </text:span><text:span text:style-name="T1">! Benny's revised library<text:line-break/></text:span><text:tab/><text:span text:style-name="T11">===<text:line-break/></text:span><text:tab/><text:span text:style-name="T11">{ multiply: x .by | :try x * by }</text:span> <text:span text:style-name="T1">! Barry's revised library</text:span></text:p>
      <text:p text:style-name="Text_20_body"><text:span text:style-name="T6">And the failure is now immediately blamed on the <text:s/></text:span><text:span text:style-name="T7">double "MMVII"</text:span><text:span text:style-name="T6"> <text:s/>call – pointing right to the smoking match in Anna's hand. Mystery solved.</text:span></text:p>
      <text:p text:style-name="P2">The above example only serves as a simple illustration of the concept; such simple calculations would really be better served by typechecks in the pattern. However, in cases where the arguments are objects supposed to implement certain methods, type checks are of little help, PILS not having classes or interfaces to test against. Instead, the methods can be called without taking responsibility, so that the caller that supplied the arguments gets the blame when needed methods are not supported by the arguments.</text:p>
      <text:p text:style-name="P2">PILS is crafted to support this technique without the code bloat that would result if individual operations had to be dealt with by traditional try-catch blocks.</text:p>
      <text:h text:style-name="Heading_20_1" text:outline-level="1">System-oriented features</text:h>
      <text:h text:style-name="Heading_20_2" text:outline-level="2">Supplementary constant types</text:h>
      <text:p text:style-name="Text_20_body">The PILS kernel supports extending the data model with constant types, by means of registering parser plugins and methods.</text:p>
      <text:p text:style-name="Text_20_body">When the parser encounters a starting brace <text:s/><text:span text:style-name="T11">{ <text:s/></text:span><text:span text:style-name="T6">a lookahead is performed, keeping trace of strings and nested parentheses. If a closing brace <text:s/></text:span><text:span text:style-name="T7">} <text:s/></text:span><text:span text:style-name="T6">is encountered with no unnested rule bar <text:s/></text:span><text:span text:style-name="T7">|</text:span><text:span text:style-name="T6"> <text:s/>in between, the parser plugins get a try at parsing the enclosed characters.</text:span></text:p>
      <text:p text:style-name="P2">The supplementary types are provided by the framework bindings and may vary between frameworks.</text:p>
      <text:h text:style-name="Heading_20_2" text:outline-level="2">States in a changing world</text:h>
      <text:p text:style-name="P1">So far, all data PILS structures presented are stateless and immutable. T<text:span text:style-name="T5">o accommodate the needs of interacting with a changing world, a few state-bearing objects have been introduced into PILS. They have been crafted so as to minimize the risk of creating memory and resource leaks by circular structures.</text:span></text:p>
      <text:h text:style-name="Heading_20_3" text:outline-level="3">Channels, listeners and plugs</text:h>
      <text:p text:style-name="Text_20_body">Let <text:span text:style-name="T1">channel </text:span><text:span text:style-name="T5">be a n</text:span>ode constants of the form</text:p>
      <text:p text:style-name="Text_20_body"><text:span text:style-name="T11"><text:tab/>[channel</text:span>: <text:span text:style-name="T1">key</text:span><text:span text:style-name="T7">]</text:span></text:p>
      <text:p text:style-name="P1"><text:span text:style-name="T5">where </text:span><text:span text:style-name="T1">key </text:span><text:span text:style-name="T5">can be any constant. The operation</text:span></text:p>
      <text:p text:style-name="P1"><text:span text:style-name="T5"><text:tab/></text:span><text:span text:style-name="T1">channel </text:span><text:span text:style-name="T7">listen </text:span><text:span text:style-name="T1">(listener)</text:span></text:p>
      <text:p text:style-name="P2">creates an opaque <text:span text:style-name="T1">plug</text:span>, which for its life time plugs <text:span text:style-name="T1">listener</text:span> into <text:span text:style-name="T1">channel</text:span>.<text:span text:style-name="T1"> </text:span>The only way to unplug it is to trash the plug by loosing all references to it.</text:p>
      <text:p text:style-name="P1"><text:span text:style-name="T5">When a call is made to </text:span><text:span text:style-name="T1">channel, </text:span><text:span text:style-name="T5">it gets forwarded to its listeners in turn, the youngest listeners first, until one of them responds, as if the listeners had been aggregated with the <text:s/></text:span><text:span text:style-name="T7">+++ <text:s/></text:span><text:span text:style-name="T5">operator, except that the <text:s/></text:span><text:span text:style-name="T7">:who <text:s/></text:span><text:span text:style-name="T5">binder will bind to the plug.</text:span></text:p>
      <text:p text:style-name="P1"><text:span text:style-name="T5">As all constants, channels are unique. If an expression like <text:s/></text:span><text:span text:style-name="T7">(channel:</text:span><text:span text:style-name="T5"> </text:span><text:span text:style-name="T1">filename</text:span><text:span text:style-name="T7">) <text:s/></text:span><text:span text:style-name="T5">is performed several times for the same file name, the channel will be reused. The PILS programming system </text:span><text:span text:style-name="T5">uses such channels to keep file windows and module editors unique.</text:span></text:p>
      <text:p text:style-name="P2">Channels are thread safe.</text:p>
      <text:h text:style-name="Heading_20_3" text:outline-level="3">Alien controlled minds</text:h>
      <text:p text:style-name="Text_20_body">When PILS is used with a windowing framework, the life span of windows are generally controlled by the user or the framework, not by PILS. Such externally controlled objects are said to be <text:span text:style-name="T1">aliens</text:span><text:span text:style-name="T5">. PILS creates special wrappers for them and treats them as constants, with methods and event handling defined by the framework bindings.</text:span></text:p>
      <text:p text:style-name="Text_20_body">Aliens can have PILS objects attached to them in possibly circular ways.</text:p>
      <text:p text:style-name="Text_20_body">PILS uses the event handling mechanism of the framework to track the destruction of aliens. When an alien is destroyed, PILS blinds its wrapper and releases any associated data.</text:p>
      <text:p text:style-name="Text_20_body">To associate data with an alien and retrieve it:</text:p>
      <text:p text:style-name="Text_20_body"><text:tab/><text:span text:style-name="T1">alien </text:span><text:span text:style-name="T11">mind .</text:span> <text:span text:style-name="T1">key </text:span><text:span text:style-name="T7">:=</text:span><text:span text:style-name="T1"> value</text:span><text:span text:style-name="T7">;<text:line-break/></text:span><text:tab/><text:span text:style-name="T1">...<text:line-break/><text:tab/>alien </text:span><text:span text:style-name="T11">mind .</text:span> <text:span text:style-name="T1">key</text:span></text:p>
      <text:p text:style-name="Text_20_body">Values can be overwritten but keys cannot be deleted. There is no way to get at the values without knowing their keys.</text:p>
      <text:h text:style-name="Heading_20_3" text:outline-level="3">Straps</text:h>
      <text:p text:style-name="Text_20_body">Nodes of form <text:s/><text:span text:style-name="T11">[strap: </text:span><text:span text:style-name="T2">key</text:span><text:span text:style-name="T11">] <text:s/></text:span><text:span text:style-name="T12">are similar to channels, but can only have a single listener, and only when strapped to one or more aliens. Once these aliens perish, the strap looses its mind.</text:span></text:p>
      <text:p text:style-name="P1">Straps are used by the programming system for program straps which are strapped to all windows of a particular program. When all windows of a program are destroyed, the program strap looses its mind and resources are freed.</text:p>
      <text:p text:style-name="P1">During startup of programs, their straps are temporarily strapped to the universal key.</text:p>
      <text:h text:style-name="Heading_20_2" text:outline-level="2">Simple file access</text:h>
      <text:p text:style-name="Text_20_body">PILS standard file and folder objects allow simple operations on files and file systems.</text:p>
      <text:p text:style-name="Text_20_body">A folder is the same as a directory.</text:p>
      <text:p text:style-name="Text_20_body">Reading and writing of files is only supported on whole files. File and folder objects are really name wrappers with allowance to use the file system; PILS has no concept of open files.</text:p>
      <text:p text:style-name="Text_20_body">File and folder names have full paths, using <text:s/><text:span text:style-name="T11">/</text:span> <text:s/>as directory separator on all systems, including MS Windows. The MS Windows style separator <text:s/><text:span text:style-name="T11">\</text:span> <text:s text:c="2"/>is not used in PILS filenames.</text:p>
      <text:p text:style-name="Text_20_body">Folder names always end with <text:s/><text:span text:style-name="T11">/</text:span> .</text:p>
      <text:p text:style-name="Text_20_body">The <text:s/><text:span text:style-name="T11">file <text:s/></text:span>and <text:s/><text:span text:style-name="T11">folder <text:s/></text:span><text:span text:style-name="T12">functions are methods of the universal key and do not work without it. By hiding the universal key, sandboxes can be constructed, allowing foreign scripts to execute with restricted file system access.</text:span></text:p>
      <text:h text:style-name="Heading_20_3" text:outline-level="3">File objects</text:h>
      <text:p text:style-name="Text_20_body"><text:span text:style-name="T12"><text:tab/></text:span><text:span text:style-name="T11">file (</text:span><text:span text:style-name="T2">filename</text:span><text:span text:style-name="T11">)<text:line-break/></text:span><text:span text:style-name="T12"><text:tab/></text:span><text:span text:style-name="T11">file (</text:span><text:span text:style-name="T2">filename</text:span><text:span text:style-name="T11">)</text:span></text:p>
      <text:p text:style-name="P1">creates a filename wrapper object – <text:s/><text:span text:style-name="T11">file</text:span> <text:s/>is the built-in function, <text:s/><text:span text:style-name="T11">datafile</text:span> <text:s/>is a wrapper for use with data dependent modules.</text:p>
      <text:p text:style-name="P1">To retrieve the filename:</text:p>
      <text:p text:style-name="Text_20_body"><text:span text:style-name="T12"><text:tab/></text:span><text:span text:style-name="T2">file </text:span><text:span text:style-name="T7">name</text:span></text:p>
      <text:p text:style-name="P1">To read and write its contents in one go:</text:p>
      <text:p text:style-name="Text_20_body"><text:span text:style-name="T12"><text:tab/></text:span><text:span text:style-name="T2">file</text:span><text:span text:style-name="T11"> text</text:span><text:span text:style-name="T2"><text:line-break/><text:tab/>file </text:span><text:span text:style-name="T11">text := </text:span><text:span text:style-name="T2">text</text:span></text:p>
      <text:p text:style-name="P1">Reading and writing is done with raw bytes – encoding konversions are handled as separate operations:</text:p>
      <text:p text:style-name="P1"><text:span text:style-name="T1"><text:tab/>fil </text:span><text:span text:style-name="T7">text</text:span><text:span text:style-name="T5"> </text:span><text:span text:style-name="T7">bytes utf-8</text:span></text:p>
      <text:p text:style-name="P2">reads an ANSI encoded file and converts it to a utf-8 encoded string.</text:p>
      <text:p text:style-name="P1"><text:span text:style-name="T3"><text:tab/></text:span><text:span text:style-name="T1">fil </text:span><text:span text:style-name="T11">text :=</text:span> <text:span text:style-name="T1">text </text:span><text:span text:style-name="T7">utf-8 bytes</text:span></text:p>
      <text:p text:style-name="P2">writes a utf-8 encoded string to an ANSI encoded file.</text:p>
      <text:p text:style-name="P1">To manipulate files:</text:p>
      <text:p text:style-name="Text_20_body"><text:span text:style-name="T12"><text:tab/></text:span><text:span text:style-name="T7">file (</text:span><text:span text:style-name="T2">filename</text:span><text:span text:style-name="T7">) copy (</text:span><text:span text:style-name="T2">newname</text:span><text:span text:style-name="T11">)<text:line-break/></text:span><text:span text:style-name="T12"><text:tab/></text:span><text:span text:style-name="T7">file (</text:span><text:span text:style-name="T2">filename</text:span><text:span text:style-name="T7">)</text:span><text:span text:style-name="T2"> </text:span><text:span text:style-name="T7">move (</text:span><text:span text:style-name="T2">newname</text:span><text:span text:style-name="T11">)<text:line-break/></text:span><text:span text:style-name="T12"><text:tab/></text:span><text:span text:style-name="T7">file (</text:span><text:span text:style-name="T2">filename</text:span><text:span text:style-name="T7">)</text:span><text:span text:style-name="T3"> </text:span><text:span text:style-name="T7">delete</text:span></text:p>
      <text:p text:style-name="Text_20_body"><text:span text:style-name="T12">These do the obvious thing – </text:span><text:span text:style-name="T2">newname </text:span><text:span text:style-name="T6">is a string; the result of </text:span><text:span text:style-name="T7">copy</text:span><text:span text:style-name="T6"> <text:s/>and <text:s/></text:span><text:span text:style-name="T7">move</text:span><text:span text:style-name="T6"> <text:s/>is a filename wrapper for </text:span><text:span text:style-name="T2">newname.</text:span></text:p>
      <text:p text:style-name="P2">To test the existence of a file:</text:p>
      <text:p text:style-name="Text_20_body"><text:span text:style-name="T12"><text:tab/></text:span><text:span text:style-name="T2">file</text:span><text:span text:style-name="T3"> </text:span><text:span text:style-name="T7">ok</text:span></text:p>
      <text:p text:style-name="Text_20_body"><text:span text:style-name="T5">misses if the file does not exist, else </text:span><text:span text:style-name="T1">file</text:span><text:span text:style-name="T5"> is returned.</text:span></text:p>
      <text:p text:style-name="Text_20_body"><text:span text:style-name="T12"><text:tab/></text:span><text:span text:style-name="T2">file</text:span><text:span text:style-name="T3"> </text:span><text:span text:style-name="T7">writable <text:s text:c="3"/></text:span><text:span text:style-name="T6">returns <text:s/></text:span><text:span text:style-name="T7">1</text:span><text:span text:style-name="T6"> <text:s/>if writing is possible and permitted, <text:s/></text:span><text:span text:style-name="T7">0</text:span><text:span text:style-name="T6"> <text:s/>if not.</text:span><text:span text:style-name="T7"><text:line-break/></text:span><text:span text:style-name="T12"><text:tab/></text:span><text:span text:style-name="T2">file</text:span><text:span text:style-name="T3"> </text:span><text:span text:style-name="T7">readable <text:s text:c="3"/></text:span><text:span text:style-name="T6">same for reading</text:span></text:p>
      <text:p text:style-name="Text_20_body"><text:span text:style-name="T12"><text:tab/></text:span><text:span text:style-name="T2">file</text:span><text:span text:style-name="T3"> </text:span><text:span text:style-name="T7">count <text:s text:c="3"/></text:span><text:span text:style-name="T6">returns the file size in bytes</text:span></text:p>
      <text:p text:style-name="Text_20_body"><text:span text:style-name="T12"><text:tab/></text:span><text:span text:style-name="T2">file</text:span><text:span text:style-name="T3"> </text:span><text:span text:style-name="T7">timestamp <text:s text:c="3"/></text:span><text:span text:style-name="T6">reads the last-modified timestamp of the file</text:span><text:span text:style-name="T7"><text:line-break/></text:span><text:span text:style-name="T12"><text:tab/></text:span><text:span text:style-name="T2">file</text:span><text:span text:style-name="T3"> </text:span><text:span text:style-name="T7">timestamp (</text:span><text:span text:style-name="T2">time</text:span><text:span text:style-name="T7">) <text:s text:c="2"/></text:span><text:span text:style-name="T6">sets the last-modified timestamp</text:span></text:p>
      <text:p text:style-name="P2">There are no methods for extracting parts of the name; this is easily accomplished with the standard PILS string operators:</text:p>
      <text:p text:style-name="Text_20_body"><text:span text:style-name="T6"><text:tab/></text:span><text:span text:style-name="T2">fn</text:span><text:span text:style-name="T7"> &lt;-#-* "/" <text:s text:c="3"/></text:span><text:span text:style-name="T6">returns the folder name<text:line-break/><text:tab/></text:span><text:span text:style-name="T2">fn </text:span><text:span text:style-name="T7">&lt;+#-* "/" <text:s text:c="3"/></text:span><text:span text:style-name="T6">returns the file name without folder<text:line-break/><text:tab/></text:span><text:span text:style-name="T2">fn </text:span><text:span text:style-name="T7">&lt;+#-* "/" &lt;-#=* "." <text:s text:c="3"/></text:span><text:span text:style-name="T6">returns the file name without folder and type<text:line-break/><text:tab/></text:span><text:span text:style-name="T2">fn</text:span><text:span text:style-name="T7"> &lt;+#-* "/" &lt;+#=* "." --# 1 <text:s text:c="3"/></text:span><text:span text:style-name="T6">returns the file type<text:line-break/><text:tab/></text:span><text:span text:style-name="T2">fn</text:span><text:span text:style-name="T7"> &lt;-# (</text:span><text:span text:style-name="T2">file</text:span><text:span text:style-name="T3"> </text:span><text:span text:style-name="T7">name &lt;+#-* "/" &lt;=* ".") <text:s text:c="3"/></text:span><text:span text:style-name="T6">returns the file name without type<text:line-break/><text:tab/></text:span><text:span text:style-name="T2">fn</text:span><text:span text:style-name="T7"> &lt;+#-* "/" &lt;-#=* "." <text:s text:c="3"/></text:span><text:span text:style-name="T6">returns the file name without folder and type</text:span></text:p>
      <text:h text:style-name="Heading_20_3" text:outline-level="3">Folder objects</text:h>
      <text:p text:style-name="P11"><text:span text:style-name="T12"><text:tab/></text:span>folder (<text:span text:style-name="T2">folder-name</text:span>)</text:p>
      <text:p text:style-name="P1">creates a folder-name wrapper object. <text:span text:style-name="T1">folder-name <text:s/></text:span><text:span text:style-name="T5">must end with a <text:s/></text:span><text:span text:style-name="T7">"/"</text:span><text:span text:style-name="T5"> <text:s/>character. To retrieve the name:</text:span></text:p>
      <text:p text:style-name="P1"><text:span text:style-name="T5"><text:tab/></text:span><text:span text:style-name="T1">folder </text:span><text:span text:style-name="T7">name</text:span></text:p>
      <text:p text:style-name="P1"><text:span text:style-name="T5">To</text:span><text:span text:style-name="T3"> </text:span><text:span text:style-name="T5">search the folder for files and subfolders:</text:span></text:p>
      <text:p text:style-name="P1"><text:span text:style-name="T5"><text:tab/></text:span><text:span text:style-name="T1">folder </text:span><text:span text:style-name="T7">files <text:s text:c="3"/></text:span><text:span text:style-name="T5">returns a list of file objects <text:line-break/><text:tab/></text:span><text:span text:style-name="T1">folder </text:span><text:span text:style-name="T7">folders</text:span><text:span text:style-name="T1"> <text:s text:c="3"/></text:span><text:span text:style-name="T5">returns a list of folder objects</text:span></text:p>
      <text:p text:style-name="P1">Search patterns are not supported – to get all files of type <text:s/><text:span text:style-name="T11">.pils</text:span> <text:s/>in a folder:</text:p>
      <text:p text:style-name="P1"><text:tab/><text:span text:style-name="T1">folder </text:span><text:span text:style-name="T7">files each {file|:if file name &lt;$* ".pils"; :ok}</text:span></text:p>
      <text:p text:style-name="P2">To travel a folder tree and list all files:</text:p>
      <text:p text:style-name="P1"><text:span text:style-name="T7"><text:tab/></text:span><text:span text:style-name="T1">folder</text:span><text:span text:style-name="T3"> </text:span><text:span text:style-name="T7">call {folder|:who :ok folder files &amp; (folder folders every (who) splice)}</text:span></text:p>
      <text:p text:style-name="P2">To create and delete empty folders:</text:p>
      <text:p text:style-name="P1"><text:span text:style-name="T5"><text:tab/></text:span><text:span text:style-name="T1">folder </text:span><text:span text:style-name="T7">create<text:line-break/></text:span><text:span text:style-name="T5"><text:tab/></text:span><text:span text:style-name="T1">folder </text:span><text:span text:style-name="T7">delete</text:span></text:p>
      <text:h text:style-name="Heading_20_3" text:outline-level="3">Files and folders in patterns</text:h>
      <text:p text:style-name="Text_20_body">To facilitate filtering of files and folders, <text:s/><text:span text:style-name="T11">file</text:span><text:span text:style-name="T12"> <text:s/>and <text:s/></text:span><text:span text:style-name="T11">folder </text:span><text:span text:style-name="T12">can be used as operators in patterns.</text:span></text:p>
      <text:p text:style-name="P11"><text:tab/><text:span text:style-name="T2">file </text:span>file (<text:span text:style-name="T2">fn</text:span><text:span text:style-name="T5">)</text:span><text:span text:style-name="T1"> <text:s text:c="2"/></text:span><text:span text:style-name="T6">matches a </text:span><text:span text:style-name="T2">file</text:span><text:span text:style-name="T6"> whilst matching its full name to </text:span><text:span text:style-name="T2">fn</text:span></text:p>
      <text:p text:style-name="P11"><text:tab/><text:span text:style-name="T2">folder </text:span>folder (<text:span text:style-name="T2">fn</text:span><text:span text:style-name="T5">)</text:span><text:span text:style-name="T1"> </text:span><text:span text:style-name="T6">matches a </text:span><text:span text:style-name="T2">folder</text:span><text:span text:style-name="T6"> whilst matching its full name to </text:span><text:span text:style-name="T2">fn</text:span></text:p>
      <text:p text:style-name="P2">This example will list all <text:s/><text:span text:style-name="T11">.pils</text:span> <text:s/>files inside your document folder with their timestamps, excluding backup folders:</text:p>
      <text:p text:style-name="P8"><text:tab/>folder (platform path documents) call<text:line-break/><text:tab/>{ folder folder (?) | :who :ok folder files &amp; (folder folders each (who) splice) }<text:line-break/><text:tab/>{ ? folder (? &lt;$* "/backup/") | ? }<text:line-break/><text:tab/>each { file file (filename &lt;$* ".pils") | :ok filename, file timestamp }</text:p>
      <text:h text:style-name="Heading_20_3" text:outline-level="3">Zip files</text:h>
      <text:p text:style-name="P2">To read a zip file:</text:p>
      <text:p text:style-name="P11"><text:span text:style-name="T6"><text:tab/></text:span><text:span text:style-name="T5">file (</text:span><text:span text:style-name="T2">zipfilename</text:span><text:span text:style-name="T5">) zip</text:span></text:p>
      <text:p text:style-name="P1"><text:span text:style-name="T5">returns a list of lists <text:s/></text:span><text:span text:style-name="T7">(</text:span><text:span text:style-name="T1">path, data, timestamp</text:span><text:span text:style-name="T3">) <text:s/></text:span><text:span text:style-name="T5">for all archive entries in the zipfile.</text:span></text:p>
      <text:p text:style-name="P2">To create a zipfile:</text:p>
      <text:p text:style-name="P11"><text:span text:style-name="T6"><text:tab/></text:span><text:span text:style-name="T5">file (</text:span><text:span text:style-name="T2">zipfilename</text:span><text:span text:style-name="T5">) zip := </text:span><text:span text:style-name="T2">entries</text:span></text:p>
      <text:p text:style-name="P14"><text:span text:style-name="T11">Note:</text:span> zipfile creation is currently not supported in jucePILS.</text:p>
      <text:p text:style-name="P2">As with filenames, directories are separated by <text:s/>/ , though the zip format uses <text:s/><text:span text:style-name="T11">\</text:span> <text:s/>internally.</text:p>
      <text:p text:style-name="P2">There is presently no support for modifying zip files or reading single entries, and no other archive formats are supported.</text:p>
      <text:p text:style-name="P2">Note: OpenOffice files use the zip format. The PILS documentation files are authored using OpenOffice writer, and converted to HTML by a PILS script.</text:p>
      <text:h text:style-name="Heading_20_2" text:outline-level="2">Worker threads, knots and latecomers</text:h>
      <text:p text:style-name="Text_20_body">Worker threads allow the PILS user interface to stay responsible while lengthy computations are going on, and allow programs to benefit from multiprocessor systems.</text:p>
      <text:p text:style-name="Text_20_body">PILS threads and knots are designed for this use and do not offer the fine-grained synchronization mechanisms required for process control. In return, the programmer does not need to worry about deadlocks or calling objects from the wrong threads.</text:p>
      <text:p text:style-name="Text_20_body">The <text:span text:style-name="T11"><text:s/>lib/pils/english/compute/compute.pils <text:s/></text:span>library offers a simple wrapper for using a single worker thread for parsing of files or similar processing.</text:p>
      <text:h text:style-name="Heading_20_3" text:outline-level="3">Creating a worker thread</text:h>
      <text:p text:style-name="Text_20_body"><text:tab/><text:span text:style-name="T11">:thread</text:span> <text:span text:style-name="T1">expression</text:span></text:p>
      <text:p text:style-name="Text_20_body">This construct is only valid in the main thread. A worker thread is created and started, and <text:s/><text:span text:style-name="T11">[]</text:span> <text:s/>is returned. The worker thread evaluates <text:span text:style-name="T1">expression</text:span>, discards the result and terminates.</text:p>
      <text:p text:style-name="Text_20_body">System calls and user interface manipulations cannot be performed directly by worker threads. However, a worker thread can temporarily take over the main thread by calling a knot.</text:p>
      <text:h text:style-name="Heading_20_3" text:outline-level="3">Knot calls</text:h>
      <text:p text:style-name="Text_20_body">The only means of synchronization available for PILS threads is the <text:span text:style-name="T1">knot</text:span><text:span text:style-name="T5"> </text:span><text:span text:style-name="T1">call</text:span><text:span text:style-name="T5">, that is, calling methods of an object wrapped in a knot:</text:span></text:p>
      <text:p text:style-name="Text_20_body"><text:span text:style-name="T5"><text:tab/></text:span><text:span text:style-name="T7">(knot:</text:span><text:span text:style-name="T5"> </text:span><text:span text:style-name="T1">object</text:span><text:span text:style-name="T7">) </text:span><text:span text:style-name="T2">method</text:span></text:p>
      <text:p text:style-name="P6">The knot wrapper effectively makes <text:span text:style-name="T1">object</text:span> thread safe, by forwarding calls from worker threads to the main thread, for processing in its idle time, while the worker thread is blocked.</text:p>
      <text:p text:style-name="P6">There is no support for parking a thread to awake it later.</text:p>
      <text:p text:style-name="P2">When the call succeeds, fails or falls through, the worker thread is restarted in a state that reflects this. The thread switch is generally transparent, except that tail flattening and piping is suppressed and responders, list builders and exits not work across thread borders.</text:p>
      <text:p text:style-name="Text_20_body">Generally, worker threads <text:span text:style-name="T5">should do lengthy computation on their own most of the time, occasionally using knots for system access, user interface updates and information exchange. If a worker thread stays in a knotted call, the PILS system will be blocked.</text:span></text:p>
      <text:p text:style-name="P6">When used by the main thread, knotted calls pass through with no synchronization. They are still thread safe because only the main thread performs dotted calls.</text:p>
      <text:p text:style-name="P6">The PILS module that displays error messages is knotted, so when a worker thread throws an error, the bug pinner window will be shown by the main thread.</text:p>
      <text:h text:style-name="Heading_20_3" text:outline-level="3">Latecomers</text:h>
      <text:p text:style-name="P6">During construction of user interfaces, some operations need to be queued for later execution, at <text:s/>a time when the window being constructed has been sized and shown.</text:p>
      <text:p text:style-name="P6"><text:tab/><text:span text:style-name="T11">:later</text:span> <text:span text:style-name="T1">expression</text:span></text:p>
      <text:p text:style-name="P6"><text:span text:style-name="T1">expression </text:span>is queued with the current context, and <text:s/><text:span text:style-name="T11">[]</text:span> <text:s/>is returned immediately. When the main thread is idle, <text:span text:style-name="T1">expression </text:span>is evaluated in the supplied context, and then trashed.</text:p>
      <text:p text:style-name="P6">Latecomers can be created from the main thread as well as from worker threads; their execution is always in the main thread.</text:p>
      <text:h text:style-name="Heading_20_1" text:outline-level="1">PILS programs</text:h>
      <text:p text:style-name="P2">A PILS program is a collection of <text:span text:style-name="T1">modules, </text:span>stored in one or more <text:span text:style-name="T1">library files. </text:span>All modules and libraries involved in running a program are gathered in a program strop.</text:p>
      <text:p text:style-name="Text_20_body"><text:span text:style-name="T6">Program straps are managed by the library <text:s/></text:span><text:span text:style-name="T11">pils/english/system/system.pils</text:span><text:span text:style-name="T6"> <text:s/>which is located by the executable at startup, searching the directory of the executable and its parent directories. When found, the module </text:span><text:span text:style-name="T7">[pils system boot]</text:span><text:span text:style-name="T6"> is parsed and called.</text:span></text:p>
      <text:p text:style-name="P2">As these modules have to work before the waxball is initialized, they rely on a somewhat ruder mechanism for referencing each other. You should not edit them unless you know what you are doing – if you break them, the error reporting of PILS will break down too and you will have to resort to primitive and tedious methods for sorting out what went wrong.</text:p>
      <text:h text:style-name="Heading_20_2" text:outline-level="2">Modules</text:h>
      <text:p text:style-name="P2">The basic unit of the PILS programming system is a module. Generally, a module is a named PILS expression, very often one that results in a bound ruleset of exported rules.</text:p>
      <text:p text:style-name="P2"><text:tab/><text:span text:style-name="T11">{ </text:span><text:span text:style-name="T1">... </text:span><text:span text:style-name="T11">| } </text:span><text:span text:style-name="T1">! exported rules</text:span><text:line-break/><text:tab/><text:span text:style-name="T1">...</text:span><text:line-break/><text:tab/><text:span text:style-name="T11">===</text:span><text:line-break/><text:tab/><text:span text:style-name="T1">private-definitions</text:span></text:p>
      <text:p text:style-name="P2">In the library file, each module is stored with a header containing the module name and some attributes, of which the <text:span text:style-name="T11">.timestamp</text:span> <text:s/>attribute keeps track of when the module was last edited, and the <text:s/><text:span text:style-name="T11">.language</text:span> <text:s/>attribute indicates a PILS language object to be used for parsing the module, as described below.</text:p>
      <text:p text:style-name="P2">Modules are similar to singleton objects of object orientet programming, on a per program basis: when several documents are open, they will use different program straps and each of these will have separate instances of the modules. Furthermore, when a module is being edited while in use, multiple instances can sometimes exist within the same program.</text:p>
      <text:h text:style-name="Heading_20_3" text:outline-level="3">Module names and references</text:h>
      <text:p text:style-name="P2">A module name is a list of PILS names. The programming system presents the modules as a tree, merging common beginnings.</text:p>
      <text:p text:style-name="P2">Modules cannot implicitly access their own exported methods. If a rule needs to access other rules of the same ruleset or aggregate, the <text:s/><text:span text:style-name="T11">:who</text:span> <text:s/>or <text:s/><text:span text:style-name="T11">:self</text:span> <text:s/>binder should be used.</text:p>
      <text:p text:style-name="P2">Modules can refer to each other by absolute name:</text:p>
      <text:p text:style-name="P2"><text:tab/><text:span text:style-name="T11">@@ [game board checkers]</text:span> <text:s text:c="3"/>always refers to <text:s text:c="3"/><text:span text:style-name="T11">[game board checkers]</text:span></text:p>
      <text:p text:style-name="P2">Or by relative names. In a module named <text:s/><text:span text:style-name="T11">[game board]</text:span> :</text:p>
      <text:p text:style-name="P2"><text:tab/><text:span text:style-name="T11">@@ chess</text:span></text:p>
      <text:p text:style-name="P2">refers to <text:s/><text:span text:style-name="T11">[game board chess]</text:span> , <text:s/><text:span text:style-name="T11">[game chess]</text:span> or <text:s/><text:span text:style-name="T11">[chess,]</text:span></text:p>
      <text:p text:style-name="P2"><text:tab/><text:span text:style-name="T11">@@ . [chess sizer]</text:span></text:p>
      <text:p text:style-name="P2">refers to <text:s/><text:span text:style-name="T11">[game board chess sizer]</text:span> , <text:s/><text:span text:style-name="T11">[game chess sizer]</text:span> or <text:s/><text:span text:style-name="T11">[chess sizer]</text:span></text:p>
      <text:p text:style-name="P2">Absolute module references are implemented by a function rule <text:span text:style-name="T11"><text:s/>{@@: module-name|</text:span><text:span text:style-name="T1">...</text:span><text:span text:style-name="T11">}</text:span> <text:s/>whereas<text:span text:style-name="T11"> </text:span>relative module references are implemented by a helper object named <text:s/><text:span text:style-name="T11">@@</text:span> .</text:p>
      <text:p text:style-name="P2">Both absolute and relative module references can use computed module names.</text:p>
      <text:p text:style-name="P2">For the common case when a module exports a method of the same name, the helper object <text:s/><text:span text:style-name="T11">@</text:span> <text:s/>implements a shorthand:</text:p>
      <text:p text:style-name="P2"><text:tab/><text:span text:style-name="T11">@ board (</text:span><text:span text:style-name="T1">...</text:span><text:span text:style-name="T11">)</text:span> <text:s text:c="3"/>is the same as <text:s text:c="3"/><text:span text:style-name="T11">@@ board board (</text:span><text:span text:style-name="T1">...</text:span><text:span text:style-name="T11">)</text:span></text:p>
      <text:p text:style-name="P2"><text:tab/><text:span text:style-name="T11">@ board</text:span> <text:s text:c="3"/>is the same as <text:s text:c="3"/><text:span text:style-name="T11">@@ board board</text:span></text:p>
      <text:p text:style-name="P2">For specifying longer references:</text:p>
      <text:p text:style-name="P2"><text:tab/><text:span text:style-name="T11">@ [board] checkers (</text:span><text:span text:style-name="T1">...</text:span><text:span text:style-name="T11">)</text:span> <text:s text:c="3"/>is the same as <text:s text:c="3"/><text:span text:style-name="T11">@@ . [board checkers] checkers (</text:span><text:span text:style-name="T1">…</text:span><text:span text:style-name="T11">)</text:span></text:p>
      <text:p text:style-name="P2"><text:tab/><text:span text:style-name="T11">@ [game board] checkers (</text:span><text:span text:style-name="T1">...</text:span><text:span text:style-name="T11">)</text:span> <text:s text:c="3"/>is the same as <text:s text:c="3"/><text:span text:style-name="T11">@@ . [game board checkers] checkers (</text:span><text:span text:style-name="T1">…</text:span><text:span text:style-name="T11">)</text:span></text:p>
      <text:h text:style-name="Heading_20_3" text:outline-level="3">Common functionality in === modules</text:h>
      <text:p text:style-name="Text_20_body">Functionality that is commonly used throughout an application can be implemented by rules in a module with <text:s/>=== <text:s/>as its last name. The rules can be used directly by all other modules in that branch of the module tree.</text:p>
      <text:p text:style-name="Text_20_body">The system library <text:s/><text:span text:style-name="T11">system.pils</text:span> <text:s/>contains a module <text:s/><text:span text:style-name="T11">[===,]</text:span> <text:s/>defining functionality available to all PILS modules.</text:p>
      <text:h text:style-name="Heading_20_3" text:outline-level="3">Module references in changing programs</text:h>
      <text:p text:style-name="Text_20_body">Module references are basically dynamic: if a module is edited and saved while in use, further references to the module will retrieve an instance of the updated module.</text:p>
      <text:p text:style-name="Text_20_body">However, module references that were executed before the change was saved still hold the old version.</text:p>
      <text:p text:style-name="Text_20_body">This distinction is important when experimenting with changes in a running application: the features accessed via module references will change immediately as the modules are edited, whereas features implemented by objects that were created at application startup will not change unless the application is restarted.</text:p>
      <text:p text:style-name="Text_20_body">The latter procedure – restarting the application to test a change – is still a common way of doing things, especially with compiled languages, but rarely necessary when working with PILS.</text:p>
      <text:h text:style-name="Heading_20_3" text:outline-level="3">Module instantiation</text:h>
      <text:p text:style-name="P2">When a module is referenced for the first time by a running program, the programming system will instantiate it by parsing and evaluating the expression, keeping the instance in an <text:span text:style-name="T1">instance mind</text:span> for further references.</text:p>
      <text:p text:style-name="P2">Instantiation happens on program basis. When several PILS programs are running, each will have its own program strap with separate module instantiations.</text:p>
      <text:p text:style-name="P2">Whenever a module is edited and saved, it is removed from the instance mind of all affected program strops. Other modules that referenced the module during their instantiation are removed too. The old instances are still usable but future references will refer to new instances.</text:p>
      <text:h text:style-name="Heading_20_3" text:outline-level="3">Datafiles and data dependent modules</text:h>
      <text:p text:style-name="Text_20_body">If, during instantiation, a module uses data from text files, XML files, spreadsheets etc., changes in the files may necessitate reinstantiation of the module so that the changed data are reflected by the PILS program. This is supported by the functions</text:p>
      <text:p text:style-name="Text_20_body"><text:tab/><text:span text:style-name="T11">datafile (</text:span><text:span text:style-name="T1">filename</text:span><text:span text:style-name="T11">)</text:span></text:p>
      <text:p text:style-name="Text_20_body">which creates a file object and, if <text:s/>if called during module instantiation, registers the module's dependency of the timestamped file, and</text:p>
      <text:p text:style-name="Text_20_body"><text:tab/><text:span text:style-name="T11">datafile-check</text:span></text:p>
      <text:p text:style-name="Text_20_body">which checks the timestamps of all datafiles registered by the program, flushing from the instance mind of the program strop all module instances that depend on files with a changed timestamp.</text:p>
      <text:h text:style-name="Heading_20_3" text:outline-level="3">Module and program attributes by “this”</text:h>
      <text:p text:style-name="Text_20_body">The name <text:s/><text:span text:style-name="T11">this <text:s/></text:span><text:span text:style-name="T12">can be</text:span><text:span text:style-name="T6"> used to query certain properties of the current module and program.</text:span></text:p>
      <text:p text:style-name="Text_20_body"><text:span text:style-name="T6"><text:tab/></text:span><text:span text:style-name="T7">this program filename<text:line-break/><text:tab/>this program path<text:line-break/></text:span><text:span text:style-name="T7"><text:tab/>this program language</text:span></text:p>
      <text:p text:style-name="P2">get the filename, path and language of the program file for which the module is instantiated.</text:p>
      <text:p text:style-name="Text_20_body"><text:span text:style-name="T6"><text:tab/></text:span><text:span text:style-name="T7">this module name<text:line-break/></text:span><text:span text:style-name="T6"><text:tab/></text:span><text:span text:style-name="T7">this module text<text:line-break/></text:span><text:span text:style-name="T6"><text:tab/></text:span><text:span text:style-name="T7">this module expression<text:line-break/></text:span><text:span text:style-name="T6"><text:tab/></text:span><text:span text:style-name="T7">this module language<text:line-break/></text:span><text:span text:style-name="T6"><text:tab/></text:span><text:span text:style-name="T7">this module library</text:span></text:p>
      <text:p text:style-name="P2">get attributes of the module.</text:p>
      <text:p text:style-name="Text_20_body"><text:span text:style-name="T6">The bug pinner depends on this, and the name <text:s/></text:span><text:span text:style-name="T7">this</text:span><text:span text:style-name="T6"> <text:s/>should never be used for other purposes.</text:span></text:p>
      <text:h text:style-name="Heading_20_3" text:outline-level="3">Language modules</text:h>
      <text:p text:style-name="Text_20_body"><text:span text:style-name="T6">Each module has an associated language attribute which stores a </text:span><text:span text:style-name="T2">language name</text:span><text:span text:style-name="T6">,</text:span><text:span text:style-name="T2"> </text:span><text:span text:style-name="T6">which can be a list of names.</text:span></text:p>
      <text:p text:style-name="Text_20_body"><text:span text:style-name="T6">The language of a module is found by prepending <text:s/></text:span><text:span text:style-name="T7">[pils language]</text:span><text:span text:style-name="T6"> <text:s/>to the language name and </text:span><text:span text:style-name="T6">looking this up as a relative module reference, like the expression:</text:span></text:p>
      <text:p text:style-name="Text_20_body"><text:span text:style-name="T6"><text:tab/></text:span><text:span text:style-name="T7">@@ . ([pils language] &amp; </text:span><text:span text:style-name="T2">language-name</text:span><text:span text:style-name="T7">)</text:span></text:p>
      <text:p text:style-name="Text_20_body"><text:span text:style-name="T6">To get started, the language name <text:s/></text:span><text:span text:style-name="T7">[system]</text:span><text:span text:style-name="T6"> <text:s/>always refers to the language object used for booting PILS.</text:span></text:p>
      <text:p text:style-name="Text_20_body"><text:span text:style-name="T6">In most cases, the language module is a PILS language object, possibly with national translations of the PILS vocabulary, possibly with application or library specific namespace prefixes such as the <text:s/></text:span><text:span text:style-name="T7">j: <text:s/></text:span><text:span text:style-name="T6">used by the <text:s/></text:span><text:span text:style-name="T7">juce </text:span><text:span text:style-name="T6"><text:s/>library bindings, or namespace prefixes suitable for dealing with </text:span><text:span text:style-name="T6">specific XML formats such as OpenOffice documents.</text:span></text:p>
      <text:p text:style-name="Text_20_body"><text:span text:style-name="T6">Alternatively, custom parser objects can be defined in language modules. A simple example of this is the <text:s/></text:span><text:span text:style-name="T7">text</text:span><text:span text:style-name="T6"> <text:s/>language, with a trivial </text:span><text:span text:style-name="T6">parser that simply returns the text, which is useful for saving text data in PILS libraries.</text:span></text:p>
      <text:p text:style-name="P17">The PILS editor exposes language modules as menu options.</text:p>
      <text:h text:style-name="Heading_20_2" text:outline-level="2">Libraries</text:h>
      <text:p text:style-name="P2">A library is a file that contains modules and possibly references to other libraries. When a library is loaded, its referenced libraries will be loaded too if this has not already been done.</text:p>
      <text:p text:style-name="P2">A PILS program is simply a library which is used as an application of its own.</text:p>
      <text:h text:style-name="Heading_20_2" text:outline-level="2">Program straps</text:h>
      <text:p text:style-name="P2">When the user opens a program, it is loaded with the libraries it depends on. The libraries are then merged into a program library which includes all modules present in all the libraries.</text:p>
      <text:p text:style-name="P2">The life time of a program library is managed by a strap which is strapped to all top level windows created from that program. The program is released when the last of its windows is closed.</text:p>
      <text:p text:style-name="P2">When a library is used as part of a program library, its module references pertain to the whole program library.</text:p>
      <text:p text:style-name="P2">Four libraries – the <text:span text:style-name="T1">system library</text:span>, the <text:span text:style-name="T1">editor library</text:span>, the <text:span text:style-name="T1">platform library</text:span> and a <text:span text:style-name="T1">user configuration library</text:span> – must be available and loaded for the PILS system to work. The system, editor and platform libraries are located by relative paths from the executable, the user configuration library is chosen at startup, based on your computer's language settings:</text:p>
      <text:p text:style-name="P2">If your computer is set to a language other than English, configuration and language files for that language will be linked in if they exist, and the <text:s/><text:span text:style-name="T11">say</text:span> <text:s/>function – which should be used for all messages and labes in the user interfaces of PILS programs – will then use that language.</text:p>
      <text:p text:style-name="P2">Currently, only English and Danish are supported.</text:p>
      <text:h text:style-name="Heading_20_2" text:outline-level="2">Command line processing and single-instance checking</text:h>
      <text:p text:style-name="Text_20_body">On startup, the PILS executable will try to detect a previous instance and pass the command line to it. If this fails for one reason or the other, a new instance is started.</text:p>
      <text:p text:style-name="Text_20_body">At startup, PILS creates an object that must be able to process command lines. This object is defined by the module <text:s/><text:span text:style-name="T11">[pils system start]</text:span> <text:s/>in the waxball organizer library.</text:p>
      <text:p text:style-name="Text_20_body">This design is slightly complicated by the fact that waxballs come and go as programs are opened and closed, so a channel <text:s/><text:span text:style-name="T11">[channel: pils: command-line]</text:span> <text:s/>is used to pass the requests to a live waxball with a suitable instance of the <text:s/><text:span text:style-name="T11">[pils system start]</text:span><text:span text:style-name="T12"> <text:s/>module.</text:span></text:p>
      <text:p text:style-name="Text_20_body"><text:span text:style-name="T12">The MS Windows installer defines operations </text:span><text:span text:style-name="T2">open and</text:span><text:span text:style-name="T12"> </text:span><text:span text:style-name="T2">edit </text:span><text:span text:style-name="T6">for the PILS file type in the registry; the command lines are distinguished by an <text:s/></text:span><text:span text:style-name="T7">-edit</text:span><text:span text:style-name="T6"> <text:s/>option in the edit command line. This is recognized by a rule in <text:s/></text:span><text:span text:style-name="T7">[pils system start]</text:span><text:span text:style-name="T6"> <text:s/>and has the effect of directly opening the editor, regardless of whether another action is specified in the <text:s/></text:span><text:span text:style-name="T7">[pils run start]</text:span><text:span text:style-name="T6"> <text:s/>module.</text:span></text:p>
      <text:h text:style-name="Heading_20_1" text:outline-level="1">The PILS editor</text:h>
      <text:p text:style-name="P2">PILS programs are created, edited and tested using the PILS editor – a simple tabbed text editor with facilities for searching and navigating PILS libraries and executing test functions.</text:p>
      <text:p text:style-name="P2">A PILS editor window always deals with a specific library and will only edit modules within that library. To edit multiple libraries, multiple windows are used.</text:p>
      <text:p text:style-name="P2">The editor itself is located in a PILS library, <text:s/><text:span text:style-name="T11">lib/english/pils/editor</text:span> , and runs in the waxball of the library being edited, allowing libraries to modify the behavior of the editor by redefining its modules.</text:p>
      <text:p text:style-name="P2">When a module is saved, all modules that referred it directly or indirectly during their instantiation are flushed from the instance minds..</text:p>
      <text:p text:style-name="P14"><text:span text:style-name="T11">Note:</text:span> redefining of editor modules should be done with caution. If a broken editor module prevents the editor from working, you cannot use that same editor to remove or mend the module. You will then need to open the library file using another editor, or restore an earlier version of the PILS editor.</text:p>
      <text:h text:style-name="Heading_20_2" text:outline-level="2">Creating a PILS program</text:h>
      <text:p text:style-name="Text_20_body">To create a PILS program, simply create an empty file with the extension <text:s/><text:span text:style-name="T11">.pils</text:span> , and open it with the PILS executable. You will be asked to choose the language you want to use for programming.</text:p>
      <text:p text:style-name="Text_20_body">The file</text:p>
      <text:p text:style-name="Text_20_body"><text:s/><text:tab/><text:span text:style-name="T11">lib/pils/</text:span><text:span text:style-name="T2">language</text:span><text:span text:style-name="T11">/pils/new.pils</text:span></text:p>
      <text:p text:style-name="Text_20_body">serves as a simple template with the appropriate settings and will be copied over your empty file and opened. (Currently, only Danish and English are supported).</text:p>
      <text:p text:style-name="Text_20_body">The language you choose will be used to store and show module names and will be the initial language for new modules in your program. You can change the file language later.</text:p>
      <text:p text:style-name="Text_20_body"><text:span text:style-name="T3">Note:</text:span><text:span text:style-name="T1"> The user interface language is controlled by your computer's language setting, not by the program language. If you write your programs using english terms and execute them on a system with Danish language settings, or the other way around, PILS will attempt to translate messages and labels.</text:span></text:p>
      <text:h text:style-name="Heading_20_2" text:outline-level="2">Opening an existing program</text:h>
      <text:p text:style-name="Text_20_body">Double-clicking a PILS file will call the <text:s/><text:span text:style-name="T11">open <text:s/></text:span><text:span text:style-name="T12">function in the module <text:s/></text:span><text:span text:style-name="T11">[pils run command open]</text:span><text:span text:style-name="T12"> . If this module has not been redefined, an editor window will be opened.</text:span></text:p>
      <text:p text:style-name="Text_20_body">Similarly, the <text:span text:style-name="T2">Edit </text:span>command <text:span text:style-name="T12">will call the <text:s/></text:span><text:span text:style-name="T11">edit <text:s/></text:span><text:span text:style-name="T12">function in the module <text:s/></text:span><text:span text:style-name="T11">[pils run command edit]</text:span><text:span text:style-name="T12"> , which will also open an editor window.</text:span></text:p>
      <text:p text:style-name="P1">When you build PILS applications, you will usually start the application by starting the editor and executing a test function. When testing and polishing becomes more important, you can create a module <text:s/><text:span text:style-name="T7">[pils run command open] <text:s/></text:span><text:span text:style-name="T5">and define a rule:</text:span></text:p>
      <text:p text:style-name="P11"><text:span text:style-name="T5"><text:tab/>{ .open |</text:span><text:span text:style-name="T2"> ...</text:span><text:span text:style-name="T5"> }</text:span></text:p>
      <text:p text:style-name="P1"><text:span text:style-name="T5">The editor window will still be available by using the </text:span><text:span text:style-name="T1">Edit </text:span><text:span text:style-name="T5">command.</text:span></text:p>
      <text:p text:style-name="P1"><text:span text:style-name="T5">In the command line, the option <text:s/></text:span><text:span text:style-name="T7">-edit</text:span><text:span text:style-name="T5"> <text:s/>(always in English, with a prepended hyphen) is used to distinguish the </text:span><text:span text:style-name="T1">Edit </text:span><text:span text:style-name="T5">command from the </text:span><text:span text:style-name="T1">Open</text:span><text:span text:style-name="T5"> command which is the default.</text:span></text:p>
      <text:h text:style-name="Heading_20_2" text:outline-level="2">Working with modules</text:h>
      <text:p text:style-name="P1">When you open a program with the editor, the last changed module will be shown in a tab.</text:p>
      <text:h text:style-name="Heading_20_3" text:outline-level="3">Editing</text:h>
      <text:p text:style-name="Text_20_body">The editor is simple – the usual shortcuts apply:</text:p>
      <text:p text:style-name="Text_20_body"><text:tab/><text:span text:style-name="T11">Ctrl-C</text:span> <text:s text:c="3"/>copy</text:p>
      <text:p text:style-name="Text_20_body"><text:tab/><text:span text:style-name="T11">Ctrl-X</text:span> <text:s text:c="3"/>cut</text:p>
      <text:p text:style-name="Text_20_body"><text:tab/><text:span text:style-name="T11">Ctrl-V</text:span> <text:s text:c="3"/>paste</text:p>
      <text:p text:style-name="Text_20_body"><text:tab/><text:span text:style-name="T11">Ctrl-Z</text:span> <text:s text:c="3"/>undo</text:p>
      <text:p text:style-name="Text_20_body"><text:tab/><text:span text:style-name="T11">Ctrl-Y</text:span> <text:s text:c="3"/>redo</text:p>
      <text:p text:style-name="Text_20_body"><text:tab/><text:span text:style-name="T11">Ctrl-S</text:span> <text:s text:c="3"/>save</text:p>
      <text:p text:style-name="Text_20_body">All saving goes straight to the disk file. You cannot test a module without saving it.</text:p>
      <text:p text:style-name="Text_20_body">Attempts to save modules with syntax errors will be rejected, and you will be directed to the spot where the parser failed.</text:p>
      <text:p text:style-name="P14"><text:span text:style-name="T11">Tip:</text:span> If you need to save a module with syntax errors, set the language to <text:s/><text:span text:style-name="T11">text</text:span>  as described below.</text:p>
      <text:h text:style-name="Heading_20_3" text:outline-level="3">Navigating the module tree</text:h>
      <text:p text:style-name="Text_20_body"><text:span text:style-name="T11"><text:tab/>Ctrl-M</text:span> <text:s text:c="3"/>shows the modules of your program in a tree view.</text:p>
      <text:p text:style-name="Text_20_body"><text:span text:style-name="T12">To open a module, activate it by double clicking or hitting the <text:s/></text:span><text:span text:style-name="T11">Enter <text:s/></text:span><text:span text:style-name="T12">key. Use the <text:s/></text:span><text:span text:style-name="T11">Esc <text:s/></text:span><text:span text:style-name="T12">key to close the tree pane.</text:span></text:p>
      <text:h text:style-name="Heading_20_3" text:outline-level="3">Creating, moving and deleting modules</text:h>
      <text:p text:style-name="P1">To create a new module:</text:p>
      <text:p text:style-name="Text_20_body"><text:span text:style-name="T11"><text:tab/>Ctrl-N</text:span> <text:s text:c="3"/>creates a submodule of the current module.</text:p>
      <text:p text:style-name="Text_20_body">To create a root module, create a submodule of an existing root module and move it down, using the Module menu.</text:p>
      <text:p text:style-name="Text_20_body"><text:tab/><text:span text:style-name="T11">Module-&gt;move-&gt;down</text:span><text:span text:style-name="T1"> <text:s text:c="3"/></text:span><text:span text:style-name="T5">moves the module and its submodules towards the root</text:span></text:p>
      <text:p text:style-name="Text_20_body"><text:tab/><text:span text:style-name="T11">Module-&gt;move-&gt;up-&gt;</text:span><text:span text:style-name="T1">sibling <text:s text:c="3"/></text:span><text:span text:style-name="T5">moves the module and submodules up on </text:span><text:span text:style-name="T1">sibling</text:span></text:p>
      <text:p text:style-name="Text_20_body"><text:span text:style-name="T11"><text:tab/>Ctrl-K</text:span> <text:s text:c="3"/>copies the current module and submodules to another name.</text:p>
      <text:p text:style-name="Text_20_body"><text:span text:style-name="T11"><text:tab/>Ctrl-R</text:span> <text:s text:c="3"/>renames the current module and submodules.</text:p>
      <text:p text:style-name="P6"><text:span text:style-name="T12"><text:tab/></text:span><text:span text:style-name="T11">Module-&gt;delete <text:s text:c="3"/></text:span><text:span text:style-name="T12">deletes the current module if it is empty and has no submodules.</text:span></text:p>
      <text:p text:style-name="P6"><text:span text:style-name="T12"><text:tab/></text:span><text:span text:style-name="T11">Module-&gt;move-&gt;library-&gt;</text:span><text:span text:style-name="T2">library</text:span><text:span text:style-name="T12"> <text:s text:c="3"/>moves to another library, with submodules.</text:span></text:p>
      <text:p text:style-name="P15">Tip: <text:span text:style-name="T12">Deleting modules is – by design – a bit troublesome, to save you accidentally deleting code by hitting the wrong key. If you need to delete many modules, create a trash library, put them there and delete the trash library file.</text:span></text:p>
      <text:h text:style-name="Heading_20_3" text:outline-level="3">Changing the language of a module</text:h>
      <text:p text:style-name="Text_20_body">To change the language of a module, make your pick from the <text:s/><text:span text:style-name="T11">Language <text:s/></text:span>menu. The module must be saved after the language change.</text:p>
      <text:p text:style-name="Text_20_body">Except for <text:s/><text:span text:style-name="T11">system</text:span><text:span text:style-name="T12"> <text:s/>which always refers to the language object used to boot PILS and to read program headers, the entries in the language menu refer to modules with the words <text:s/></text:span><text:span text:style-name="T11">pils language</text:span><text:span text:style-name="T12"> in their name. To add a language to the menu, create a module named</text:span></text:p>
      <text:p text:style-name="Text_20_body"><text:span text:style-name="T12"><text:tab/></text:span><text:span text:style-name="T11">pils language </text:span><text:span text:style-name="T2">name</text:span></text:p>
      <text:p text:style-name="P6"><text:span text:style-name="T12">and write a language object or an expression that creates one, or an object of your own making with <text:s/>at least a <text:s/></text:span><text:span text:style-name="T11">read <text:s/></text:span><text:span text:style-name="T12">method, like he languages <text:s/></text:span><text:span text:style-name="T11">text <text:s/></text:span><text:span text:style-name="T12">and <text:s/></text:span><text:span text:style-name="T11">textlist</text:span><text:span text:style-name="T12"> <text:s/>defined by modules in the editor library – <text:s/></text:span><text:span text:style-name="T11">text <text:s/></text:span><text:span text:style-name="T12">simply delivers the module text, <text:s/></text:span><text:span text:style-name="T11">textlist</text:span><text:span text:style-name="T12"> <text:s/>splits it in lines.</text:span></text:p>
      <text:p text:style-name="P2">Language modules can be specific to a branch in the module tree:</text:p>
      <text:p text:style-name="P6"><text:span text:style-name="T12"><text:tab/></text:span><text:span text:style-name="T11">job </text:span><text:span text:style-name="T2">myapp </text:span><text:span text:style-name="T11">pils language </text:span><text:span text:style-name="T2">mylanguage</text:span></text:p>
      <text:p text:style-name="P6"><text:span text:style-name="T12">defines a language which is only available to modules in the <text:s/></text:span><text:span text:style-name="T11">job </text:span><text:span text:style-name="T2">myapp</text:span><text:span text:style-name="T12"> <text:s/>branch of the module tree.</text:span></text:p>
      <text:p text:style-name="P2">If you set the language of a module to a branch-specific language, you should not move the module outside that branch.</text:p>
      <text:p text:style-name="P6"><text:span text:style-name="T12">The </text:span><text:span text:style-name="T2">juce </text:span><text:span text:style-name="T12">binding library – which wraps the PILS juce bindings – uses a branch-specific language which associates the <text:s/></text:span><text:span text:style-name="T11">j:</text:span><text:span text:style-name="T12"> <text:s/>prefix with the namespace used internally by PILS for juce methods and classes.</text:span></text:p>
      <text:h text:style-name="Heading_20_3" text:outline-level="3">Changing the program language</text:h>
      <text:p text:style-name="Text_20_body">You can change the program language if you do not want to stay with the language you chose when you created the file. First, set your program to use an appropriate language library:</text:p>
      <text:p text:style-name="Text_20_body"><text:tab/><text:span text:style-name="T11">lib/pils/</text:span><text:span text:style-name="T2">language</text:span><text:span text:style-name="T11">/pils/</text:span><text:span text:style-name="T2">language</text:span><text:span text:style-name="T11">.pils</text:span></text:p>
      <text:p text:style-name="Text_20_body"><text:span text:style-name="T12">Then, use the menu <text:s/></text:span><text:span text:style-name="T11">File-&gt;settings-&gt;language-&gt;</text:span><text:span text:style-name="T12"> </text:span><text:span text:style-name="T2">language <text:s/></text:span><text:span text:style-name="T6">to set the program language.</text:span></text:p>
      <text:p text:style-name="P2">This triggers a rebuild of the editor window, to ensure that module names are shown correctly.</text:p>
      <text:p text:style-name="P2">The language change does not affect the language setting of modules already created.</text:p>
      <text:h text:style-name="Heading_20_2" text:outline-level="2">Using PILS libraries</text:h>
      <text:p text:style-name="P2">To use PILS libraries, select</text:p>
      <text:p text:style-name="P2"><text:tab/><text:span text:style-name="T11">Libraries-&gt;use</text:span></text:p>
      <text:p text:style-name="P2">and use the <text:s/><text:span text:style-name="T11">Insert</text:span> <text:s/>and <text:s/><text:span text:style-name="T11">Delete</text:span> <text:s/>keys to add or remove libraries from the list. <text:s/><text:span text:style-name="T11">Insert <text:s/></text:span>will open a standard file picker dialog, and encode the selected file name by one of the following prefixes if applicable:</text:p>
      <text:p text:style-name="P2"><text:tab/><text:span text:style-name="T11">&lt;lib&gt;/</text:span> <text:s text:c="3"/>– the <text:s/><text:span text:style-name="T11">lib/pils/</text:span> <text:s/>folder</text:p>
      <text:p text:style-name="P2"><text:tab/><text:span text:style-name="T11">&lt;doc&gt;/</text:span> <text:s text:c="3"/>– the user's document folder</text:p>
      <text:p text:style-name="P2"><text:tab/><text:span text:style-name="T11">&lt;.&gt;/</text:span> <text:s text:c="3"/>– the folder of the importing library</text:p>
      <text:p text:style-name="P2"><text:tab/><text:span text:style-name="T11">&lt;..&gt;/</text:span> <text:s text:c="3"/>– parent of the folder of the importing library</text:p>
      <text:p text:style-name="P2">This helps keeping the imports valid when PILS libraries are moved.</text:p>
      <text:h text:style-name="Heading_20_3" text:outline-level="3">Searching across libraries</text:h>
      <text:p text:style-name="Text_20_body">When you start using multiple libraries, you will occasionally need to search through all the libraries involved in your project to find some stuff you forgot where you put. To search across libraries, press</text:p>
      <text:p text:style-name="Text_20_body"><text:tab/><text:span text:style-name="T11">Ctrl-D <text:s text:c="3"/></text:span></text:p>
      <text:p text:style-name="Text_20_body"><text:span text:style-name="T12">This will open a Detective pane, which combines a high and a low search stripe with a module tree. Besides the usual</text:span><text:span text:style-name="T2"> Whole words only </text:span><text:span text:style-name="T6">and </text:span><text:span text:style-name="T2"><text:s/>Case sensitive</text:span><text:span text:style-name="T6"> checkboxes, the Detective supports a </text:span><text:span text:style-name="T2">Structural </text:span><text:span text:style-name="T6">mode which will </text:span><text:span text:style-name="T6">parse your search term as a PILS expression and use it as part of a PILS rule, allowing you to search for particular constructs without knowing the detailed contents.</text:span></text:p>
      <text:p text:style-name="P2">The module tree will update immediately as you type your terms, marking all modules with hits. Their parent modules will also be marked, down to the root, to help finding the hits.</text:p>
      <text:p text:style-name="P2">When you select a module with hits, a hit list will be shown, with line numbers of the hits. As you select the hits, they will be selected automatically in the editing windows of their respective libraries.</text:p>
      <text:h text:style-name="Heading_20_3" text:outline-level="3">How libraries are stored</text:h>
      <text:p text:style-name="Text_20_body"><text:span text:style-name="T12">Libraries have the file type <text:s/></text:span><text:span text:style-name="T11">.pils</text:span><text:span text:style-name="T12"> <text:s/>and are utf-8 text files with CR+LF (DOS/Windows style) line breaks. (If needed, they can be edited with MS Windows Notepad or similar. The program strap manager ignores the extra bytes (BOM) prepended to utf-8 files by Windows applications.</text:span></text:p>
      <text:p text:style-name="P6">A PILS program consists of an optional <text:span text:style-name="T1">program-header </text:span>and a <text:s/>sequence of module entries stored in a utf-8 encoded text file, separated by markers:</text:p>
      <text:p text:style-name="P6"><text:tab/> <text:span text:style-name="T2">library-header</text:span><text:span text:style-name="T11">&gt;&lt;:</text:span><text:span text:style-name="T2">module-header</text:span><text:span text:style-name="T11">&gt;&lt;;</text:span><text:span text:style-name="T2">module-body</text:span><text:span text:style-name="T11">&gt;&lt;:</text:span><text:span text:style-name="T2">module-header</text:span><text:span text:style-name="T11">&gt;&lt;;</text:span><text:span text:style-name="T2">module-body </text:span><text:span text:style-name="T12">...</text:span></text:p>
      <text:p text:style-name="P6"><text:span text:style-name="T12">with any other occurrences of <text:s/></text:span><text:span text:style-name="T11">&gt;&lt;</text:span><text:span text:style-name="T12"> <text:s/>encoded as <text:s/></text:span><text:span text:style-name="T11">&gt;&lt;.</text:span><text:span text:style-name="T12"> <text:s/>(adding a dot) to distinguish them from markers. Their order has no significance; they are sorted by binary string comparisons of the headers, which is fast and convenient when working with non-PILS-aware text editors or versioning systems.</text:span></text:p>
      <text:p text:style-name="P6">Module entries consists of a <text:span text:style-name="T1">module header </text:span>and a <text:span text:style-name="T1">module body</text:span>. A<text:span text:style-name="T12"> module header is a serialised constant node <text:s/></text:span><text:span text:style-name="T11">[module: . <text:s/></text:span><text:span text:style-name="T2">...</text:span><text:span text:style-name="T11">] </text:span><text:span text:style-name="T12"><text:s/>with a mandatory principal</text:span><text:span text:style-name="T11"> </text:span><text:span text:style-name="T12">leg holding the name, and some optional legs such as <text:s/></text:span><text:span text:style-name="T11">language</text:span><text:span text:style-name="T12"> <text:s/>and <text:s/></text:span><text:span text:style-name="T11">timestamp</text:span><text:span text:style-name="T12"> .</text:span><text:span text:style-name="T11"> </text:span><text:span text:style-name="T12">The module name is a list of 1 or more PILS names.</text:span></text:p>
      <text:p text:style-name="P2">The <text:span text:style-name="T1">program-header</text:span>, if present, holds information common to all modules in the program. Its <text:s/><text:span text:style-name="T11">language</text:span> <text:s/>leg, if present, determines what language is used for the module headers.</text:p>
      <text:p text:style-name="P2">When a library is read in, the modules are stored in a node, using the module names as leg names; the leg values are module headers with the module text in the principal leg. The library header is held in the tail leg. This allows modules to be found by fast binary search.</text:p>
      <text:h text:style-name="Heading_20_2" text:outline-level="2">Testing</text:h>
      <text:h text:style-name="Heading_20_3" text:outline-level="3">Local test rules</text:h>
      <text:p text:style-name="Text_20_body">Rules of the form</text:p>
      <text:p text:style-name="Text_20_body"><text:tab/><text:span text:style-name="T11">{ .</text:span><text:span text:style-name="T2">name</text:span><text:span text:style-name="T11"> | :ok </text:span><text:span text:style-name="T2">test-expression</text:span><text:span text:style-name="T11"> }</text:span></text:p>
      <text:p text:style-name="P1">are available through a module's Test menu when the module is in a saved state. When you activate the menu, the rule is called and the result – if any – is displayed in a <text:s/><text:span text:style-name="T11">Result</text:span><text:span text:style-name="T3"> <text:s/></text:span><text:span text:style-name="T5">window. If you do not want to see the result, simply omit the responder.</text:span></text:p>
      <text:p text:style-name="Text_20_body"><text:tab/><text:span text:style-name="T11">{ .</text:span><text:span text:style-name="T2">name</text:span><text:span text:style-name="T11"> | </text:span><text:span text:style-name="T2">test-expression</text:span><text:span text:style-name="T11"> }</text:span></text:p>
      <text:p text:style-name="P1">To make life easier, you can name your test rule like this:</text:p>
      <text:p text:style-name="Text_20_body"><text:tab/><text:span text:style-name="T11">{</text:span><text:span text:style-name="T7"> .test</text:span><text:span text:style-name="T11"> | :ok </text:span><text:span text:style-name="T2">test-expression</text:span><text:span text:style-name="T11"> }</text:span></text:p>
      <text:p text:style-name="P1">The quicktest shortcut</text:p>
      <text:p text:style-name="P1"><text:tab/><text:span text:style-name="T11">Ctrl+T</text:span></text:p>
      <text:p text:style-name="P1">will save your module if not already saved, and then call a <text:s/><text:span text:style-name="T7">.test</text:span><text:span text:style-name="T11"> <text:s text:c="2"/></text:span>rule if it exists.</text:p>
      <text:h text:style-name="Heading_20_3" text:outline-level="3">Test modules</text:h>
      <text:p text:style-name="P1">Test modules serve to define test rules that can be used from all modules in a branch.</text:p>
      <text:p text:style-name="P1">Say you work with a module named <text:s/><text:span text:style-name="T11">[a b c]</text:span> . When you save the module or press <text:s/><text:span text:style-name="T11">Ctrl-T</text:span>, these module names will be searched for test functions in listed order:</text:p>
      <text:p text:style-name="P11"><text:tab/>[a b c]<text:line-break/><text:tab/>[a b c test]<text:line-break/><text:tab/>[a b test]<text:line-break/><text:tab/>[a test]<text:line-break/><text:tab/>[test,]</text:p>
      <text:p text:style-name="P1">For each of these module names, the whole waxball is searched. Every test function is bound to the first module in which it is found.</text:p>
      <text:p text:style-name="P1">If you define your test functions in <text:span text:style-name="T11"><text:s/>[test,]</text:span> , you can use them from everywhere. However, you should consider limiting their scope, or your test menus may become cluttered.</text:p>
      <text:h text:style-name="Heading_20_3" text:outline-level="3">Test projects</text:h>
      <text:p text:style-name="Text_20_body">When testing a library that is to be used with several programs, you may want to include a program for testing, without including it in other programs that use the library. Such a program is called a <text:span text:style-name="T1">test project</text:span><text:span text:style-name="T5">.</text:span></text:p>
      <text:p text:style-name="Text_20_body"><text:span text:style-name="T12">Open the library's <text:s/></text:span><text:span text:style-name="T11">Use libraries</text:span><text:span text:style-name="T12"> <text:s/>panel, add the tester, and mark it with <text:s/></text:span><text:span text:style-name="T11">Ctrl-T</text:span><text:span text:style-name="T12"> . The tester will now be included only when the library is started directly, not when it is loaded by another library.</text:span></text:p>
      <text:h text:style-name="Heading_20_1" text:outline-level="1">GUI programming with PILS</text:h>
      <text:p text:style-name="Text_20_body">GUI programming is done via a PILS library <text:s/><text:span text:style-name="T11">&lt;pils&gt;/english/system/juce/juce</text:span> <text:s/>built on PILS bindings to an underlying system, at present, only <text:s/>Juce is supported, see <text:a xlink:type="simple" xlink:href="http://www.rawmaterialsoftware.com/">http://www.rawmaterialsoftware.com</text:a> . The PILS bindings were generated by a PILS program – plumming-generator.pils – and cover most of the Juce library.</text:p>
      <text:p text:style-name="Text_20_body"><text:soft-page-break/>The relevant PILS library is automatically included in all PILS waxballs and is accessed by <text:span text:style-name="T11"><text:s/>platform <text:s/></text:span><text:span text:style-name="T12">which is an alias for <text:s/></text:span><text:span text:style-name="T11">@ [platform juce entry]</text:span><text:span text:style-name="T12"> , with submodules of this module serving as entrances to the library.</text:span></text:p>
      <text:h text:style-name="Heading_20_2" text:outline-level="2">Windows and panes</text:h>
      <text:p text:style-name="Text_20_body"><text:span text:style-name="T12"><text:tab/></text:span><text:span text:style-name="T11"> <text:s/>platform window [test] textpane text "Once upon a time, " selection (-1, -1) focus</text:span></text:p>
      <text:p text:style-name="Text_20_body"><text:span text:style-name="T12">The expression above creates a window betitled <text:s/></text:span><text:span text:style-name="T11">Test </text:span><text:span text:style-name="T12">, fills it with a text pane with the text </text:span><text:span text:style-name="T11">"Once upon a time" </text:span><text:span text:style-name="T6">and</text:span><text:span text:style-name="T11"> </text:span><text:span text:style-name="T12">positions the caret at the end so you can continue the story.</text:span></text:p>
      <text:p text:style-name="Text_20_body"><text:span text:style-name="T6">User interfaces are generally built by creating a window and populating it with panes, which are created by methods of the parent window or pane. Panes are created from modules <text:s/></text:span><text:span text:style-name="T7">[platform juce parent </text:span><text:span text:style-name="T2">xxx</text:span><text:span text:style-name="T7">]</text:span><text:span text:style-name="T6"> , these are indirectly exposed as methods of windows and panes for which child panes make sense.</text:span></text:p>
      <text:p text:style-name="P2">The set of panes supported by PILS and their interfaces is still subject to changes. On long terms, most of them are likely to be replaced by panes implemented in PILS, using PILS graphs for rendering. Therefore, no extensive documentation is available. To find out how the panes work and what methods they support, please consult the relevant modules in the bindings library.</text:p>
      <text:p text:style-name="P2">Note that the Juce library allows controls to be created independent of their parents, and reparented – whereas PILS panes should be treated as belonging to their parents and not re-parented. This has to do with ensuring their proper deletion: the Juce framework was not constructed for binding to dynamic languages and does not have the notifications required for clean maintaining of wrappers. Therefore, a hack was applied: when panes are orphaned, PILS deletes them.</text:p>
      <text:h text:style-name="Heading_20_2" text:outline-level="2">Events and extenders</text:h>
      <text:p text:style-name="Text_20_body"><text:span text:style-name="T12">To respond to user actions, extend the GUI objects with PILS rules using the <text:s/></text:span><text:span text:style-name="T11">when </text:span><text:span text:style-name="T12"><text:s/>operation</text:span></text:p>
      <text:p text:style-name="P11"><text:tab/>;window platform window [test];<text:line-break/><text:tab/>window textpane<text:line-break/><text:tab/>when {.changed|:who :if who text &lt;$* "ever after."; window close}<text:line-break/><text:tab/>text "Once upon a time, "<text:line-break/><text:tab/>selection (-1, -1) focus</text:p>
      <text:p text:style-name="Text_20_body"><text:span text:style-name="T12">This version automatically closes the window when the text ends with </text:span><text:span text:style-name="T11">"ever after."</text:span><text:span text:style-name="T12"> . Not that the textpane extender is adjoined immediately after the pane is created and refers to the pane through the <text:s/></text:span><text:span text:style-name="T11">:who</text:span><text:span text:style-name="T12"> <text:s/>binder. As a guard against circular references, PILS will not allow you to extend a multiply referenced object so this won't work:</text:span></text:p>
      <text:p text:style-name="P11"><text:tab/>;textpane window textpane;<text:line-break/><text:tab/>textpane when {.changed|:if textpane text &lt;$* "ever after."; window close}</text:p>
      <text:p text:style-name="Text_20_body"><text:span text:style-name="T12">In this case, the </text:span><text:span text:style-name="T11"><text:s/>when <text:s/></text:span><text:span text:style-name="T12">operation will fail and refuse to extend the object, as this would result in a circular reference.</text:span></text:p>
      <text:h text:style-name="Heading_20_1" text:outline-level="1">PILS graphs</text:h>
      <text:p text:style-name="P2">PILS has a built-in lightweight vector graphic format, currently based on the graphic layer of the Juce framewor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style:list-level-properties text:space-before="0.501cm" text:min-label-width="0.499cm" text:min-label-distance="0.499cm"/>
      </text:list-level-style-number>
      <text:list-level-style-number text:level="3" text:style-name="Numbering_20_Symbols" style:num-suffix="." style:num-format="1">
        <style:list-level-properties text:space-before="1cm" text:min-label-width="0.499cm" text:min-label-distance="0.499cm"/>
      </text:list-level-style-number>
      <text:list-level-style-number text:level="4" text:style-name="Numbering_20_Symbols" style:num-suffix="." style:num-format="1">
        <style:list-level-properties text:space-before="1.501cm" text:min-label-width="0.499cm" text:min-label-distance="0.499cm"/>
      </text:list-level-style-number>
      <text:list-level-style-number text:level="5" text:style-name="Numbering_20_Symbols" style:num-suffix="." style:num-format="1">
        <style:list-level-properties text:space-before="2cm" text:min-label-width="0.499cm" text:min-label-distance="0.499cm"/>
      </text:list-level-style-number>
      <text:list-level-style-number text:level="6" text:style-name="Numbering_20_Symbols" style:num-suffix="." style:num-format="1">
        <style:list-level-properties text:space-before="2.501cm" text:min-label-width="0.499cm" text:min-label-distance="0.499cm"/>
      </text:list-level-style-number>
      <text:list-level-style-number text:level="7" text:style-name="Numbering_20_Symbols" style:num-suffix="." style:num-format="1">
        <style:list-level-properties text:space-before="3.001cm" text:min-label-width="0.499cm" text:min-label-distance="0.499cm"/>
      </text:list-level-style-number>
      <text:list-level-style-number text:level="8" text:style-name="Numbering_20_Symbols" style:num-suffix="." style:num-format="1">
        <style:list-level-properties text:space-before="3.502cm" text:min-label-width="0.499cm" text:min-label-distance="0.499cm"/>
      </text:list-level-style-number>
      <text:list-level-style-number text:level="9" text:style-name="Numbering_20_Symbols" style:num-suffix="." style:num-format="1">
        <style:list-level-properties text:space-before="4.001cm" text:min-label-width="0.499cm" text:min-label-distance="0.499cm"/>
      </text:list-level-style-number>
      <text:list-level-style-number text:level="10" text:style-name="Numbering_20_Symbols"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style:num-prefix=" " style:num-suffix=" " style:num-format="1">
        <style:list-level-properties text:space-before="0.002cm" text:min-label-width="0.497cm"/>
      </text:list-level-style-number>
      <text:list-level-style-number text:level="2" text:style-name="Numbering_20_Symbols" style:num-prefix=" " style:num-suffix=" " style:num-format="1" text:start-value="2" text:display-levels="2">
        <style:list-level-properties text:min-label-width="0.497cm"/>
      </text:list-level-style-number>
      <text:list-level-style-number text:level="3" text:style-name="Numbering_20_Symbols" style:num-prefix=" " style:num-suffix=" " style:num-format="1" text:start-value="3" text:display-levels="3">
        <style:list-level-properties text:min-label-width="0.497cm"/>
      </text:list-level-style-number>
      <text:list-level-style-number text:level="4" text:style-name="Numbering_20_Symbols" style:num-prefix=" " style:num-suffix=" " style:num-format="1" text:start-value="4" text:display-levels="4">
        <style:list-level-properties text:space-before="1.503cm" text:min-label-width="0.497cm"/>
      </text:list-level-style-number>
      <text:list-level-style-number text:level="5" text:style-name="Numbering_20_Symbols" style:num-prefix=" " style:num-suffix=" " style:num-format="1" text:start-value="5" text:display-levels="5">
        <style:list-level-properties text:space-before="2.002cm" text:min-label-width="0.497cm"/>
      </text:list-level-style-number>
      <text:list-level-style-number text:level="6" text:style-name="Numbering_20_Symbols" style:num-prefix=" " style:num-suffix=" " style:num-format="1" text:start-value="6" text:display-levels="6">
        <style:list-level-properties text:space-before="2.503cm" text:min-label-width="0.497cm"/>
      </text:list-level-style-number>
      <text:list-level-style-number text:level="7" text:style-name="Numbering_20_Symbols" style:num-prefix=" " style:num-suffix=" " style:num-format="1" text:start-value="7" text:display-levels="7">
        <style:list-level-properties text:space-before="3.003cm" text:min-label-width="0.497cm"/>
      </text:list-level-style-number>
      <text:list-level-style-number text:level="8" text:style-name="Numbering_20_Symbols" style:num-prefix=" " style:num-suffix=" " style:num-format="1" text:start-value="8" text:display-levels="8">
        <style:list-level-properties text:space-before="3.504cm" text:min-label-width="0.497cm"/>
      </text:list-level-style-number>
      <text:list-level-style-number text:level="9" text:style-name="Numbering_20_Symbols" style:num-prefix=" " style:num-suffix=" " style:num-format="1" text:start-value="9" text:display-levels="9">
        <style:list-level-properties text:space-before="4.003cm" text:min-label-width="0.497cm"/>
      </text:list-level-style-number>
      <text:list-level-style-number text:level="10" text:style-name="Numbering_20_Symbols" style:num-prefix=" " style:num-suffix=" " style:num-format="1" text:start-value="10" text:display-levels="10">
        <style:list-level-properties text:space-before="4.504cm" text:min-label-width="0.497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301</meta:generator>
    <dc:date>2011-09-29T17:30:26.09</dc:date>
    <meta:printed-by>Ole Nielsby</meta:printed-by>
    <meta:print-date>2007-10-31T12:25:25</meta:print-date>
    <meta:editing-cycles>280</meta:editing-cycles>
    <meta:editing-duration>P8DT12H9M8S</meta:editing-duration>
    <meta:document-statistic meta:table-count="0" meta:image-count="0" meta:object-count="0" meta:page-count="2" meta:paragraph-count="1141" meta:word-count="18907" meta:character-count="111673"/>
    <meta:user-defined meta:name="Info 1"/>
    <meta:user-defined meta:name="Info 2"/>
    <meta:user-defined meta:name="Info 3"/>
    <meta:user-defined meta:name="Info 4"/>
  </office:meta>
</office:document-meta>
</file>