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text-underline-style="none"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italic" fo:font-weight="bold" style:font-style-asian="italic" style:font-weight-asian="bold" style:font-style-complex="italic" style:font-weight-complex="bold"/>
    </style:style>
    <style:style style:name="P15" style:family="paragraph" style:parent-style-name="Text_20_body">
      <style:text-properties style:text-position="0% 100%" fo:font-weight="bold" style:font-weight-asian="bold" style:font-weight-complex="bold"/>
    </style:style>
    <style:style style:name="P16" style:family="paragraph" style:parent-style-name="Heading">
      <style:text-properties fo:font-size="20pt" fo:font-weight="bold" style:font-size-asian="20pt" style:font-weight-asian="bold" style:font-size-complex="20pt" style:font-weight-complex="bold"/>
    </style:style>
    <style:style style:name="P17" style:family="paragraph" style:parent-style-name="Standard" style:list-style-name="L3"/>
    <style:style style:name="P18" style:family="paragraph" style:parent-style-name="Text_20_body" style:list-style-name="L1"/>
    <style:style style:name="P19" style:family="paragraph" style:parent-style-name="Text_20_body" style:list-style-name="L2">
      <style:text-properties fo:font-weight="normal" style:font-weight-asian="normal" style:font-weight-complex="normal"/>
    </style:style>
    <style:style style:name="P20" style:family="paragraph" style:parent-style-name="Text_20_body" style:list-style-name="L3">
      <style:text-properties fo:font-weight="normal" style:font-weight-asian="normal" style:font-weight-complex="normal"/>
    </style:style>
    <style:style style:name="P21" style:family="paragraph" style:parent-style-name="Text_20_body" style:list-style-name="L4">
      <style:text-properties fo:font-weight="normal" style:font-weight-asian="normal" style:font-weight-complex="normal"/>
    </style:style>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4"/>
    <style:style style:name="P25"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3a036"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0fb48"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3a036" style:font-weight-asian="normal" style:font-weight-complex="normal"/>
    </style:style>
    <style:style style:name="T16" style:family="text">
      <style:text-properties style:text-position="super 58%" fo:font-style="normal" fo:font-weight="normal" style:font-style-asian="normal" style:font-weight-asian="normal" style:font-style-complex="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bold" style:font-weight-asian="bold" style:font-weight-complex="bold"/>
    </style:style>
    <style:style style:name="T19" style:family="text">
      <style:text-properties style:text-position="0% 100%" fo:font-weight="normal" style:font-weight-asian="normal" style:font-weight-complex="normal"/>
    </style:style>
    <style:style style:name="T20" style:family="text">
      <style:text-properties officeooo:rsid="0011a000"/>
    </style:style>
    <style:style style:name="T21" style:family="text">
      <style:text-properties officeooo:rsid="00125488"/>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ILS programmeringssproget</text:p>
      <text:h text:style-name="Heading_20_1" text:outline-level="1">Indledning</text:h>
      <text:p text:style-name="Text_20_body">PILS programmeringssproget og -systemet er udviklet af mig (Ole Nielsby) fra 1979 til 2008, oprindelig som et forsøg på at forbedre på Lisp, men under inflydelse af Prolog, C++, XSLT og SQL, og visse egenskaber ved dansk talesprog udviklede det sig efterhånden til noget ganske andet.</text:p>
      <text:p text:style-name="Text_20_body">Ligesom Lisp bruger PILS samme datamodel for programmer og data, men hvor Lisp bruger lister, bruger PILS attributbaserede noder som byggesten for datamodellen. For kortheds skyld kaldes attributterne for <text:span text:style-name="T1">ben. </text:span><text:span text:style-name="T6">Efter inspiration fra Prolog er de simple funktioner i Lisp erstattet af regelsæt hvor data skal indpasses i en pasform, og efter inspiration fra C++ håndteres disse regelsæt som objekter og kan kombineres på mange måder.</text:span></text:p>
      <text:p text:style-name="Text_20_body">PILS er velegnet til projekter af mange slags, så længe der ikke er brug for tung talknusning eller mere finkornet synkronisering end PILS kan tilbyde. PILS er udstyret med en omfattende samling <text:s/>tekst- og listebehandlingsoperationer, og programmeringssystemet er, trods sin lille størrelse, ganske modent og fleksibelt, med understøttelse af fejludpegning i kildeteksterne. Bindinger til juce-biblioteket og flertrådning giver mulighed for velfungerende grafiske brugerflader, selvom bindingerne og biblioteket de er pakket ind i, ikke kan betegnes som fuldt udstyrede.</text:p>
      <text:h text:style-name="Heading_20_2" text:outline-level="2">Vilkår for brug, udvikling og redistribution</text:h>
      <text:p text:style-name="Text_20_body">Kildeteksterne til PILS systemet er <text:span text:style-name="T1">public domain </text:span>(det betyder at du kan gøre hvad der passer dig med dem) pånær grafikbiblioteket Juce, se<text:span text:style-name="T13"> <text:s/></text:span><text:a xlink:type="simple" xlink:href="http://www.rawmaterialsoftware.com/juce/" text:style-name="Internet_20_link" text:visited-style-name="Visited_20_Internet_20_Link"><text:span text:style-name="T13">http://www.rawmaterialsoftware.com/juce/</text:span></text:a><text:span text:style-name="T13"> </text:span><text:s/>som er underlagt GPL2 med mindre der betales licens.</text:p>
      <text:p text:style-name="Text_20_body">PILS er konstrueret til åbne kildetekster og understøtter ikke sløring eller kompilering.</text:p>
      <text:p text:style-name="Text_20_body">Militære institutioner og våbenindustri skal ikke vente sig samarbejde fra min side; ellers hjælper jeg gerne med anvendelse af PILS hvis det er muligt.</text:p>
      <text:h text:style-name="Heading_20_2" text:outline-level="2">Hvordan skal dette dokument læses</text:h>
      <text:p text:style-name="Text_20_body">Jeg har forsøgt at arrangere materialet i en rækkefølge der giver mening, men de lidt indviklede indbyrdes afhængigheder mellem sproget og programmeringssystemet betyder at nogle afsnit nødvendigvis må referere til materiale der forklares senere i dokumentet. Hvis du er nybegynder med PILS, bør du nok først læse det igennem og fatte så meget du nu kan, og så prøve lidt PILS programmering, og derefter læse dokumentet igen.</text:p>
      <text:h text:style-name="Heading_20_2" text:outline-level="2">Nogle generelle egenskaber ved PILS</text:h>
      <text:list text:style-name="L1">
        <text:list-item>
          <text:p text:style-name="P18">PILS har – eller forsøger at tilbyde – en programmørvenlig syntaks over en a Lisp/XML-agtig datamodel.</text:p>
        </text:list-item>
        <text:list-item>
          <text:p text:style-name="P18">PILS er et rent funktionelt programmeringssprog; noder, lister og tekststrenge kan ikke ændres når de først er skabt. Dette udnyttes internt i fortolkeren til omfattende specialisering af noderne efter deres indhold.</text:p>
        </text:list-item>
        <text:list-item>
          <text:p text:style-name="P18">PILS har dynamiske typer og leksikalsk navnebinding. Objekter opbygges ved at binde regelsæt og kombinere dem. Fremmede objekter – såsom brugerfladekomponenter – kan udbygges eller kombineres med PILS objekter.</text:p>
        </text:list-item>
        <text:list-item>
          <text:p text:style-name="P18">Fejludpegning i PILS kildekode understøttes af en modellering af <text:span text:style-name="T1">ansvar</text:span><text:span text:style-name="T6">, sammen med en</text:span> parserfunktion der rapporterer positioner i kildeteksten.</text:p>
        </text:list-item>
        <text:list-item>
          <text:p text:style-name="P18">Referencetællerbaseret lagerhåndtering med øjeblikkelig frigivelse sikrer hurtig automatisk frigivelse af resurser.<text:line-break/>Bemærk at den form for lagerhåndtering der bruges af Java og .NET, er uegnet som grundlag for PILS datamodellen, der udnytter de faste adresser til hurtige opslag og sorteringer. Der er ingen planer om at tilpasse PILS til disse systemer.</text:p>
        </text:list-item>
        <text:list-item>
          <text:p text:style-name="P18">Indbyggede operationer har forrang over de der defineres af regelsæt; du kan ikke omdefinere <text:s/><text:span text:style-name="T13">2 + 2</text:span> til at give <text:s/><text:span text:style-name="T13">5</text:span><text:span text:style-name="T14"> , med mindre </text:span>du bruger et sprogobjekt til at oversætte <text:s/><text:span text:style-name="T13">+</text:span> <text:s/>til et andet symbol. Men regelsættene kan udvide de indbyggede operatorer ved at behandle tilfælde som ikke håndteres af de indbyggede regler, som beregninger på talpar.</text:p>
        </text:list-item>
        <text:list-item>
          <text:p text:style-name="P18">PILS programmer udføres af en fortolker der oprindelig er skrevet i assembler og senere genskrevet i uhumsk C++. Kildeteksterne er tilgængelige men dårligt dokumenterede. Pasformer kompileres til blokke af C++ -objekter med specialiserede metoder for genkendelse.</text:p>
        </text:list-item>
      </text:list>
      <text:h text:style-name="Heading_20_2" text:outline-level="2">Byggestenene i datamodellen</text:h>
      <text:p text:style-name="Text_20_body">Grundstenen i PILS datamodellen er <text:span text:style-name="T1">noden</text:span><text:span text:style-name="T6">,</text:span><text:span text:style-name="T1"> </text:span><text:span text:style-name="T6">bestående af et nodenavn og et eller flere unikt navngivne </text:span>attributter, kaldet <text:span text:style-name="T1">ben</text:span>. Nodenavnet og benenes navne kan være vilkårlige konstanter, herunder konstante noder. Benenes værdier er vilkårlige PILS data.</text:p>
      <text:p text:style-name="Text_20_body">Nodenavnet og benenes navne gemmes i en kliche der er fælles for alle noder med netop den kombination af nodenavn og bennavne, uanset benenes rækkefølge.</text:p>
      <text:p text:style-name="Text_20_body">Udover noder og klicheer har PILS lister, tal, tekststrenge samt nogle mere specialiserede typer. Tekststrengene er utf-8-kodede, tallene er flydende tal med fuld præcision (<text:span text:style-name="T1">doubles,</text:span><text:span text:style-name="T6"> typisk 15-16 cifres nøjagtighed) hvoraf heltallene er et specialtilfælde, </text:span>lister er følger der tælles fra 1 og behandles efter samlebåndsprincip når det er muligt: når en liste sendes igennem en serie operationer, sker det ved at ét element ad gangen sendes igennem samtlige operationer.</text:p>
      <text:h text:style-name="Heading_20_2" text:outline-level="2">Konstanter og udtryk</text:h>
      <text:p text:style-name="Text_20_body">Alt efter hvordan fortolkeren håndterer dem, kan alle PILS data klassificeres som <text:span text:style-name="T1">konstanter</text:span><text:span text:style-name="T6"> eller </text:span><text:span text:style-name="T1">udtryk</text:span><text:span text:style-name="T6">. Både konstanter og udtryk er uforanderlige, men konstanter er kendetegnet ved at der ikke sker noget når de fortolkes, og det eneste der kan indpasses i en konstant pasform, er den selvsa</text:span><text:span text:style-name="T7">m</text:span><text:span text:style-name="T6">me konstant. Udtryk kan derimod resultere i noget andet ved tolkning, og noget andet kan indpasses i et udtryk der står som pasform.</text:span></text:p>
      <text:p text:style-name="P5">Konstanter har ingen identitet og er altid unikt repræsenterede. Når en konstant dannes, eftersøges den først i en global hashtabel.</text:p>
      <text:p text:style-name="Text_20_body">Alle programmeringskonstruktioner repræsenteres af noder med særlige navne. Sådanne noder samt noder og lister der indeholder dem, er<text:span text:style-name="T6"> udtryk, alle andre data er konstanter. Udtryk har identitet og kan dermed lokaliseres i kildeteksterne af programmeringssystemet.</text:span></text:p>
      <text:p text:style-name="P5">Fremmede objekter behandles som konstanter, selvom de – i modsætning til PILS noder og lister – kan have tilstand.</text:p>
      <text:h text:style-name="Heading_20_2" text:outline-level="2">Regler, pasformer og objekter</text:h>
      <text:p text:style-name="P5">PILS objekter opbygges af regelsæt – lister af regler af form <text:s/><text:span text:style-name="T13">{</text:span><text:span text:style-name="T2">pasform</text:span><text:span text:style-name="T13">|</text:span><text:span text:style-name="T2">handling</text:span><text:span text:style-name="T13">} </text:span><text:span text:style-name="T14">. Når et regelsæt tolkes, bindes det til den aktuelle kontekst og danner et objekt der kan udføre et kald ved at prøve de regler hvor kaldet kan indpasses i pasformen. For at et kald skal lykkes, skal handlingen </text:span><text:span text:style-name="T2">tage ansvar</text:span><text:span text:style-name="T14">, typisk med ansvarstageren <text:s/></text:span><text:span text:style-name="T13">:ok</text:span><text:span text:style-name="T14"> .</text:span></text:p>
      <text:p text:style-name="P2">Regelsæt kan oprettes dynamisk ved simpel konstruktion af noder af en bestemt form – de kompileres og indekseres automatisk og straks. Bundne regelsæt knyttes sammen i bundter og håndteres under et.</text:p>
      <text:p text:style-name="P5">Ved indpasning i pasformer udnyttes konstanternes unikke repræsentation; tit kan komplekse strukturer genkendes eller afvises ud fra simple adressesammenligninger. Der er en omkostning ved at oprette dem, men det opvejes som regel af den hurtige genkendelse, undtagen for talknusning, som sinkes af de indpakninger og <text:s/>opslag der er nødvendige for at indpasse tallene i en datamodel der er konstrueret til genkendelse og søgning.</text:p>
      <text:h text:style-name="Heading_20_2" text:outline-level="2">Fejlhåndtering</text:h>
      <text:p text:style-name="P5">PILS har et finkornet fejlhåndteringssystem der vistnok ikke findes tilsvarende andetsteds.</text:p>
      <text:p text:style-name="P5">I sprog med dynamiske typer kan det være svært at finde fejlkilder, fordi mange fejl udløses på uventede steder i koden, langt væk fra de programmeringsfejl som forårsager dem.</text:p>
      <text:p text:style-name="P5">PILS afhjælper dette problem med <text:span text:style-name="T1">ansvarsfralæggelse </text:span>– en regel kan lægge ansvaret for en operation på det udtryk som har kaldt reglen. Det gøres med ansvarsfralæggerne <text:s/><text:span text:style-name="T13">:prøv</text:span><text:span text:style-name="T14"> <text:s/>og <text:s/></text:span><text:span text:style-name="T13">:kræv </text:span><text:span text:style-name="T14">.</text:span></text:p>
      <text:p text:style-name="P5">Mekanismen har en vis lighed med det der går under navnet <text:span text:style-name="T1">structured exception handling</text:span>, men PILS ansvarshåndtering er mere finkornet og bruger leksikalsk binding.</text:p>
      <text:h text:style-name="Heading_20_2" text:outline-level="2">Programmeringssystemet</text:h>
      <text:p text:style-name="P2">PILS projekter lagres i PILS biblioteksfiler – flade utf-8-tekstfiler der <text:s/>indeholder en liste over andre brugte biblioteker, efterfulgt af en liste navngivne PILS moduler. Modulnavnene er lister af PILS navne, der vises som et træ af programmeringssystemet.</text:p>
      <text:p text:style-name="P5"><text:span text:style-name="T14">Når en PILS fil åbnes, oprettes der en </text:span><text:span text:style-name="T2">programstrop</text:span><text:span text:style-name="T14">, der sammenfletter filen med de biblioteker den bruger, samt konfigurationsfiler og de biblioteker der udgør programmeringssystemet.</text:span></text:p>
      <text:p text:style-name="P2">PILS fortolkeren har bindinger til juce-biblioteket. Bindingerne bruges gennem et platformsbibliotek der skjuler visse platformsspecifikke detaljer og i øvrigt muliggør at programmeringen kan ske med danske termer.</text:p>
      <text:h text:style-name="Heading_20_2" text:outline-level="2">Installation og kørsel på MS Windows</text:h>
      <text:p text:style-name="P5">PILS leveres som et installationsprogram der er genereret med InnoSetup – installationsbrugerfladen vil være velkendt for de fleste brugere. PILS fortolkeren er statisk linket mod runtime-bibliotekerne i Visual C++ 2008 Express, og kræver ingen specielle biblioteker på maskinen. En afinstalleringsfunktion er inkluderet.</text:p>
      <text:p text:style-name="P5">Den indeværende version af PILS er udviklet og testet på en dansk Windows XP.</text:p>
      <text:h text:style-name="Heading_20_1" text:outline-level="1">Syntaks og datamodel</text:h>
      <text:h text:style-name="Heading_20_2" text:outline-level="2">Konstantsyntaks</text:h>
      <text:h text:style-name="Heading_20_3" text:outline-level="3">Tal</text:h>
      <text:p text:style-name="Text_20_body">Tal skrives som vant, med foranstillet <text:s/><text:span text:style-name="T13">-</text:span> <text:s/>for negative tal, <text:span text:style-name="T14">Et eventuelt decimaltegnet skal stå mellem to cifre, både <text:s/></text:span><text:span text:style-name="T13">,</text:span><text:span text:style-name="T14"> <text:s/>(komma) og <text:s/></text:span><text:span text:style-name="T13">.</text:span><text:span text:style-name="T14"> <text:s/>(punktum) kan bruges. Heltal kan skrives h</text:span>exadecimalt som i C.</text:p>
      <text:h text:style-name="Heading_20_3" text:outline-level="3">Tekststrenge</text:h>
      <text:p text:style-name="Text_20_body"><text:span text:style-name="T14">Tekststrenge kan skrives som vilkårlige tegnfølger afgrænset af <text:s/></text:span><text:span text:style-name="T13">" <text:s/></text:span><text:span text:style-name="T14">(anførselstegn, ASCII kode 34), disse skal skrives dobbelt hvis de forekommer i teksten.</text:span></text:p>
      <text:p text:style-name="P10"><text:tab/>"Dette er en tekststreng med et anførselstegn """</text:p>
      <text:p text:style-name="Text_20_body"><text:span text:style-name="T14">Efter det afsluttende <text:s/></text:span><text:span text:style-name="T13">"</text:span><text:span text:style-name="T14"> <text:s/>kan følge en </text:span><text:span text:style-name="T2">skraber</text:span><text:span text:style-name="T14"> – en sekvens af tocifrede hexadecimale bytes, dobbeltskrevne anførselstegn og </text:span><text:span text:style-name="T2">skrabetegn</text:span><text:span text:style-name="T8">.</text:span></text:p>
      <text:p text:style-name="P2">Skrabetegnene er:</text:p>
      <text:p text:style-name="Text_20_body"><text:span text:style-name="T8"><text:tab/></text:span><text:span text:style-name="T9">= </text:span><text:span text:style-name="T8"><text:s/>for LF (Linjeskift, standard i Unix og PILS)<text:line-break/><text:tab/></text:span><text:span text:style-name="T9">&lt; <text:s/></text:span><text:span text:style-name="T8">for CR (Macintosh linjeskift)<text:line-break/><text:tab/></text:span><text:span text:style-name="T9">&gt;</text:span><text:span text:style-name="T8"> <text:s/>for TAB<text:line-break/><text:tab/></text:span><text:span text:style-name="T9">~</text:span><text:span text:style-name="T8"> <text:s/>eller <text:s/></text:span><text:span text:style-name="T9">*</text:span><text:span text:style-name="T8"> <text:s/>for NULL<text:line-break/><text:tab/></text:span><text:span text:style-name="T9">/</text:span><text:span text:style-name="T8"> <text:s/>for CR+LF (DOS/Windows linjeskift)</text:span></text:p>
      <text:p text:style-name="P2">Eksempel:</text:p>
      <text:p text:style-name="P10"><text:tab/>"Denne tekststreng slutter med et linjeskift"=</text:p>
      <text:p text:style-name="P2">Efter en skraber kan følge mere tekst.</text:p>
      <text:p text:style-name="P7"><text:tab/>"Dette er en tekst"="på to linjer"=</text:p>
      <text:p text:style-name="Text_20_body"><text:span text:style-name="T8">Tekststrenge kan deles over flere linjer med <text:s/></text:span><text:span text:style-name="T9">-</text:span><text:span text:style-name="T8"> <text:s/>(delestreg).</text:span></text:p>
      <text:p text:style-name="P7"><text:tab/>"Dette er en tekststreng på en enkelt linje "-<text:line-break/><text:tab/>"som er fordelt på to linjer i kildeteksten."</text:p>
      <text:p text:style-name="P2">Kodningen er altid utf-8, dvs. æ, ø og å repræsenteres som to-byte-sekvenser.</text:p>
      <text:p text:style-name="P2">Tal og tekststrenge kan bruges direkte som navne for noder og ben.</text:p>
      <text:h text:style-name="Heading_20_3" text:outline-level="3">Tidsstempler, dateringer, varigheder og farver</text:h>
      <text:p text:style-name="Text_20_body">PILS har tre indbyggede typer til håndtering af tid.</text:p>
      <text:p text:style-name="Text_20_body"><text:span text:style-name="T4">Tidsstempler</text:span> lagres som GMT, men skrives i lokal tid med tidszoneangivelse:</text:p>
      <text:p text:style-name="Text_20_body"><text:tab/><text:span text:style-name="T13">2008-12-06T19:00:05.161+01:00</text:span></text:p>
      <text:p text:style-name="Text_20_body">Minutter, sekunder og millisekunder kan udelades, ligesom minutterne kan udelades i tidszoneangivelsen. GMT kan betegnes med <text:s/><text:span text:style-name="T13">+00:00</text:span> , <text:s/><text:span text:style-name="T13">+00</text:span> <text:s/>eller <text:s/><text:span text:style-name="T13">Z</text:span> .</text:p>
      <text:p text:style-name="Text_20_body"><text:span text:style-name="T4">Dateringer</text:span> er abstrakte tidsangivelser bestående af dato og klokkeslæt, men uden tilknytning til en tidszone. De skrives som tidsstempler, blot uden tidszoneangivelsen.</text:p>
      <text:p text:style-name="Text_20_body"><text:span text:style-name="T4">Varigheder</text:span> skrives som:</text:p>
      <text:p text:style-name="Text_20_body"><text:tab/><text:span text:style-name="T13">1001d5h20m4.567s</text:span></text:p>
      <text:p text:style-name="Text_20_body">for 1001 døgn, 5 timer, 20 minutter, 4 sekunder og 567 millisekunder. Der er ingen understøttelse for uger, måneder og år. Dele af angivelsen kan udelades; f.eks. kan et kvarter skrives:</text:p>
      <text:p text:style-name="Text_20_body"><text:tab/><text:span text:style-name="T13">15m</text:span></text:p>
      <text:p text:style-name="P1">Varigheder kan være negative:</text:p>
      <text:p text:style-name="P1"><text:tab/><text:span text:style-name="T13">-3h20m</text:span></text:p>
      <text:p text:style-name="P1">står for minus tre timer og 20 minutter.</text:p>
      <text:p text:style-name="Text_20_body"><text:span text:style-name="T14">Decimaltegnet er altid <text:s/></text:span><text:span text:style-name="T13">.</text:span><text:span text:style-name="T14"> <text:s/>i tidsangivelser, og bruges kun til at skille sekunder fra millisekunder.</text:span></text:p>
      <text:p text:style-name="Text_20_body"><text:span text:style-name="T4">Farver </text:span><text:span text:style-name="T8">skrives som <text:s/></text:span><text:span text:style-name="T9">#</text:span><text:span text:style-name="T8"> <text:s/>efterfulgt af </text:span>RGB (rød-grøn-blå) værdier samt en evt. alfa-værdi der angiver graden af uigennemsigtighed, hver med to hexadecimale cifre, som i HTML. Hvis alfa-værdien ikke angives, sættes den til 0xff.</text:p>
      <text:p text:style-name="Text_20_body"><text:tab/><text:span text:style-name="T13">#ffff00</text:span><text:tab/><text:span text:style-name="T1">gul</text:span><text:line-break/><text:tab/><text:span text:style-name="T13">#ffff00ff</text:span><text:tab/><text:span text:style-name="T1">gul, med angivet alfa-værdi</text:span></text:p>
      <text:p text:style-name="P5">For nærværende understøttes kun 8 bits farvekanaler.</text:p>
      <text:h text:style-name="Heading_20_3" text:outline-level="3">Konstantklammer [ ... ]</text:h>
      <text:p text:style-name="P2">Sammensatte konstanter (klicheer, noder og lister) sættes gerne i <text:span text:style-name="T1">konstantklammer </text:span><text:s/><text:span text:style-name="T13">[ ]</text:span> . For klicheer er klammerne påkrævede, for noder og lister kan de udelades når sammenhængen udelukker andre læsningsmuligheder. Indenfor konstantklammer gælder forsimplede syntaksregler: de konstruktioner der er nævnt i afsnittet om udtryk er ikke gyldige, navne og operatorer læses som simple konstanter. Eksempel:</text:p>
      <text:p text:style-name="P2"><text:span text:style-name="T13"><text:tab/>2 + 2 <text:s text:c="3"/></text:span>er et udtryk der giver værdien <text:s/><text:span text:style-name="T13">4</text:span></text:p>
      <text:p text:style-name="P2"><text:span text:style-name="T13"><text:tab/>[2 + 2] <text:s text:c="3"/></text:span>er en liste af tre konstanter <text:s/><text:span text:style-name="T13">2 </text:span>,<text:span text:style-name="T13"> <text:s/>[+] <text:s/></text:span>og <text:s/><text:span text:style-name="T13">2</text:span></text:p>
      <text:h text:style-name="Heading_20_3" text:outline-level="3">Klicheer, noder og lister</text:h>
      <text:p text:style-name="Text_20_body"><text:span text:style-name="T8">Klicheer: <text:s/></text:span><text:span text:style-name="T9">[</text:span><text:span text:style-name="T2">nodenavn</text:span><text:span text:style-name="T9">|</text:span><text:span text:style-name="T2">ben-navn</text:span><text:span text:style-name="T9">|</text:span><text:span text:style-name="T2">ben-navn ...</text:span><text:span text:style-name="T9">]</text:span></text:p>
      <text:p text:style-name="P1"><text:span text:style-name="T6">Nodekonstanter: <text:s/></text:span><text:span text:style-name="T1">node-navn</text:span><text:span text:style-name="T9">: .</text:span><text:span text:style-name="T1">ben-navn</text:span><text:span text:style-name="T9"> </text:span><text:span text:style-name="T1">ben-værdi ...</text:span></text:p>
      <text:p text:style-name="P2">Listekonstanter: <text:s/><text:span text:style-name="T1">element</text:span><text:span text:style-name="T13">,</text:span><text:span text:style-name="T4"> </text:span><text:span text:style-name="T1">...</text:span><text:span text:style-name="T13"> <text:s text:c="3"/></text:span>idet <text:s/><text:span text:style-name="T13">,</text:span> <text:s/>efter det sidste element kan udelades</text:p>
      <text:p text:style-name="P2">Den tomme liste <text:s/><text:span text:style-name="T13">[]</text:span> <text:s/>kan udelades når det ikke muliggør fejllæsninger. Indenfor konstantklammer betegner <text:s/><text:span text:style-name="T13">?</text:span> <text:s/>den tomme liste.</text:p>
      <text:p text:style-name="P2">I konstante noder kan ben-værdierne udelades når de er identiske med benets navn.</text:p>
      <text:p text:style-name="Text_20_body">Noderne er <text:span text:style-name="T1">grådige</text:span><text:span text:style-name="T6">:</text:span><text:span text:style-name="T1"> </text:span><text:s/>når som helst en node begynder, strækker den sig så langt det er muligt. I konsekvens af dette er der sjældent brug for parenteser ved indlejrede kontrolstrukturer.</text:p>
      <text:p text:style-name="P2">Indenfor konstantklammer kan listekonstanter med to eller flere elementer skrives på <text:span text:style-name="T1">kortform </text:span>uden kommaer. Lister på kortform kan indlægges i kommaadskilte lister, som i denne matrix:</text:p>
      <text:p text:style-name="P7"><text:tab/>[1 0 0, 0 1 0, 0 0 1]</text:p>
      <text:p text:style-name="P2">Man bør undgå at skrive lister af tekststrenge på kortform, da det kan lede til forvirrende syntaks. Skriv:</text:p>
      <text:p text:style-name="P2"><text:tab/><text:span text:style-name="T13">s *=* ["skidt", "godt"]</text:span></text:p>
      <text:p text:style-name="P2">fremfor</text:p>
      <text:p text:style-name="P7"><text:tab/>s *=* ["skidt" "godt"]</text:p>
      <text:h text:style-name="Heading_20_3" text:outline-level="3">Haler og forben</text:h>
      <text:p text:style-name="P2">En <text:span text:style-name="T1">hale </text:span>er et ben hvis navn er den tomme liste <text:s/><text:span text:style-name="T13">[]</text:span> . PILS fortolkeren sammenkæder mange strukturer ved halerne. Halen kan skrives hvor man ønsker det – umiddelbart efter nodehovedet:</text:p>
      <text:p text:style-name="P2"><text:tab/><text:span text:style-name="T13">node:</text:span> <text:span text:style-name="T1">hale</text:span></text:p>
      <text:p text:style-name="P2">eller senere, med brug af <text:s/><text:span text:style-name="T13">;</text:span> <text:s/>(semikolon)</text:p>
      <text:p text:style-name="P2"><text:span text:style-name="T13"><text:tab/>node: .navn værdi;</text:span> <text:span text:style-name="T1">hale</text:span></text:p>
      <text:p text:style-name="P2">Halen kan efterfølges af flere ben.</text:p>
      <text:p text:style-name="P2">Halen skal adskilles fra det foranstående <text:s/><text:span text:style-name="T13">: <text:s/></text:span>eller <text:s/><text:span text:style-name="T13">;</text:span> <text:s/>af mellemrum.</text:p>
      <text:p text:style-name="P2">Et <text:span text:style-name="T1">forben </text:span>er et ben med samme navn som noden. Dette har ingen speciel betydning i PILS undtagen i ordvælger-noder som beskrevet i det efterfølgende, men hvis forbenet sættes først, kan navnet udelades:</text:p>
      <text:p text:style-name="P2"><text:tab/><text:span text:style-name="T13">besked: . "Halløj"</text:span> <text:s text:c="3"/>er det samme som <text:s text:c="3"/><text:span text:style-name="T13">besked: .besked "Halløj"</text:span></text:p>
      <text:h text:style-name="Heading_20_3" text:outline-level="3">Ord og sprog</text:h>
      <text:p text:style-name="Text_20_body">PILS datamodellen giver stor frihed hvad navne angår: enhver konstant, herunder konstante noder og lister, kan bruges som navn på en node eller et ben, selvom det almindeligste er at bruge <text:s/><text:span text:style-name="T1">navneklicheer</text:span><text:span text:style-name="T6"> som navne.</text:span></text:p>
      <text:p text:style-name="Text_20_body"><text:span text:style-name="T6">En </text:span><text:span text:style-name="T1">navnekliche </text:span><text:span text:style-name="T6">er en kliche af to tekststrenge <text:s/></text:span><text:span text:style-name="T9">[</text:span><text:span text:style-name="T2">ordklassenøgle</text:span><text:span text:style-name="T9">|</text:span><text:span text:style-name="T2">navnestreng</text:span><text:span text:style-name="T9">]</text:span><text:span text:style-name="T8"> , som typisk frembringes ved at parse et navn med et eventuelt ordklasse-præfix, via en </text:span><text:span text:style-name="T2">sprognode.</text:span></text:p>
      <text:p text:style-name="P2">En sprognode oversætter præfixerne til ordvælger-nøgler, og kan oversætte bestemte navnestrenge til bestemte konstanter for et givet præfix, hvorved PILS tilpasses til nøgleord på forskellige sprog. Sprogobjekter bruges også i forbindelse med brugergrænseflader, til oversættelse af navne og meddelelser.</text:p>
      <text:p text:style-name="Text_20_body"><text:span text:style-name="T8">Alle de indbyggede navne der genkendes af PILS fortolkerkernen, har <text:s/></text:span><text:span text:style-name="T9">"pils.org/ns/sne" </text:span><text:span text:style-name="T8">som ordklassenøgle; <text:s/></text:span><text:span text:style-name="T9">sne <text:s/></text:span><text:span text:style-name="T8">er et akronym for </text:span><text:span text:style-name="T2">Scandinavian Nerd-English</text:span><text:span text:style-name="T8">, nemlig den slags engelsk vi bruger her til lands når vi gør os kloge på ting vi ikke ved hvad hedder på dansk.</text:span></text:p>
      <text:p text:style-name="P2">Ideen om lokaltilpassede – eller flersprogede – programmeringssprog har været lagt på is siden der gik ged i makroerne fra lokaliserede tekstbehandlings- og regnearkprogrammer en gang for længe siden; men PILS er grundlæggende designet til flersproget brug, og det fungerer uden de store problemer.</text:p>
      <text:h text:style-name="Heading_20_3" text:outline-level="3">Ordklasser og sprognoder</text:h>
      <text:p text:style-name="P2">Parsning styres altid af en sprognode:</text:p>
      <text:p text:style-name="P2"><text:span text:style-name="T13"><text:tab/>[sprog: </text:span><text:span text:style-name="T1">sprogdefinitionsnode</text:span><text:span text:style-name="T13">]</text:span></text:p>
      <text:p text:style-name="P2">hvor<text:span text:style-name="T1"> sprogdefinitionsnode </text:span>er en nodekonstant hvis navn er en tekststreng, og hvis tekststreng-benævnte ben har <text:span text:style-name="T1">ordklasse-noder</text:span> som værdier. Benenes navne bruges som ordklasse-præfixer. Der skal være et forben, som gælder for navne uden præfix..</text:p>
      <text:p text:style-name="P2">En <text:span text:style-name="T1">ordklasse-node </text:span>er en nodekonstant hvis navn bruges som ordklassenøgle for navne der ikke oversættes. De af ordklassenodens<text:span text:style-name="T1"> </text:span>ben der har tekststrenge som navne, definerer oversættelser. Hvis nodenavnet er <text:s/><text:span text:style-name="T13">- </text:span>, tillades kun oversatte navne; dette er nyttigt for kontrollerede ordklasser.</text:p>
      <text:p text:style-name="P2">Sprogdefinitionsnodens hale er en <text:span text:style-name="T1">skrive-kontrolstreng</text:span> på to bytes, hvoraf den første opfattes som flag der styrer brugen af forskellige syntaktiske konventioner ved udskrift, mens den sidste byte <text:s/>bruges som decimaltegn og bør være <text:s/><text:span text:style-name="T13">"."</text:span> <text:s/>eller <text:s/><text:span text:style-name="T13">","</text:span> .</text:p>
      <text:p text:style-name="P2">Skrivekontrolflagene er:</text:p>
      <text:p text:style-name="P2">0x01<text:line-break/><text:tab/>Kontroltegn i tekststrenge skrives som kontrolsekvenser<text:line-break/><text:tab/>(beskytter mod dos/unix linjeskift og nul-tegnkoder)<text:line-break/>0x02<text:line-break/><text:tab/>alle ikke-ASCII-tegn skrives som kontrolsekvenser<text:line-break/><text:tab/>(muliggør PILS udskrift som ren ASCII)<text:line-break/>0x04<text:line-break/><text:tab/>data der ikke overholder utf-8-reglerne, tillades i udskriften<text:line-break/><text:tab/>(normalt vil sådanne data blive udskrevet som kontrolsekvenser)<text:line-break/><text:tab/>(dette sparer plads når binære data skrives som tekststrenge)<text:line-break/>0x10<text:line-break/><text:tab/>alle navne skrives som klicheer med tekststrenge<text:line-break/><text:tab/>(omstændeligt, men uafhængigt af sprog)<text:line-break/>0x20<text:line-break/><text:tab/>sukker-fri, udtryk og regelsæt skrives med den grundlæggende nodesyntaks<text:line-break/><text:tab/>(instruktivt – viser hvordan PILS parser dine udtryk)</text:p>
      <text:p text:style-name="P2">Alle kombinationer er tilladt; 0x02 har forrang for 0x04. Kontrolsekvens-flagene gælder både for navne og tekststrenge; hvis et navn indeholder tegn der skal skrives som kontrolsekvenser, skrives det som tekststreng.</text:p>
      <text:p text:style-name="P2">Parseren påvirkes ikke af skrivekontrolstrengen; både <text:s/><text:span text:style-name="T13">"."</text:span> <text:s/>og <text:s/><text:span text:style-name="T13">"," <text:s/></text:span>kan bruges som decimaltegn, uanset hvad der er angives i skrivekontrolstrengen.</text:p>
      <text:p text:style-name="P2">PILS starter op med en sprognode omtrent som vist her (gengivet på engelsk):</text:p>
      <text:p text:style-name="P7"><text:tab/>[ language:<text:line-break/><text:tab/> <text:s/>"system": <text:s/><text:span text:style-name="T2">! standard-ordklassepræfix</text:span><text:line-break/><text:tab/> <text:s/>."system" ["pils.org/ns/sne":] <text:s/><text:span text:style-name="T2">! standard-ordklassenøgle</text:span><text:line-break/><text:tab/> <text:s/>."pils-configuration" <text:s/><text:span text:style-name="T2">! hjælpe-ordklasse</text:span><text:line-break/><text:tab/> <text:s text:c="3"/>[-: <text:s/><text:span text:style-name="T2">! kun de følgende oversatte navne tillades i denne ordklasse</text:span><text:line-break/><text:tab/> <text:s text:c="5"/>."platform". "juce"<text:span text:style-name="T2"> <text:s/>! værdier som bruges af opstartsprocessen</text:span><text:line-break/><text:tab/> <text:s text:c="5"/>."system". "Win32" <text:s/><text:span text:style-name="T2">! indsæt selv dit foretrukne OS her</text:span><text:line-break/><text:span text:style-name="T2"> <text:s text:c="24"/>! (andre indstillinger er udeladt her for kortheds skyld)</text:span><text:line-break/><text:tab/> <text:s text:c="3"/>]<text:line-break/><text:tab/> <text:s/>;<text:line-break/><text:tab/> <text:s/>""01"." <text:span text:style-name="T2"><text:s/>! skrivekontrolflag 0x01, punktum som decimaltegn</text:span> <text:line-break/><text:tab/>]</text:p>
      <text:p text:style-name="P2">I dette særlige tilfælde oversættes navne som <text:s/><text:span text:style-name="T13">pils-configuration:platform <text:s/></text:span>til tekststrenge der <text:s/>indgår i styringen af opstartsprocessen og sørger for indkobling af de relevante biblioteker.</text:p>
      <text:h text:style-name="Heading_20_3" text:outline-level="3">Sprogindstilling og internationalisering</text:h>
      <text:p text:style-name="P2">PILS kan indstilles til dansk sprogbrug ved at kopiere biblioteket <text:s/>&lt;<text:span text:style-name="T13">lib&gt;/pils/danish/pils/config.pils <text:s/></text:span>til brugerens <text:span text:style-name="T13">Application Data</text:span> -mappe. Dette biblioteket medtages<text:span text:style-name="T13"> </text:span>så i alle kørende programmer, hvorved visse funktioner, specielt <text:s/><text:span text:style-name="T13">sig</text:span> <text:s/>og <text:s/><text:span text:style-name="T13">siger</text:span> <text:s/>(på engelsk <text:s/><text:span text:style-name="T13">say <text:s/></text:span>og <text:s/><text:span text:style-name="T13">saying ) <text:s/></text:span>omstilles<text:span text:style-name="T1"> </text:span>til at bruge det danske sprogobjekt der er defineret i <text:s/>&lt;<text:span text:style-name="T13">lib&gt;/danish/pils/danish</text:span> .</text:p>
      <text:p text:style-name="P2">For nærværende understøttes kun dansk og engelsk.. Andre sprog – såsom som fransk – kan defineres ved at tilføje disse filer til systemet:</text:p>
      <text:p text:style-name="P2"><text:tab/>&lt;<text:span text:style-name="T13">lib&gt;/pils/french/pils/config.pils</text:span></text:p>
      <text:p text:style-name="P2">som kontrollerer sprogvalget, og</text:p>
      <text:p text:style-name="P2"><text:tab/>&lt;<text:span text:style-name="T13">lib&gt;/pils/french/pils/french.pils</text:span></text:p>
      <text:p text:style-name="P2">som definerer sprognoden. En simpel fransk sprognode kunne se sådan ud:</text:p>
      <text:p text:style-name="P7"><text:tab/>[ language:<text:line-break/><text:tab/> <text:s/>"fr":<text:line-break/><text:tab/> <text:s/>."fr"<text:line-break/><text:tab/> <text:s/>[ "pils.org/ns/fr":<text:line-break/><text:tab/> <text:s text:c="3"/>."bon" good<text:line-break/><text:tab/> <text:s text:c="3"/>."un" one<text:line-break/><text:tab/> <text:s text:c="3"/>."di" say<text:line-break/><text:tab/> <text:s text:c="3"/>."blanc" white<text:line-break/><text:tab/> <text:s/>]<text:line-break/><text:tab/> <text:s/>."anglais" ["pils.org/ns/sne":]<text:line-break/><text:tab/> <text:s/>;<text:line-break/><text:tab/> <text:s/>""01","<text:line-break/><text:tab/>]</text:p>
      <text:p text:style-name="P2">Dette vil oversætte navnet <text:s/><text:span text:style-name="T13">un <text:s/></text:span>til <text:s/><text:span text:style-name="T13">one <text:s/></text:span>(i omstændelig notation:<text:span text:style-name="T13"> <text:s/>["pils.org/ns/sne"|"one"]</text:span> ), <text:s/>mens<text:span text:style-name="T13"> <text:s/>vin <text:s/></text:span>vil blive læst som <text:s/><text:span text:style-name="T13">["pils.org/ns/fr"|"vin"] <text:s/></text:span>idet der ikke er defineret en oversættelse.</text:p>
      <text:p text:style-name="P2">Hvis en programmør skriver dette i et fransksproget modul:</text:p>
      <text:p text:style-name="P7"><text:tab/>di [un bon vin blanc]</text:p>
      <text:p text:style-name="P2">og vi udfører det med dansk sprogindstilling, vil resultatet blive:</text:p>
      <text:p text:style-name="P2"><text:tab/><text:span text:style-name="T13">One god vin hvid</text:span></text:p>
      <text:p text:style-name="P2">idet ordene ved indlæsning søges oversat til engelsk, og derefter søges udskrevet på dansk – ordet <text:s/><text:span text:style-name="T13">vin</text:span> <text:s/>udskrives ganske vist på fransk eftersom der ikke er defineret nogen oversættelse for det, men med lidt god vilje forstår vi det jo alligevel.</text:p>
      <text:p text:style-name="P2">Der kan defineres simple regler til forbedring af oversættelsen – det danske sprogbibliotek har således en simpel regel der ud fra sammenhængen forsøger at afgøre om det engelske ord <text:span text:style-name="T1">no </text:span>skal oversættes til <text:span text:style-name="T1">nej</text:span> eller <text:span text:style-name="T1">ingen, </text:span>hvilket er ret væsentligt for forståeligheden af meddelelser.</text:p>
      <text:p text:style-name="P2">Den danske sprognode dækker så vidt muligt alle ord der bruges i PILS sproget og programmeringssystemet. Den danske terminologi er i øvrigt den originale; den engelske terminologi der bruges internt i fortolkeren er for de fleste ords vedkommende oversat fra dansk.</text:p>
      <text:p text:style-name="P2">Bemærk at også de sprogneutrale operatorer defineres som oversættelser; ellers ville de få en dansk ordvælger-nøgle og ikke blive genkendt som indbyggede operatorer.</text:p>
      <text:p text:style-name="P2"><text:span text:style-name="T1">İstanbul express </text:span>-metoden – der beskrives i afsnittet om tekstoperationer – viser hvordan oversættelser kan bruges til at tilpasse konverteringerne mellem store og små bogstaver<text:span text:style-name="T13"> </text:span>til tyrkisk, hvor prikken over i'et bevares når det skrives med stort.</text:p>
      <text:h text:style-name="Heading_20_3" text:outline-level="3">Regulære navne</text:h>
      <text:p text:style-name="P1">Vilkårlige tekststrenge kan bruges som navnestrenge, men for det meste bruges <text:span text:style-name="T1">regulære navne</text:span>, der skrives uden anførselstegn.</text:p>
      <text:p text:style-name="P1">Et regulært navn er en sekvens af bogstaver, operatortegn <text:s/><text:span text:style-name="T13">* / \ ^ # $ % &amp; </text:span>, additivtegn <text:s/><text:span text:style-name="T13">+ - </text:span>, sammenligningsoperatortegn <text:s/><text:span text:style-name="T13">&lt; &gt; = ~ </text:span>, cifre <text:s/><text:span text:style-name="T13">0 1 2 3 4 5 6 7 8 9</text:span> <text:s/>og <text:s/><text:span text:style-name="T13">. <text:s/></text:span>(punktum), idet<text:span text:style-name="T13"> </text:span>'<text:span text:style-name="T13"> @ `</text:span> <text:span text:style-name="T13">_ </text:span>og alle tegn uden for ASCII-tegnsættet behandles som bogstaver (herunder æ, ø og å der kodes som utf-8 sekvenser), med de følgende undtagelser:</text:p>
      <text:list text:style-name="L2">
        <text:list-item>
          <text:p text:style-name="P19">Et regulært navn kan ikke begynde med et punktum (dette ville blive læst som et ben)</text:p>
        </text:list-item>
        <text:list-item>
          <text:p text:style-name="P19">eller med et ciffer eller med en bindestreg efterfulgt af et ciffer (det ville blive læst som et tal)</text:p>
        </text:list-item>
      </text:list>
      <text:p text:style-name="P1">Grundlæggende er alt tilladt hvis ikke det kan misforstås af parseren.</text:p>
      <text:p text:style-name="Text_20_body"><text:span text:style-name="T14">Navne der slutter med et operatortegn, additivtegn eller et sammenligningsoperatortegn, klassificeres som henholdsvis operatorer, additiv-operatorer eller sammenligningsoperatorer. Indenfor konstantklammer <text:s/></text:span><text:span text:style-name="T13">[]</text:span><text:span text:style-name="T14"> <text:s/>og for nodenavne og nodebenenes navne er dette uden betydning; operatorerne kan uden videre bruges som navne på noder og nodeben. Tildelingssymbolet <text:s/></text:span><text:span text:style-name="T13">:=</text:span><text:span text:style-name="T14"> <text:s/>er dannet ved at <text:s/>bruge sammenligningsoperatoren <text:s/></text:span><text:span text:style-name="T13">=</text:span><text:span text:style-name="T14"> <text:s/>som navn på et ben.</text:span></text:p>
      <text:p text:style-name="P1">Et præfix er et regulært navn og et <text:s/><text:span text:style-name="T13">:</text:span> <text:s/>uden mellemrum. Præfixet slås op i ordvælger-noden, og værdien bruges til at oversætte det efterfølgende navn eller kombinere det med en ordvælger-nøgle.</text:p>
      <text:p text:style-name="P1">Når der ikke bruges præfix , eller når nul-præfixet <text:s/><text:span text:style-name="T13">?: <text:s/></text:span>bruges foran en tekststreng, bruges sprognodens standard-ordvælger.</text:p>
      <text:p text:style-name="P1">Et PILS udtryk kan ikke definere ordvælger-nøgler lokalt som det er tilfældet med XML; de eneste tilladte præfixer er dem der defineres af sprognoden. Det er dog muligt at læse og skrive navne der tilhører andre ordvælgers, med kliche-notation:</text:p>
      <text:p text:style-name="Text_20_body"><text:span text:style-name="T9"><text:tab/>["</text:span><text:span text:style-name="T2">ordklassenøgle</text:span><text:span text:style-name="T9">"|"</text:span><text:span text:style-name="T2">navnestreng</text:span><text:span text:style-name="T9">"]</text:span></text:p>
      <text:h text:style-name="Heading_20_3" text:outline-level="3">Apostroffen</text:h>
      <text:p text:style-name="P1">En enkelt apostrof <text:s/><text:span text:style-name="T13">'</text:span> <text:s/>læses som en gentagelse af det sidst læste navn der ikke var en operator eller sammenligningsoperator.</text:p>
      <text:p text:style-name="P7"><text:tab/>{ ok | :ok ' + 1 }</text:p>
      <text:p text:style-name="P2">er det samme som</text:p>
      <text:p text:style-name="P7"><text:tab/>{ ok | :ok ok + 1 }</text:p>
      <text:p text:style-name="P2">eller</text:p>
      <text:p text:style-name="P7"><text:tab/>{ ok | :' ' + 1 }</text:p>
      <text:p text:style-name="P1"><text:span text:style-name="T6">Hvis en operator eller sammenligningsoperator afsluttes med <text:s/></text:span><text:span text:style-name="T9">' </text:span><text:span text:style-name="T6">, læses den som om den ikke var en operator. Det afsluttende <text:s/></text:span><text:span text:style-name="T9">'</text:span><text:span text:style-name="T6"> <text:s/>indgår ikke i navnet.</text:span></text:p>
      <text:p text:style-name="P1"><text:span text:style-name="T6">Yderligere <text:s/></text:span><text:span text:style-name="T9">' </text:span><text:span text:style-name="T6">-er kan tilføjes sådanne navne; den sidste ignoreres og resten læses som et almindeligt navn. Tilsvarende for navne der udelukkende består af apostroffer. Derimod medtages afsluttende apostroffer i navnet hvis sidste tegn inden den eller de afsluttende apostroffer ikke er et operatortegn af en slags.</text:span></text:p>
      <text:h text:style-name="Heading_20_3" text:outline-level="3">Forkortelser for sprognoder og ordklasse-nøgler</text:h>
      <text:p text:style-name="P2">Som en ekstra bekvemmelighed læses <text:s/><text:span text:style-name="T13">{} <text:s/></text:span>som en forkortelse for den sprognode der parses efter.</text:p>
      <text:p text:style-name="P2">Ordklassenøglen for et præfix kan angives som: <text:s/><text:span text:style-name="T1">præfix</text:span><text:span text:style-name="T13">:? <text:s/></text:span>eller, for sprognodens standard-ordklasse, <text:s/><text:span text:style-name="T13">?:?</text:span></text:p>
      <text:h text:style-name="Heading_20_2" text:outline-level="2">Udtryk</text:h>
      <text:h text:style-name="Heading_20_3" text:outline-level="3">Nodeudtryk</text:h>
      <text:p text:style-name="Text_20_body">Generelt tolkes noder ved at benenes værdier tolkes og samles til en tilsvarende node (for nodekonstanter vil dette altid resultere i den selvsam<text:span text:style-name="T20">m</text:span>e node, og derfor sparer fortolkeren arbejdet).</text:p>
      <text:p text:style-name="Text_20_body">Noder med navnene <text:s/><text:span text:style-name="T13">[]</text:span><text:span text:style-name="T14"> <text:s/>(den tomme liste) eller <text:s/></text:span><text:span text:style-name="T13">[|handling]</text:span><text:span text:style-name="T14"> <text:s/>tolkes anderledes og skrives med en særlig notation:</text:span></text:p>
      <text:p text:style-name="Text_20_body"><text:span text:style-name="T14"><text:tab/></text:span><text:span text:style-name="T9">;</text:span><text:span text:style-name="T2">navn værdi</text:span><text:span text:style-name="T4"> ... <text:s text:c="3"/></text:span><text:span text:style-name="T8">for</text:span><text:span text:style-name="T4"> <text:s text:c="3"/></text:span><text:span text:style-name="T13">[]: .</text:span><text:span text:style-name="T2">navn værdi ...<text:line-break/></text:span><text:span text:style-name="T4"><text:tab/></text:span><text:span text:style-name="T9">;: </text:span><text:span text:style-name="T2">værdi</text:span><text:span text:style-name="T4"> ... <text:s text:c="3"/></text:span><text:span text:style-name="T8">for <text:s text:c="3"/></text:span><text:span text:style-name="T9">[]: </text:span><text:span text:style-name="T2">værdi ...<text:line-break/></text:span><text:span text:style-name="T14"><text:tab/></text:span><text:span text:style-name="T13">:</text:span><text:span text:style-name="T2">navn ...</text:span><text:span text:style-name="T4"> <text:s text:c="3"/></text:span><text:span text:style-name="T8">for <text:s text:c="3"/></text:span><text:span text:style-name="T9">[|handling]: .</text:span><text:span text:style-name="T2">navn ...<text:line-break/><text:tab/></text:span><text:span text:style-name="T9">:</text:span><text:span text:style-name="T2"> værdi ...</text:span><text:span text:style-name="T4"> <text:s text:c="3"/></text:span><text:span text:style-name="T8">for <text:s text:c="3"/></text:span><text:span text:style-name="T9">[|handling]: </text:span><text:span text:style-name="T2">værdi ...</text:span></text:p>
      <text:p text:style-name="P2">Noder med tomt navn <text:s/><text:span text:style-name="T13">[]</text:span> <text:s/>bruges til lokale bindinger:</text:p>
      <text:p text:style-name="P5"><text:span text:style-name="T14"><text:tab/></text:span><text:span text:style-name="T13">;</text:span><text:span text:style-name="T2">navn værdi</text:span><text:span text:style-name="T13">;</text:span><text:span text:style-name="T2"> ...</text:span></text:p>
      <text:p text:style-name="P2">Handlingsnoderne bruges til kontrolstrukturer:</text:p>
      <text:p text:style-name="P5"><text:span text:style-name="T14"><text:tab/></text:span><text:span text:style-name="T13">:hvis</text:span><text:span text:style-name="T14"> </text:span><text:span text:style-name="T2">betingelse</text:span><text:span text:style-name="T13">;</text:span><text:span text:style-name="T2"> udtryk </text:span><text:span text:style-name="T13">.ellers</text:span><text:span text:style-name="T14"> </text:span><text:span text:style-name="T2">ellers-udtryk</text:span></text:p>
      <text:h text:style-name="Heading_20_3" text:outline-level="3">Navne- og frasekald</text:h>
      <text:p text:style-name="P1">Et navn der står alene</text:p>
      <text:p text:style-name="P1"><text:tab/><text:span text:style-name="T1">navn</text:span></text:p>
      <text:p text:style-name="P2">læses som:</text:p>
      <text:p text:style-name="P2"><text:tab/><text:span text:style-name="T13">:kald</text:span> <text:span text:style-name="T13">[</text:span><text:span text:style-name="T1">navn</text:span><text:span text:style-name="T13">]</text:span></text:p>
      <text:p text:style-name="P2">I pasformer vil dette binde navnet til den tilsvarende værdi. I udtryk vil den aktuelle kontekst blive gennemsøgt efter bindinger eller regler for navnet.</text:p>
      <text:p text:style-name="P1">Hvis navnet efterfølges af en konstant, et regelsæt eller et udtryk i parenteser, dannes en node – dette kaldes en frase.</text:p>
      <text:p text:style-name="P1"><text:tab/><text:span text:style-name="T13">a 3</text:span> <text:s text:c="3"/>læses som <text:s text:c="3"/><text:span text:style-name="T13">:kald [a: 3]</text:span></text:p>
      <text:p text:style-name="P1"><text:tab/><text:span text:style-name="T13">b {x|y}</text:span> <text:s text:c="3"/>læses som <text:s text:c="3"/><text:span text:style-name="T13">:kald b: {x|y}</text:span></text:p>
      <text:p text:style-name="P1">Fraser <text:span text:style-name="T20">k</text:span>an have navngivne ben</text:p>
      <text:p text:style-name="P1"><text:tab/><text:span text:style-name="T13">linje (.fra a .til b)</text:span> <text:s text:c="3"/>er det samme som: <text:s text:c="3"/><text:span text:style-name="T13">:kald linje: .fra a .til b</text:span></text:p>
      <text:p text:style-name="P1">Forben og skjulte benværdier kan bruges:</text:p>
      <text:p text:style-name="P1"><text:tab/><text:span text:style-name="T13">besked (.) <text:s text:c="3"/></text:span>er det samme som: <text:s text:c="3"/><text:span text:style-name="T13">:kald</text:span> <text:span text:style-name="T13">besked: .besked besked</text:span></text:p>
      <text:p text:style-name="P1">Konstantklammer kan bruges til at danne fraser:</text:p>
      <text:p text:style-name="P1"><text:tab/><text:span text:style-name="T13">besked [. "Hallo"] <text:s text:c="3"/></text:span>er det same som: <text:s text:c="3"/><text:span text:style-name="T13">:kald</text:span> <text:span text:style-name="T13">[besked: .besked "Hallo"]</text:span></text:p>
      <text:p text:style-name="Text_20_body"><text:span text:style-name="T14">I pasformer virker konstantfraserne ganske som navne, men udtryksfraserne behandles som almindelige</text:span><text:span text:style-name="T8"> noder, hvilket sjældent giver mening. Ved tolkning</text:span><text:span text:style-name="T14"> tolkes udtryksfraserne før kaldet udføres.</text:span></text:p>
      <text:h text:style-name="Heading_20_3" text:outline-level="3">Objektkald</text:h>
      <text:p text:style-name="P1">To enheder efter hinanden læses som et objektkald:</text:p>
      <text:p text:style-name="P1"><text:tab/><text:span text:style-name="T13">(a) (b) <text:s text:c="3"/></text:span>er det same som <text:s text:c="3"/><text:span text:style-name="T13">:hvem a .kald b<text:line-break/><text:tab/></text:span>eller, for at pinde det helt ud: <text:s text:c="3"/><text:span text:style-name="T13">:hvem (:kald [a]) .kald :kald [b]</text:span></text:p>
      <text:p text:style-name="P1">Hvis den anden enhed er et navn eller en frase, læses det som et metodekald:</text:p>
      <text:p text:style-name="P1"><text:tab/><text:span text:style-name="T13">a b <text:s text:c="4"/></text:span>er det samme som <text:s text:c="3"/><text:span text:style-name="T13">:hvem a .kald [b]<text:line-break/><text:tab/></text:span>eller, pindet ud: <text:s text:c="3"/><text:span text:style-name="T13">:hvem (:kald [a]) .kald [b]</text:span></text:p>
      <text:p text:style-name="P1">Objektkald sammenknyttes fra venstre:</text:p>
      <text:p text:style-name="P1"><text:tab/><text:span text:style-name="T13">a b c </text:span><text:span text:style-name="T1"><text:s/></text:span><text:span text:style-name="T6"><text:s text:c="2"/>er det samme som <text:s text:c="3"/></text:span><text:span text:style-name="T9">(a b) c</text:span></text:p>
      <text:p text:style-name="P1"><text:span text:style-name="T6">I pasformer er objektkald i almindelighed meningsløse. Nogle metodekald er reservet til typetjek og forskellige andre formål. Pasformer bør bruge objektkald i omsvøb som <text:s/></text:span><text:span text:style-name="T9">: (a) (b) <text:s/></text:span><text:span text:style-name="T6">eller, for nu at vise det samme med en mere omstændelig syntaks, <text:s/></text:span><text:span text:style-name="T9">::hvem a .kald b </text:span><text:span text:style-name="T6">.</text:span></text:p>
      <text:h text:style-name="Heading_20_3" text:outline-level="3">Kald, fejl og svipsere</text:h>
      <text:p text:style-name="Text_20_body">Et kald kan afsluttes på en af følgende måder:</text:p>
      <text:list text:style-name="L3">
        <text:list-item>
          <text:p text:style-name="P17">Kaldet lykkes og resulterer i en værdi.</text:p>
          <text:list>
            <text:list-header>
              <text:p text:style-name="P20"><text:span text:style-name="T13">2 + 2</text:span> <text:s text:c="3"/><text:span text:style-name="T6">giver</text:span><text:span text:style-name="T1"> <text:s text:c="3"/></text:span><text:span text:style-name="T13">4</text:span></text:p>
            </text:list-header>
          </text:list>
        </text:list-item>
        <text:list-item>
          <text:p text:style-name="P17">Kaldet svipser fordi det hverken kan behandles af de indbyggede operationer eller af reglerne i objektet eller konteksten.</text:p>
          <text:list>
            <text:list-header>
              <text:p text:style-name="P20"><text:span text:style-name="T13">2 + "to"</text:span> <text:s text:c="3"/>svipser<text:span text:style-name="T6">, forudsat ingen regler behandler kaldet.</text:span></text:p>
            </text:list-header>
          </text:list>
        </text:list-item>
        <text:list-item>
          <text:p text:style-name="P17">Kaldet fejler, idet en indbygget operation eller en angiven regel detekterer at noget er galt.</text:p>
          <text:list>
            <text:list-header>
              <text:p text:style-name="P20"><text:span text:style-name="T13">{} læs "[shit}"</text:span> <text:s text:c="3"/>fejler med værdien <text:s text:c="3"/><text:span text:style-name="T13">[fejl: . ?:"Mangler konstant" .start 5 .slut 5]</text:span></text:p>
            </text:list-header>
          </text:list>
        </text:list-item>
      </text:list>
      <text:p text:style-name="P2">Fejl signalerer at noget er galt med programmet eller de data det arbejder på, og vil som regel skulle rapporteres til brugeren, hvorimod svipsere tit er et led i en normal procedure og kan ignoreres.</text:p>
      <text:p text:style-name="P2">Når en <text:s/><text:span text:style-name="T13">:kald <text:s/></text:span>node tolkes, sker dette:</text:p>
      <text:list text:style-name="L4">
        <text:list-item>
          <text:p text:style-name="P21"><text:span text:style-name="T9">kald</text:span><text:span text:style-name="T6"> -benet tolkes.</text:span></text:p>
        </text:list-item>
        <text:list-item>
          <text:p text:style-name="P21"><text:span text:style-name="T6">Den aktuelle </text:span><text:span text:style-name="T1">kontekst </text:span><text:span text:style-name="T6">gennemsøges efter regler eller bindinger der kan behandle kaldet.</text:span></text:p>
        </text:list-item>
        <text:list-item>
          <text:p text:style-name="P24">Hvis ingen regler eller bindinger kan behandle kaldet, signaleres en <text:span text:style-name="T1">svipser</text:span>.</text:p>
        </text:list-item>
      </text:list>
      <text:p text:style-name="P2">Når en <text:s/><text:span text:style-name="T13">:hvem .kald <text:s/></text:span>node tolkes, sker dette:</text:p>
      <text:list text:style-name="L5">
        <text:list-item>
          <text:p text:style-name="P22"><text:span text:style-name="T6">Hvis kaldet er en indbygget operation, overlades kontrollen til denne. Hvis den indbyggede operation ikke kan håndtere kaldet, simulerer den de følgende skridt 2 og 3 idet de dele af udtrykket der allerede er tolket, genbruges – så alting er som hvis den indbyggede operation ikke eksisterede. Hvis en samlebåndsoperation som <text:s/></text:span><text:span text:style-name="T9">enhver <text:s/></text:span><text:span text:style-name="T6">eller</text:span><text:span text:style-name="T9"> <text:s/>fold <text:s/></text:span><text:span text:style-name="T6">svipser, er denne rekonstruktion umulig, og svipseren behandles som i 6.</text:span></text:p>
        </text:list-item>
        <text:list-item>
          <text:p text:style-name="P22"><text:span text:style-name="T9">kald</text:span><text:span text:style-name="T6"> -benet tolkes, det kaldes </text:span><text:span text:style-name="T1">argumentet</text:span></text:p>
        </text:list-item>
        <text:list-item>
          <text:p text:style-name="P22"><text:span text:style-name="T9">hvem</text:span><text:span text:style-name="T6"> -benet tolkes, dette er </text:span><text:span text:style-name="T1">objektet</text:span></text:p>
        </text:list-item>
        <text:list-item>
          <text:p text:style-name="P22"><text:span text:style-name="T1">objektet</text:span><text:span text:style-name="T6"> gennemsøges efter regler eller bindinger der kan behandle </text:span><text:span text:style-name="T1">argumentet</text:span></text:p>
        </text:list-item>
        <text:list-item>
          <text:p text:style-name="P25">Hvis det fejler, fejler udtrykket. Hvis det svipser, oprettes en <text:s/><text:span text:style-name="T13">:hvem </text:span>.<text:span text:style-name="T13">kald </text:span><text:span text:style-name="T14">-node,</text:span><text:span text:style-name="T2"> </text:span>der derefter behandles som et kald i den aktuelle kontekst. Dette giver mulighed for at supplere de indbyggede operationer med lokalt definerede regler.</text:p>
        </text:list-item>
        <text:list-item>
          <text:p text:style-name="P25">Hvis dette fejler eller svipser og udtrykket blev tolket som handlingen i en <text:s/><text:span text:style-name="T13">:prøv</text:span> <text:s/>eller <text:s/><text:span text:style-name="T13">:kræv</text:span> <text:s/>ansvarsunddragelse, behandles fejlen eller svipseren af denne.</text:p>
        </text:list-item>
        <text:list-item>
          <text:p text:style-name="P25">Hvis dette ikke er tilfældet, prøves et <text:s/><text:span text:style-name="T13">:fejl </text:span>-kald i den aktuelle kontekst. For svipsere konstrueres en fejlværdi, for fejl bruges den angivne fejlværdi.</text:p>
        </text:list-item>
        <text:list-item>
          <text:p text:style-name="P25">Hvis <text:span text:style-name="T13">:fejl </text:span>-kaldet svipser, returneres fejlværdien og udførelsen fortsætter.</text:p>
        </text:list-item>
      </text:list>
      <text:p text:style-name="P2">Bemærk at argumentet tolkes før objektet. Denne konvention er valgt fordi den falder i hak med fortolkerens optimeringsstrategier, specielt samlebåndsoperationer på lister.</text:p>
      <text:h text:style-name="Heading_20_3" text:outline-level="3">Frasebryder-punktummet</text:h>
      <text:p text:style-name="P1">Et punktum i fri luft kan bruges til at skille et navn fra en efterfølgende konstant, regelsæt eller parentes, for at undgå at det læses som en frase.</text:p>
      <text:p text:style-name="P1"><text:tab/><text:span text:style-name="T13">a . 3</text:span></text:p>
      <text:p text:style-name="P1">læses som:</text:p>
      <text:p text:style-name="P10"><text:tab/>:hvem (:kald [a]) .kald 3</text:p>
      <text:p text:style-name="P1">(Hvis <text:span text:style-name="T13">a </text:span><text:s/>resulterer i en liste, vil udtrykket udvælge det 3. element.)</text:p>
      <text:p text:style-name="P1">Et friluftspunktum kan også bruges til at skille et navn eller en frase fra et foregående element, for at angive at navnet eller frasen skal indlægges i sin egen <text:s/><text:span text:style-name="T13">:kald</text:span> -node.</text:p>
      <text:p text:style-name="P10"><text:tab/>a . b</text:p>
      <text:p text:style-name="P1">er det samme som</text:p>
      <text:p text:style-name="P10"><text:tab/>(a) (b)</text:p>
      <text:p text:style-name="P1">eller:</text:p>
      <text:p text:style-name="P10"><text:tab/>:hvem (:kald [a]) .kald :kald [b]</text:p>
      <text:p text:style-name="P1">(Hvis <text:s/><text:span text:style-name="T13">a</text:span> <text:s/>og <text:span text:style-name="T13"><text:s/>b</text:span> <text:s/>giver tekststrenge, vil udtrykket sammenstykke dem.)</text:p>
      <text:h text:style-name="Heading_20_3" text:outline-level="3">Operatorpræcedens</text:h>
      <text:p text:style-name="P1">Når en operator indleder en sekvens eller følger efter en anden operator eller sammenligningsoperator, læses den som foranstillet operator.</text:p>
      <text:p text:style-name="P10"><text:tab/>+ n</text:p>
      <text:p text:style-name="P1">læses som:</text:p>
      <text:p text:style-name="P10"><text:tab/>:hvem n .kald [+]</text:p>
      <text:p text:style-name="P1">Når en operator følger efter en operand, opfattes den som en midtstillet operator.</text:p>
      <text:p text:style-name="P10"><text:tab/>a * b</text:p>
      <text:p text:style-name="P1">læses som:</text:p>
      <text:p text:style-name="P10"><text:tab/>:hvem a .kald *: b</text:p>
      <text:p text:style-name="P1">Operatorer der ender på <text:s/><text:span text:style-name="T13">* / \ ^ # $ % &amp;</text:span> <text:s/>har samme høje præcedens som sekvenser.</text:p>
      <text:p text:style-name="P1">Additive operatorer der ender på <text:s/><text:span text:style-name="T13">+</text:span> <text:s/>eller <text:s/><text:span text:style-name="T13">-</text:span> , har mellemste præcedens.</text:p>
      <text:p text:style-name="P1">Sammenligningsoperatorer der ender på <text:s/><text:span text:style-name="T13">=</text:span> , <text:s/><text:span text:style-name="T13">&lt;</text:span> , <text:s/><text:span text:style-name="T13">&gt;</text:span> <text:s/>eller <text:s/><text:span text:style-name="T13">~</text:span> , har lav præcedens.</text:p>
      <text:p text:style-name="P1">Indenfor samme præcedens samles udtryk fra venstre mod højre.</text:p>
      <text:h text:style-name="Heading_20_2" text:outline-level="2">Regler, pasformer og tildelinger</text:h>
      <text:h text:style-name="Heading_20_3" text:outline-level="3">Regelsæt</text:h>
      <text:p text:style-name="P2">PILS objekter opbygges af bundne regelsæt. Et regelsæt som</text:p>
      <text:p text:style-name="P2"><text:tab/><text:span text:style-name="T13">{ </text:span><text:span text:style-name="T1">pasform2 </text:span><text:span text:style-name="T13">| </text:span><text:span text:style-name="T1">handling2 </text:span><text:span text:style-name="T13">}<text:line-break/><text:tab/>{ </text:span><text:span text:style-name="T1">pasform1 </text:span><text:span text:style-name="T13">| </text:span><text:span text:style-name="T1">handling1 </text:span><text:span text:style-name="T13">}</text:span></text:p>
      <text:p text:style-name="P2">repræsenteres af en node</text:p>
      <text:p text:style-name="P2"><text:tab/><text:span text:style-name="T13">:regelsæt (;pas </text:span><text:span text:style-name="T1">pasform2</text:span><text:span text:style-name="T13"> .handling </text:span><text:span text:style-name="T1">handling2</text:span><text:span text:style-name="T13">), (;pas </text:span><text:span text:style-name="T1">pasform1</text:span><text:span text:style-name="T13"> .handling </text:span><text:span text:style-name="T1">handling1</text:span><text:span text:style-name="T13">)</text:span></text:p>
      <text:p text:style-name="P2">Når et regelsæt tolkes i en given kontekst, bindes det til konteksten, i form af en node:</text:p>
      <text:p text:style-name="P2"><text:s text:c="2"/><text:tab/><text:span text:style-name="T13">:regelsæt .hvor</text:span></text:p>
      <text:p text:style-name="P2">Når et kald udføres på et sådant bundet regelsæt, prøves reglerne nedefra og op, idet en intern indekseringsmekanisme gør at kun de relevante regler prøves. Prøvning af en regel sker ved at kaldet søges indpasset i reglens pasform, og hvis dette lykkes, tolkes handlingen med de bindinger der blev etableret af indpasningen.</text:p>
      <text:p text:style-name="P2">For at en regel skal have virkning, skal <text:span text:style-name="T1">ansvaret </text:span>behandles, typisk ved <text:span text:style-name="T1">ansvarstageren</text:span> <text:s/><text:span text:style-name="T13">:ok </text:span>,<text:span text:style-name="T4"> </text:span>men <text:span text:style-name="T1">ansvarshenviserne <text:s/></text:span><text:span text:style-name="T13">:prøv</text:span><text:span text:style-name="T1"> <text:s/></text:span>og <text:s/><text:span text:style-name="T13">:kræv</text:span><text:span text:style-name="T1"> <text:s/></text:span>muliggør mere detaljeret kontrol. Hvis handlingen ikke tager ansvaret, fortsætter søgningen til næste regel. Hvis ingen regel håndterer ansvaret for kaldet, svipser det.</text:p>
      <text:p text:style-name="Text_20_body"><text:span text:style-name="T8">Reglerne kan udtrække information om kaldet med </text:span><text:span text:style-name="T2">implicitte bindere</text:span><text:span text:style-name="T8">, hvoraf </text:span><text:span text:style-name="T2"><text:s/></text:span><text:span text:style-name="T9">:hvem</text:span><text:span text:style-name="T8"> <text:s/>er den vigtigste og betegner det objekt hvori reglen er fundet.</text:span></text:p>
      <text:h text:style-name="Heading_20_3" text:outline-level="3">Pasformer</text:h>
      <text:p text:style-name="P2">Pasformer er data med en struktur svarende til strukturen af de data der skal indpasses. Enhver konstant er en pasform der passer til sig selv og intet andet. Lister passer til lister af same længde og passende elementer. Nodeudtryk passer generelt til noder med same kliche og passende ben, men visse noder har speciel betydning i pasformer.</text:p>
      <text:p text:style-name="P2">Variable skrevet som navne, repræsenteret af noder af form <text:s/><text:span text:style-name="T13">:kald [</text:span><text:span text:style-name="T1">navn</text:span><text:span text:style-name="T13">]</text:span> ,<text:span text:style-name="T13"> </text:span><text:s/>passer til hvad som helst og bindes dertil. Hvis en variabel findes flere steder i en pasform, skal værdierne på de tilsvarende pladser i kaldet være identiske.</text:p>
      <text:p text:style-name="P2">Jokeren – skrevet som <text:s/><text:span text:style-name="T13">?</text:span> <text:s/>og repræsenteret som <text:s/><text:span text:style-name="T13">:kald []</text:span> <text:s/>– passer til hvad som helst uden forbehold.</text:p>
      <text:p text:style-name="P2">Andre særlige noder giver mulighed for aliasser, simple typetjek, sammenligninger med talkonstanter, søgebetingelser og længdeudtræk for tekst og lister, udtrækning af specifikke pladser i en liste af ikke angivet længde, simple oversættelser af værdier, og delvist angivne nodeformer med konstanter til udfyldning af manglende ben.</text:p>
      <text:p text:style-name="P2">De særlige nodeformer kan bruges som almindelige noder hvis de lægges i omsvøb:</text:p>
      <text:p text:style-name="P2"><text:tab/><text:span text:style-name="T13">: </text:span><text:span text:style-name="T1">særlig-node</text:span></text:p>
      <text:h text:style-name="Heading_20_3" text:outline-level="3">Tildelinger</text:h>
      <text:p text:style-name="Text_20_body">Selvom PILS i hovedsagen er et rent funktionelt sprog, findes der tildelingsssætninger som bruges i forskellige listebehandlingsoperationer og til at sætte attributter på fremmede objekter..</text:p>
      <text:p text:style-name="Text_20_body">Den ser sådan ud::</text:p>
      <text:p text:style-name="Text_20_body"><text:tab/><text:span text:style-name="T1">modtager </text:span><text:span text:style-name="T9">:=</text:span><text:span text:style-name="T1"> værdi<text:line-break/></text:span><text:span text:style-name="T6"><text:tab/></text:span><text:span text:style-name="T1">modtager </text:span><text:span text:style-name="T9">:=</text:span><text:span text:style-name="T1"> værdi</text:span><text:span text:style-name="T9">;</text:span><text:span text:style-name="T1"> hale</text:span></text:p>
      <text:p text:style-name="P5"><text:span text:style-name="T14">Ved tolkning af tildelinger tolkes </text:span><text:span text:style-name="T2">værdi </text:span><text:span text:style-name="T14">først, hvorefter <text:s/></text:span><text:span text:style-name="T2">modtager <text:s/></text:span><text:span text:style-name="T14">tolkes med en speciel form for kald der søger efter tildelingsregler eller tildelingsfølsomme indbyggede operationer.</text:span></text:p>
      <text:p text:style-name="P5"><text:span text:style-name="T14">Hvis der er </text:span><text:span text:style-name="T2">hale </text:span><text:span text:style-name="T14">på tildelingen, bortkastes resultatet af tildelingskaldet, og </text:span><text:span text:style-name="T2">hale </text:span><text:span text:style-name="T14">tolkes og afleveres. Formen med </text:span><text:span text:style-name="T2">hale </text:span><text:span text:style-name="T14">svarer til:</text:span></text:p>
      <text:p text:style-name="Text_20_body"><text:span text:style-name="T6"><text:tab/></text:span><text:span text:style-name="T9">(</text:span><text:span text:style-name="T1">modtager </text:span><text:span text:style-name="T9">:=</text:span><text:span text:style-name="T1"> værdi</text:span><text:span text:style-name="T9">)</text:span><text:span text:style-name="T1"> </text:span><text:span text:style-name="T9">og:</text:span><text:span text:style-name="T1"> hale</text:span></text:p>
      <text:p text:style-name="P2">Tildelingsregler har denne form:</text:p>
      <text:p text:style-name="P1"><text:span text:style-name="T6"><text:tab/></text:span><text:span text:style-name="T9">{ </text:span><text:span text:style-name="T1">modtager</text:span><text:span text:style-name="T9"> := </text:span><text:span text:style-name="T1">værdi </text:span><text:span text:style-name="T9">| </text:span><text:span text:style-name="T1">handling </text:span><text:span text:style-name="T9">}</text:span></text:p>
      <text:p text:style-name="P1"><text:span text:style-name="T6">Disse regler håndteres særskilt i regelsættene. Generelle regler som <text:s/></text:span><text:span text:style-name="T9">{x|...} <text:s/></text:span><text:span text:style-name="T6">kan ikke udløses af tildelingerne, og tildelingsreglerne udløses ikke af normale kald, heller ikke hvis kaldet har samme form som en tildeling..</text:span></text:p>
      <text:p text:style-name="P2">PILS parseren genkender ikke tildelingerne som sådan; de indlæses og repræsenteres som sekvenser der slutter med en grådig node, og repræsenteres som:</text:p>
      <text:p text:style-name="P2"><text:tab/><text:span text:style-name="T13">:hvem</text:span> <text:span text:style-name="T13">(</text:span><text:span text:style-name="T1">modtager</text:span><text:span text:style-name="T13">)</text:span><text:span text:style-name="T4"> .</text:span><text:span text:style-name="T13">kald (:=</text:span> <text:span text:style-name="T1">værdi</text:span><text:span text:style-name="T13">)</text:span><text:span text:style-name="T1"><text:line-break/></text:span><text:tab/><text:span text:style-name="T13">:hvem</text:span> <text:span text:style-name="T13">(</text:span><text:span text:style-name="T1">modtager</text:span><text:span text:style-name="T13">)</text:span><text:span text:style-name="T4"> .</text:span><text:span text:style-name="T13">kald (:=</text:span> <text:span text:style-name="T1">værdi</text:span><text:span text:style-name="T13">;</text:span><text:span text:style-name="T1"> hale</text:span><text:span text:style-name="T13">)</text:span></text:p>
      <text:h text:style-name="Heading_20_2" text:outline-level="2">Syntaktisk sukker</text:h>
      <text:p text:style-name="Text_20_body">De følgende koventioner gælder kun i udtryk der ikke er i konstantklammer <text:span text:style-name="T13">[] </text:span>.</text:p>
      <text:h text:style-name="Heading_20_3" text:outline-level="3">Skjulte ben</text:h>
      <text:p text:style-name="P1">Når værdien af et navngivet ben er et kald af benets navn, kan værdien udelades.</text:p>
      <text:p text:style-name="P1">Dette bruges i pasformer såvel som i almindelige udtryk, i det meget almindelige tilfælde hvor et bens navn bindes til dets værdi, dvs. for navngivne parametre.</text:p>
      <text:p text:style-name="P1">Dette gælder også for forbenene, men ikke for halerne.</text:p>
      <text:p text:style-name="P1"><text:tab/><text:span text:style-name="T13">besked: .</text:span> <text:s text:c="3"/>er det samme som <text:s text:c="3"/><text:span text:style-name="T13">besked: .besked besked</text:span></text:p>
      <text:p text:style-name="P1">Et skjult ben bruges tit med <text:s/><text:span text:style-name="T13">:ok </text:span>-<text:span text:style-name="T6">ansvarstageren</text:span> i simple udtræksregler. En nodes hale kan udtrækkes med denne regel:</text:p>
      <text:p text:style-name="P10"><text:tab/>{* ;: hale|:ok hale}</text:p>
      <text:p text:style-name="P1">eller kortere:</text:p>
      <text:p text:style-name="P10"><text:tab/>{* ;: ok|:ok} <text:s text:c="3"/><text:span text:style-name="T14">hvilket er det samme som</text:span> <text:s text:c="3"/>{* ;: ok|:ok ok}</text:p>
      <text:h text:style-name="Heading_20_3" text:outline-level="3">Prikkede pasformer</text:h>
      <text:p text:style-name="P1">En regels pasform kan indledes med et punktum, hvilket gør at det følgende navn eller frase ikke indlægges i et kald. Det letter skrivningen af parameterløse operationer:</text:p>
      <text:p text:style-name="P10"><text:tab/>{ .navn | ... }</text:p>
      <text:p text:style-name="P1">er nemmere at skrive end</text:p>
      <text:p text:style-name="P10"><text:tab/>{ [navn] | ... }</text:p>
      <text:h text:style-name="Heading_20_3" text:outline-level="3">Halekrøller</text:h>
      <text:p text:style-name="P1">Eb sekvens af form</text:p>
      <text:p text:style-name="P1"><text:tab/><text:span text:style-name="T1">afslutning</text:span> <text:span text:style-name="T13">.(</text:span><text:span text:style-name="T1">uafsluttet-udtryk</text:span><text:span text:style-name="T9">)</text:span></text:p>
      <text:p text:style-name="P2">læses som:</text:p>
      <text:p text:style-name="P13"><text:tab/>uafsluttet-udtryk afslutning</text:p>
      <text:p text:style-name="P2">hvor <text:s/><text:span text:style-name="T1">afslutning </text:span>læses med præcedens som en sekvens, der gerne består af en lang række operationer. Når <text:span text:style-name="T1">uafsluttet-udtryk </text:span>parses og <text:s/><text:span text:style-name="T13">)</text:span> <text:s/>nås, indsættes <text:span text:style-name="T1">afslutning </text:span>som en enhed.</text:p>
      <text:p text:style-name="P2"><text:tab/><text:span text:style-name="T13">a b .(c d:)</text:span> <text:s text:c="3"/>er det samme som: <text:s text:c="3"/><text:span text:style-name="T13">c d: a b</text:span></text:p>
      <text:p text:style-name="P2">En kuperet form findes for etbenede handlingsnoder, omsvøb og dobbelt-omsvøb:</text:p>
      <text:p text:style-name="P1"><text:span text:style-name="T6"><text:tab/></text:span><text:span text:style-name="T1">udtryk </text:span><text:span text:style-name="T9">.:</text:span><text:span text:style-name="T1">navn <text:s text:c="3"/></text:span><text:span text:style-name="T6">er det samme som <text:s text:c="3"/></text:span><text:span text:style-name="T9">:</text:span><text:span text:style-name="T1">navn udtryk</text:span></text:p>
      <text:p text:style-name="P1"><text:span text:style-name="T6"><text:tab/></text:span><text:span text:style-name="T1">udtryk </text:span><text:span text:style-name="T9">.::</text:span><text:span text:style-name="T1"> <text:s text:c="3"/></text:span><text:span text:style-name="T6">er det samme som <text:s text:c="3"/></text:span><text:span text:style-name="T9">:: </text:span><text:span text:style-name="T1">udtryk</text:span></text:p>
      <text:p text:style-name="P1"><text:span text:style-name="T6">Ansvarshenviseren <text:s/></text:span><text:span text:style-name="T9">:kræv <text:s/></text:span><text:span text:style-name="T6">og listebyggeren <text:s/>:</text:span><text:span text:style-name="T9">liste <text:s/></text:span><text:span text:style-name="T6">skrives gerne på denne form:</text:span></text:p>
      <text:p text:style-name="P1"><text:span text:style-name="T9"><text:tab/></text:span><text:span text:style-name="T1">udtryk</text:span><text:span text:style-name="T6"> </text:span><text:span text:style-name="T9">.:kræv</text:span><text:span text:style-name="T1"> <text:s text:c="3"/></text:span><text:span text:style-name="T6">er det samme som <text:s text:c="3"/></text:span><text:span text:style-name="T9">:kræv </text:span><text:span text:style-name="T1">udtryk</text:span></text:p>
      <text:p text:style-name="P1"><text:span text:style-name="T9"><text:tab/>(</text:span><text:span text:style-name="T1">...</text:span><text:span text:style-name="T9"> liste := </text:span><text:span text:style-name="T1">...</text:span><text:span text:style-name="T9">) .:liste</text:span><text:span text:style-name="T1"> <text:s text:c="3"/></text:span><text:span text:style-name="T6">er det samme som <text:s text:c="3"/></text:span><text:span text:style-name="T9">:liste (</text:span><text:span text:style-name="T1">...</text:span><text:span text:style-name="T9"> liste := </text:span><text:span text:style-name="T1">...</text:span><text:span text:style-name="T9">)</text:span></text:p>
      <text:p text:style-name="P2">Halekrøller kan bruges til at give lange og komplekse udtryk en slags fortællende form: man kan skrive et udtryk og teste det, og derefter indlejre det i en node eller kontrolstruktur ved at sætte en halekrølle i enden, uden at ændre det allerede skrevne.</text:p>
      <text:p text:style-name="P2">Halekrøllen er dels inspireret af vildsvinene ved Moesgård, dels af denne konstruktion der er ganske almindelig i talt dansk selvom visse skolelærere anser det for noget griseri:</text:p>
      <text:p text:style-name="P1"><text:span text:style-name="T6"><text:tab/></text:span><text:span text:style-name="T1">Ting små grisebasser elsker at rode rundt i</text:span></text:p>
      <text:p text:style-name="P2">Strengt taget skulle <text:span text:style-name="T1">ting</text:span> stå sidst, men talesproget tillader at vi trækker det vigtige frem, og det <text:s/>samme gælder til en vis grad PILS.</text:p>
      <text:h text:style-name="Heading_20_3" text:outline-level="3">Kommentarer</text:h>
      <text:p text:style-name="P1">PILS understøtter 3 former for kommentarer:</text:p>
      <text:p text:style-name="P1"><text:tab/><text:span text:style-name="T13">! </text:span><text:span text:style-name="T1">kommentar (linjen ud, til første CR eller LF)</text:span></text:p>
      <text:p text:style-name="P1"><text:span text:style-name="T1"><text:tab/></text:span><text:span text:style-name="T9">!! </text:span><text:span text:style-name="T1">kommentar (kan strække sig over flere linjer) </text:span><text:span text:style-name="T9">!!</text:span></text:p>
      <text:p text:style-name="P1"><text:span text:style-name="T9"><text:tab/>:- </text:span><text:span text:style-name="T1">kommentardata</text:span><text:span text:style-name="T9">; </text:span><text:span text:style-name="T1">udtryk</text:span></text:p>
      <text:p text:style-name="P2"><text:span text:style-name="T13">! <text:s/></text:span>og <text:s/><text:span text:style-name="T13">!!</text:span> -kommentarerne behandles som mellemrum ved parsning; <text:s/><text:span text:style-name="T13">:- <text:s/></text:span>kommentarer parses som handlingsnoder og gør det muligt at indlægge kommentardata i udtryk og pasformer.</text:p>
      <text:p text:style-name="P4">De svarer løseligt til <text:span text:style-name="T13">//</text:span> <text:span text:style-name="T1">kommentar</text:span>,<text:span text:style-name="T1"> <text:s/></text:span><text:span text:style-name="T13">/*</text:span><text:span text:style-name="T1">kommentar</text:span><text:span text:style-name="T13">*/</text:span><text:span text:style-name="T1"> <text:s/></text:span>og <text:s/><text:span text:style-name="T13">#pragma</text:span> <text:s/>i C++.</text:p>
      <text:h text:style-name="Heading_20_3" text:outline-level="3">Nummererede gengangere</text:h>
      <text:p text:style-name="P4">Tit bruges de samme delstrukturer mange gange i en sammensat datastuktur. Nummererede gengangere er indført for at spare plads når sådanne strukturer gemmes som tekst. De bruges generelt ikke i PILS kildetekster.</text:p>
      <text:p text:style-name="P4">Tekststrenge, regelsæt samt udtryk i kantede eller runde parenteser kan nummereres med et positivt heltal der skrives umiddelbart foran, og derefter refereres med det samme heltal efterfulgt af <text:s/><text:span text:style-name="T13">.</text:span> <text:s/>(punktum).</text:p>
      <text:p text:style-name="P1"><text:span text:style-name="T9"><text:tab/>1"fut", 1., 1.</text:span><text:span text:style-name="T1"> <text:s text:c="3"/></text:span><text:span text:style-name="T6">er det samme som <text:s text:c="3"/></text:span><text:span text:style-name="T9">"fut", "fut", "fut"</text:span></text:p>
      <text:p text:style-name="P1"><text:span text:style-name="T9"><text:tab/>123(x) + 123.</text:span><text:span text:style-name="T1"> <text:s text:c="3"/></text:span><text:span text:style-name="T6">er det samme som <text:s text:c="3"/></text:span><text:span text:style-name="T9">x + x</text:span></text:p>
      <text:h text:style-name="Heading_20_1" text:outline-level="1">Indbyggede operationer</text:h>
      <text:p text:style-name="P2">De fleste indbyggede operationer er udformet som objektkald der får særbehandling af fortolkeren. De repræsenteres af noder af form <text:s text:c="2"/><text:span text:style-name="T13">:hvem .kald </text:span>.</text:p>
      <text:p text:style-name="P2">De allerfleste af disse operationer virker kun når de udføres direkte, ikke gennem konstruktioner som <text:s/>(<text:span text:style-name="T1">argument) </text:span><text:span text:style-name="T13">kald </text:span><text:span text:style-name="T1">(objekt) </text:span>. Dog virker udtræk af listeelementer ved nummer samt sprogobjekternes metoder også ved indirekte kald.</text:p>
      <text:p text:style-name="P2">Bemærk forskellen: Dette er et direkte kald:</text:p>
      <text:p text:style-name="P2"><text:tab/><text:span text:style-name="T13">{.kliche|:ok [k]} kliche</text:span> <text:s text:c="3"/>giver <text:s text:c="3"/><text:span text:style-name="T13">[[|handling]|hvor|regelsæt]</text:span></text:p>
      <text:p text:style-name="P2">Den indbyggede operation <text:s/><text:span text:style-name="T13">kliche <text:s/></text:span>udtrækker klicheen af den node der udgør det bundne regelsæt.</text:p>
      <text:p text:style-name="P2">Dette er et indirekte kald og udløser <text:s/><text:span text:style-name="T13">.kliche</text:span> -metoden i regelsættet:</text:p>
      <text:p text:style-name="P2"><text:tab/><text:span text:style-name="T13">[kliche] kald {.kliche|:ok [k]} <text:s text:c="3"/></text:span>giver <text:s text:c="3"/>[<text:span text:style-name="T13">k]</text:span></text:p>
      <text:h text:style-name="Heading_20_2" text:outline-level="2">Talberegninger</text:h>
      <text:p text:style-name="Text_20_body"><text:span text:style-name="T14">Alle talberegninger udføres med flydende tal, de såkaldte </text:span><text:span text:style-name="T2">doubles </text:span><text:span text:style-name="T8">(typisk 64 bits med 52 bit binær mantisse, men det kan afhænge af implementationen). Resultatet af alle beregninger prøvekonverteres til et 32 bit heltal med fortegn og tilbage til flydende tal. Hvis dette resultaterne i det samme flydende tal, genkendes tallet som heltal – det er ikke muligt i PILS at skelne mellem det flydende tal 3,0 og heltallet 3. Både heltal og ikke-heltal pakkes ind i unikke objekter; heltallene fra <text:s/>0 <text:s/>til <text:s/>2</text:span><text:span text:style-name="T16">16</text:span><text:span text:style-name="T8">-1 har fast placering.</text:span></text:p>
      <text:p text:style-name="P2">Halløjet med fortolkning, indpakning og opslag i konstanttabellen gør at talbehandling er forholdsvis langsom i PILS. Dette er et valg der er truffet i designet: hurtig søgning og genkendelse af data af blandet struktur anses for vigtigere end hurtig talbehandling.</text:p>
      <text:p text:style-name="P1">Uendeligheder, tal der ikke er tal osv. understøttes ikke af PILS, og håndteringen af dem er ikke testet særlig grundigt..</text:p>
      <text:p text:style-name="P5">Operationer på to tal er</text:p>
      <text:p text:style-name="Text_20_body"><text:tab/><text:span text:style-name="T13">+ <text:s text:c="3"/></text:span><text:span text:style-name="T8">addition</text:span><text:span text:style-name="T13"><text:line-break/><text:tab/>- <text:s text:c="3"/></text:span><text:span text:style-name="T8">subtraction</text:span><text:span text:style-name="T13"><text:line-break/><text:tab/>* <text:s text:c="3"/></text:span><text:span text:style-name="T8">multiplication</text:span><text:span text:style-name="T13"><text:line-break/><text:tab/>/ <text:s text:c="3"/></text:span><text:span text:style-name="T8">floating point division (even når supplied with integer argumenterne)</text:span><text:span text:style-name="T13"><text:line-break/><text:tab/>\</text:span><text:span text:style-name="T8"> <text:s text:c="3"/>integer division</text:span><text:span text:style-name="T13"><text:line-break/><text:tab/>% <text:s text:c="3"/></text:span><text:span text:style-name="T8">modulo</text:span></text:p>
      <text:p text:style-name="P5"><text:span text:style-name="T4">Bemærk:</text:span><text:span text:style-name="T2"> alle disse operatorer har samme præcedens: </text:span><text:span text:style-name="T14"><text:s/></text:span><text:span text:style-name="T13">1 + 2 * 3 <text:s/></text:span><text:span text:style-name="T2">giver</text:span><text:span text:style-name="T4"> <text:s/></text:span><text:span text:style-name="T13">9</text:span><text:span text:style-name="T4"> </text:span><text:span text:style-name="T2">, ikke</text:span><text:span text:style-name="T13"> <text:s/>7</text:span><text:span text:style-name="T4"> </text:span><text:span text:style-name="T2">.</text:span></text:p>
      <text:p text:style-name="P1"><text:span text:style-name="T6">Foranstillet <text:s/></text:span><text:span text:style-name="T9">-</text:span><text:span text:style-name="T6"> <text:s/>(minus) gør som forventet: <text:s text:c="2"/></text:span><text:span text:style-name="T9">;x 7; - x</text:span><text:span text:style-name="T6"> <text:s text:c="3"/>returns <text:s/></text:span><text:span text:style-name="T9">-7</text:span><text:span text:style-name="T6"> .</text:span></text:p>
      <text:p text:style-name="Text_20_body"><text:span text:style-name="T13"><text:tab/>abs <text:s/></text:span><text:span text:style-name="T8">giver den absolute værdi</text:span></text:p>
      <text:p text:style-name="Text_20_body"><text:span text:style-name="T8"><text:tab/></text:span><text:span text:style-name="T9">afrund <text:s/></text:span><text:span text:style-name="T8">giver den nærmeste heltallige værdi, idet eksakte halve rundes væk fra 0</text:span></text:p>
      <text:p text:style-name="Text_20_body"><text:span text:style-name="T8"><text:tab/></text:span><text:span text:style-name="T9">afkort <text:s/></text:span><text:span text:style-name="T8">giver den nærmeste heltallige i retning mod 0</text:span></text:p>
      <text:p text:style-name="P2">Operationerne <text:s/><text:span text:style-name="T13">afrund</text:span> <text:s/>og <text:s/><text:span text:style-name="T13">afkort</text:span> <text:s/>kan bruges med enhedsangivelse:</text:p>
      <text:p text:style-name="P2"><text:tab/><text:span text:style-name="T1">x</text:span> <text:span text:style-name="T13">afrund 10</text:span></text:p>
      <text:p text:style-name="P2">afrunder <text:span text:style-name="T1">x</text:span> til nærmeste hele 10'er.</text:p>
      <text:p text:style-name="P2">Disse efterstillede operatorer er lånt fra <text:s/>C++ <text:s/>(altid med double-argumenter):</text:p>
      <text:p text:style-name="P10"><text:tab/>sin cos tan asin acos atan kvr log exp<text:line-break/><text:tab/><text:span text:style-name="T14">(</text:span>kvr <text:span text:style-name="T14">er den danske udgave af <text:s/></text:span>sqrt<text:span text:style-name="T14">, <text:s/>kvadratrod eller </text:span><text:span text:style-name="T2">square root</text:span><text:span text:style-name="T8">.)</text:span></text:p>
      <text:p text:style-name="Text_20_body"><text:span text:style-name="T14">Sammenligningsoperatorerne </text:span><text:span text:style-name="T13"><text:s/>= &lt;&gt; &lt; &lt;= &gt; &gt;= </text:span><text:span text:style-name="T14"><text:s/>lykkes og giver det første argument hvis sammeligningen er sand, men fejler hvis den er falsk; PILS har ingen særlig type til sandhedsværdier.</text:span></text:p>
      <text:p text:style-name="P2">PILS fosøger at skrive tal så genparsning vil resultere i nøjagtig samme tal, men det virker desværre ikke altid for tal med store eksponenter.</text:p>
      <text:p text:style-name="P2">Formateringsstrenge understøttes ikke i PILS.</text:p>
      <text:h text:style-name="Heading_20_2" text:outline-level="2">Operationer på tidsstempler og varigheder</text:h>
      <text:p text:style-name="P2">Almindelige regneoperationer kan bruges på tidsstempler og varigheder i disse kombinationer:</text:p>
      <text:p text:style-name="P2"><text:tab/><text:span text:style-name="T1">tidsstempel</text:span> <text:span text:style-name="T13">+</text:span> <text:span text:style-name="T1">varighed</text:span><text:line-break/><text:tab/><text:span text:style-name="T1">datering</text:span> <text:span text:style-name="T13">+</text:span> <text:span text:style-name="T1">varighed</text:span><text:line-break/><text:tab/><text:span text:style-name="T1">varighed</text:span> <text:span text:style-name="T13">+</text:span> <text:span text:style-name="T1">tidsstempel</text:span><text:line-break/><text:tab/><text:span text:style-name="T1">varighed</text:span> <text:span text:style-name="T13">+</text:span> <text:span text:style-name="T1">datering</text:span><text:line-break/><text:tab/><text:span text:style-name="T1">varighed</text:span> <text:span text:style-name="T13">+</text:span> <text:span text:style-name="T1">varighed</text:span></text:p>
      <text:p text:style-name="P2"><text:tab/><text:span text:style-name="T1">tidsstempel</text:span> <text:span text:style-name="T13">-</text:span> <text:span text:style-name="T1">tidsstempel</text:span><text:line-break/><text:tab/><text:span text:style-name="T1">tidsstempel</text:span> <text:span text:style-name="T13">-</text:span> <text:span text:style-name="T1">varighed</text:span><text:line-break/><text:tab/><text:span text:style-name="T1">datering</text:span> <text:span text:style-name="T13">-</text:span> <text:span text:style-name="T1">datering</text:span><text:line-break/><text:tab/><text:span text:style-name="T1">datering</text:span> <text:span text:style-name="T13">-</text:span> <text:span text:style-name="T1">varighed</text:span><text:line-break/><text:tab/><text:span text:style-name="T1">varighed</text:span> <text:span text:style-name="T13">-</text:span> <text:span text:style-name="T1">varighed</text:span></text:p>
      <text:p text:style-name="P2"><text:tab/><text:span text:style-name="T1">varighed</text:span> <text:span text:style-name="T13">*</text:span> <text:span text:style-name="T1">tal</text:span><text:line-break/><text:tab/><text:span text:style-name="T1">tal</text:span> <text:span text:style-name="T13">*</text:span> <text:span text:style-name="T1">varighed</text:span></text:p>
      <text:p text:style-name="P2"><text:tab/><text:span text:style-name="T1">varighed</text:span> <text:span text:style-name="T13">/</text:span> <text:span text:style-name="T1">tal</text:span><text:line-break/><text:tab/><text:span text:style-name="T1">varighed</text:span> <text:span text:style-name="T13">/</text:span> <text:span text:style-name="T1">varighed</text:span></text:p>
      <text:p text:style-name="P2"><text:tab/><text:span text:style-name="T1">varighed</text:span> <text:span text:style-name="T13">\</text:span> <text:span text:style-name="T1">varighed</text:span></text:p>
      <text:p text:style-name="P2"><text:tab/><text:span text:style-name="T1">tidsstempel</text:span> <text:span text:style-name="T13">afrund</text:span> <text:span text:style-name="T1">varighed</text:span><text:line-break/><text:tab/><text:span text:style-name="T1">datering</text:span> <text:span text:style-name="T13">afrund</text:span> <text:span text:style-name="T1">varighed</text:span><text:line-break/><text:tab/><text:span text:style-name="T1">varighed</text:span> <text:span text:style-name="T13">afrund</text:span> <text:span text:style-name="T1">varighed</text:span></text:p>
      <text:p text:style-name="P2"><text:tab/><text:span text:style-name="T1">tidsstempel</text:span> <text:span text:style-name="T13">afkort</text:span> <text:span text:style-name="T1">varighed</text:span><text:line-break/><text:tab/><text:span text:style-name="T1">datering</text:span> <text:span text:style-name="T13">afkort</text:span> <text:span text:style-name="T1">varighed</text:span><text:line-break/><text:tab/><text:span text:style-name="T1">varighed</text:span> <text:span text:style-name="T13">afkort</text:span> <text:span text:style-name="T1">varighed</text:span></text:p>
      <text:p text:style-name="P2">To værdier af samme type kan sammenlignes med <text:span text:style-name="T13"><text:s/>= &lt;&gt; &lt; &lt;= &gt; &gt;=</text:span></text:p>
      <text:p text:style-name="P2"><text:tab/><text:span text:style-name="T1">tidsstempel sammenligningsoperator</text:span> <text:span text:style-name="T1">tidsstempel</text:span><text:line-break/><text:tab/><text:span text:style-name="T1">datering</text:span> <text:span text:style-name="T1">sammenligningsoperator</text:span> <text:span text:style-name="T1">datering</text:span><text:line-break/><text:tab/><text:span text:style-name="T1">varighed</text:span> <text:span text:style-name="T1">sammenligningsoperator</text:span> <text:span text:style-name="T1"><text:s/>varighed</text:span></text:p>
      <text:p text:style-name="P2">Systemfunktionerne <text:s/><text:span text:style-name="T13">nu <text:s/></text:span>og <text:s/><text:span text:style-name="T13">tidsstempel <text:s/></text:span>henter begge den aktuelle systemtid, men <text:s/><text:span text:style-name="T13">tidsstempel <text:s/></text:span>opjusterer værdien hvis det er nødvendigt for at undgå at give samme værdi flere gange. Denne opjustering har ingen indflydelse på <text:span text:style-name="T13">nu</text:span> -funktionen.</text:p>
      <text:h text:style-name="Heading_20_2" text:outline-level="2">Operationer på tekststrenge</text:h>
      <text:h text:style-name="Heading_20_3" text:outline-level="3">Konverteringer</text:h>
      <text:p text:style-name="Text_20_body"><text:span text:style-name="T2">s</text:span><text:span text:style-name="T14"> </text:span><text:span text:style-name="T13">utf-8 <text:s text:c="3"/></text:span><text:span text:style-name="T14">konverterer mellem utf-8-kodede tekststrenge og lister af unicode-tegnværdier som heltal.</text:span></text:p>
      <text:p text:style-name="Text_20_body"><text:span text:style-name="T2">s</text:span><text:span text:style-name="T14"> </text:span><text:span text:style-name="T13">utf-16 <text:s text:c="3"/></text:span><text:span text:style-name="T14">konverterer mellem utf-16-kodede tekststrenge med byte-order-mark og tegnværdi-lister</text:span></text:p>
      <text:p text:style-name="Text_20_body"><text:span text:style-name="T2">s</text:span><text:span text:style-name="T14"> </text:span><text:span text:style-name="T13">utf-16le <text:s text:c="3"/></text:span><text:span text:style-name="T14">do, little-endian utf-16 uden byte-order-mark</text:span></text:p>
      <text:p text:style-name="Text_20_body"><text:span text:style-name="T2">s</text:span><text:span text:style-name="T14"> </text:span><text:span text:style-name="T13">utf-16be <text:s text:c="3"/></text:span><text:span text:style-name="T14">do, big-endian</text:span></text:p>
      <text:p text:style-name="Text_20_body"><text:span text:style-name="T2">s</text:span><text:span text:style-name="T14"> </text:span><text:span text:style-name="T13">bytes <text:s text:c="3"/></text:span><text:span text:style-name="T14">konverterer mellem tekststrenge og lister af byte-værdier 0 – 255.</text:span></text:p>
      <text:p text:style-name="P1">Dette sammenstykker 2 tekststrenge:</text:p>
      <text:p text:style-name="P1"><text:tab/><text:span text:style-name="T13">(</text:span><text:span text:style-name="T1">s</text:span><text:span text:style-name="T13">) (</text:span><text:span text:style-name="T1">t</text:span><text:span text:style-name="T13">)</text:span></text:p>
      <text:p text:style-name="P1">Dette sammenstykker en liste af tekststrenge <text:span text:style-name="T1">ss <text:s/></text:span><text:span text:style-name="T6">med tekststrengen </text:span><text:span text:style-name="T1">t</text:span><text:span text:style-name="T10"> som adskillelse:</text:span></text:p>
      <text:p text:style-name="P11"><text:span text:style-name="T9"><text:tab/></text:span><text:span text:style-name="T1">ss </text:span><text:span text:style-name="T9">splejs (</text:span><text:span text:style-name="T1">t</text:span><text:span text:style-name="T9">)</text:span></text:p>
      <text:p text:style-name="P8">Dette splitter en sammenstykket tekststreng <text:span text:style-name="T1">s</text:span> i en liste, idet der klippes hvor <text:span text:style-name="T1">t </text:span>forekommer.</text:p>
      <text:p text:style-name="P11"><text:span text:style-name="T9"><text:tab/></text:span><text:span text:style-name="T1">s </text:span><text:span text:style-name="T9">split (</text:span><text:span text:style-name="T1">t</text:span><text:span text:style-name="T9">)</text:span></text:p>
      <text:p text:style-name="P8">Erstatningsoperatoren</text:p>
      <text:p text:style-name="P11"><text:span text:style-name="T6"><text:tab/></text:span><text:span text:style-name="T1">s </text:span><text:span text:style-name="T9">*=*</text:span><text:span text:style-name="T1"> ss</text:span></text:p>
      <text:p text:style-name="P8">forudsætter at <text:span text:style-name="T1">ss </text:span>er en liste med et lige antal tekststrenge, der opfattes som erstatningspar. For hver plads i <text:span text:style-name="T1">s </text:span>gennemløbes<text:span text:style-name="T13"> </text:span>parrene i <text:span text:style-name="T1">ss </text:span>i den orden de står, og hvis et af dem passer, udføres erstatningen og søgningen fortsætter efter den erstattede tekst.</text:p>
      <text:p text:style-name="P8">Start/slut-erstatningsoperatoren</text:p>
      <text:p text:style-name="P11"><text:span text:style-name="T6"><text:tab/></text:span><text:span text:style-name="T1">s (</text:span><text:span text:style-name="T9">&lt;</text:span><text:span text:style-name="T1">)</text:span><text:span text:style-name="T9">$*=*</text:span><text:span text:style-name="T1"> ss</text:span></text:p>
      <text:p text:style-name="P8">erstatter starten hhv. slutningen af <text:span text:style-name="T1">s </text:span>og udfører aldrig mere end en erstatning.</text:p>
      <text:p text:style-name="Text_20_body"><text:span text:style-name="T11">Tekststrenge kan sammenlignes med operatorerne <text:s/></text:span><text:span text:style-name="T12">= &lt;&gt; &lt; &lt;= &gt; &gt;=</text:span><text:span text:style-name="T11"> .</text:span><text:span text:style-name="T12"> <text:s/></text:span><text:span text:style-name="T11">Som altid tester </text:span><text:span text:style-name="T12"><text:s/>= <text:s/></text:span><text:span text:style-name="T11">og <text:s/>&lt;&gt; <text:s/>for identitet; den unikke repræsentation af konstanter sikrer at ens tekststrenge er identiske. De andre operatorer sammenligner byte-vis, uden hensyn til alfabetiseringsregler. Sammenligninger der ikke skelner mellem små og store bogstaver, må foretages ved at bruge <text:s/></text:span><text:span text:style-name="T12">småt</text:span><text:span text:style-name="T11"> -operationen på begge operander først. Sortering efter nationale alfabetiseringsregler kan ske ved at bruge <text:s/></text:span><text:span text:style-name="T12">orden </text:span><text:span text:style-name="T11">-operationen med en funktion der genererer </text:span><text:span text:style-name="T5">kollateringsnøgler</text:span><text:span text:style-name="T11"> – dvs. tekststrenge der ved rå sorteringer havner i den orden der ønskes. For at lave dansk alfabetisering skal der således bruges en kollateringsfunktion der oversætter æ, ø og å til stigende værdier – hvis der sorteres uden kollateringsfunktion, bliver rækkefølgen å, æ, ø, idet tegnkoderne ligger i denne rækkefølge.</text:span></text:p>
      <text:h text:style-name="Heading_20_3" text:outline-level="3">Store og små bogstaver – med İstanbul-ekspressen</text:h>
      <text:p text:style-name="P5">En tekststreng kan omsættes til store eller små bogstaver med operatorerne <text:s/><text:span text:style-name="T13">stort <text:s/></text:span><text:span text:style-name="T14">og <text:s/></text:span><text:span text:style-name="T13">småt</text:span><text:span text:style-name="T14"> :</text:span></text:p>
      <text:p text:style-name="Text_20_body"><text:span text:style-name="T1"><text:tab/>s</text:span> <text:span text:style-name="T13">stort<text:line-break/><text:tab/></text:span><text:span text:style-name="T1">s</text:span> <text:span text:style-name="T13">småt</text:span></text:p>
      <text:p text:style-name="P1">Denne operation skifter første tegn i teksten til stort, mens resten ikke ændres:</text:p>
      <text:p text:style-name="Text_20_body"><text:span text:style-name="T4"><text:tab/></text:span><text:span text:style-name="T1">s</text:span> <text:span text:style-name="T13">titel</text:span></text:p>
      <text:p text:style-name="P1">Disse operations er udføres af kode der er genereret ud fra unicode-tabellerne og arbejder direkte på utf-8, og vil fungere med de fleste sprog.</text:p>
      <text:p text:style-name="P1">Men desværre er tyrkerne ikke begejstrede for detteher:</text:p>
      <text:p text:style-name="P10"><text:tab/>"istanbul" titel <text:s text:c="3"/><text:span text:style-name="T8">giver</text:span><text:span text:style-name="T1"> <text:s text:c="3"/>"</text:span>Istanbul"</text:p>
      <text:p text:style-name="P1">Operationen må suppleres med en erstatningsoperation for at give det korrekte resultat:</text:p>
      <text:p text:style-name="P10"><text:tab/>"istanbul" <text:span text:style-name="T10">$*=* ["i", "İ", "ı", "I"]</text:span> titel <text:s text:c="3"/><text:span text:style-name="T8">giver</text:span><text:span text:style-name="T1"> <text:s text:c="3"/>"</text:span><text:span text:style-name="T10">İ</text:span>stanbul"</text:p>
      <text:p text:style-name="Text_20_body"><text:span text:style-name="T5">İstanbul-ekspressen</text:span><text:span text:style-name="T11"> er et fif der gør det lidt lettere for tyrkerne.</text:span></text:p>
      <text:p text:style-name="Text_20_body">Modulet <text:s/><text:span text:style-name="T13">[===,] </text:span><text:span text:style-name="T14"><text:s/></text:span><text:span text:style-name="T13"><text:s/></text:span><text:span text:style-name="T14">som er tilgængeligt fra alle normale PILS moduler, definerer disse erstatninger for de indbyggede operationer, idet skifteoperationerne kombineres med passende erstatninger:</text:span></text:p>
      <text:p text:style-name="P9"><text:tab/>{ tekst . ([stort] // erstat) | :prøv tekst *=* erstat .:kræv stort }<text:line-break/><text:tab/>{ tekst . ([småt] // erstat) | :prøv tekst *=* erstat .:kræv småt }<text:line-break/><text:tab/>{ tekst . ([titel] // erstat) | :prøv tekst $*=* erstat .:kræv titel }</text:p>
      <text:p text:style-name="P8">Ved at erstatte den sædvanlige standard-ordvælger i sproget med en version der oversætter <text:s/><text:span text:style-name="T13">stort </text:span>, <text:span text:style-name="T13"><text:s/>småt <text:s/></text:span>og<text:span text:style-name="T4"> <text:s/></text:span><text:span text:style-name="T13">titel</text:span> <text:s/>som følger:</text:p>
      <text:p text:style-name="P9"><text:tab/>{} **=** ;[[?:?]:]<text:line-break/><text:tab/>[ [?:?]:<text:line-break/><text:tab/> <text:s/>."stort" [stort|"i", "İ", "ı", "I"]<text:line-break/><text:tab/> <text:s/>."småt" [småt|"I", "ı", "İ", "<text:span text:style-name="T21">i</text:span>"]<text:line-break/><text:tab/> <text:s/>."titel" [titel|"i", "İ", "ı", "I"]<text:line-break/><text:tab/>]</text:p>
      <text:p text:style-name="P8">og bruge dette sprog til at parse vores testudtryk, får vi:</text:p>
      <text:p text:style-name="P10"><text:tab/>"istanbul" titel <text:s text:c="3"/><text:span text:style-name="T8">giver</text:span><text:span text:style-name="T1"> <text:s text:c="3"/>"</text:span><text:span text:style-name="T10">İ</text:span>stanbul"</text:p>
      <text:p text:style-name="P2">Således kan omskiftningen mellem små og store bogstaver konfigureres i sprogobjektet.</text:p>
      <text:h text:style-name="Heading_20_3" text:outline-level="3">Tekstsplittere</text:h>
      <text:p text:style-name="P8"><text:span text:style-name="T1">Tekstsplitteren </text:span>er en udvidet <text:s/><text:span text:style-name="T13">split</text:span> -operation, konstrueret til hjælp for leksikalsk analyse af diveres programmeringssprog, men ganske brugbar til tekstanalyse i det hele taget. Tekstsplitteren er et alternativ til såkaldte <text:span text:style-name="T1">regular expressions</text:span>, der bruges til tilsvarende formål i mange andre programmeringssystemer.</text:p>
      <text:p text:style-name="P8">En tekstsplitter er en nodekonstant der angiver en grammatik. Halen er en prioriteret liste af mål (på nørdsk hedder det <text:span text:style-name="T1">nonterminaler</text:span>, og de der er nævnt i halen er mulige startsymboler);<text:span text:style-name="T1"> </text:span>de tilsvarende ben i noden beskriver veje til målene (på nørdsk kaldet <text:span text:style-name="T1">produktioner</text:span>). Vejene består dels af mål, dels af tekststumper (på nørdsk <text:span text:style-name="T1">terminaler</text:span>) samt nogle kontrol-instruktioner. Mål kan bruges rekursivt, også de mål der ikke findes i den prioriterede liste.</text:p>
      <text:p text:style-name="P8">En vej kan bestå af flere alternative spor, der hver kan bestå af flere skridt og kontrolposter efter hinanden. Kontrolposter er skridt der efterprøver en betingelse uden at rykke frem.</text:p>
      <text:p text:style-name="P8"><text:tab/><text:span text:style-name="T1">s </text:span><text:span text:style-name="T13">split<text:line-break/><text:tab/>[ </text:span><text:span text:style-name="T1">mål</text:span><text:span text:style-name="T13">,</text:span><text:span text:style-name="T1"> ...<text:line-break/><text:tab/> <text:s/>.mål vej<text:line-break/><text:tab/> <text:s/>...<text:line-break/><text:tab/></text:span><text:span text:style-name="T13">]</text:span></text:p>
      <text:p text:style-name="P8">Dette udtryk vil gennemløbe tekststrengen <text:span text:style-name="T1">s</text:span> og levere en liste af par <text:span text:style-name="T13">(</text:span><text:span text:style-name="T1">mål</text:span><text:span text:style-name="T13">,</text:span><text:span text:style-name="T1"> tekststump</text:span><text:span text:style-name="T13">) </text:span>, hvor målene er de overordnede mål i splitterens hale, og tekststumperne er de udsnit af <text:span text:style-name="T1">s </text:span>der passer til målene. Når ingen mål kan nås fra en position i tekststrengen, dannes et par <text:s/><text:span text:style-name="T13">(,</text:span><text:span text:style-name="T1"> enkeltbyte-tekststump</text:span><text:span text:style-name="T13">)</text:span> idet der rykkes en byte frem.</text:p>
      <text:p text:style-name="P8">Tomme veje afvises på topniveau og af gentagerne <text:s/><text:span text:style-name="T13">[*: </text:span><text:span text:style-name="T1">...</text:span><text:span text:style-name="T13">] <text:s/></text:span>og <text:s/><text:span text:style-name="T13">[+:</text:span> <text:span text:style-name="T1">...</text:span><text:span text:style-name="T13">] </text:span><text:s/>for at undgå at analysen kører i ring, men i andre sammenhænge er de tilladt.</text:p>
      <text:p text:style-name="P8">Gyldige skridt er:</text:p>
      <text:p text:style-name="P8"><text:tab/><text:span text:style-name="T1">mål – </text:span>henviser til et mål der skal indgå i sporet<text:line-break/><text:tab/><text:span text:style-name="T13">1</text:span> – joker, går en enkelt byte frem<text:line-break/><text:tab/><text:span text:style-name="T13">"</text:span><text:span text:style-name="T1">a</text:span><text:span text:style-name="T13">-</text:span><text:span text:style-name="T1">z</text:span><text:span text:style-name="T13">" </text:span>– en tekststreng på 3 bytes, passerer en byte der skal ligge i området<text:line-break/><text:tab/>enhver anden<text:span text:style-name="T13"> </text:span>tekststreng – skal passe præcist<text:line-break/><text:tab/><text:span text:style-name="T13">[*: </text:span><text:span text:style-name="T1">vej</text:span><text:span text:style-name="T13">]</text:span><text:span text:style-name="T1"> – </text:span>så mange gennemløb som muligt af <text:span text:style-name="T1">vej</text:span>, eventuelt ingen <text:line-break/><text:tab/><text:span text:style-name="T13">[+: </text:span><text:span text:style-name="T1">vej</text:span><text:span text:style-name="T13">]</text:span> – så mange gennemløb som muligt, mindst ét <text:line-break/><text:tab/><text:span text:style-name="T13">[=*: </text:span><text:span text:style-name="T1">vej</text:span><text:span text:style-name="T13">]</text:span> – ryk frem indtil <text:span text:style-name="T1">vej</text:span> er farbar, og tag den<text:line-break/><text:tab/><text:span text:style-name="T13">[^*: </text:span><text:span text:style-name="T1">vej</text:span><text:span text:style-name="T13">]</text:span> – ryk frem indtil <text:span text:style-name="T1">vej</text:span> er farbar, uden at tage den</text:p>
      <text:p text:style-name="P8">Gyldige kontrolposter er:</text:p>
      <text:p text:style-name="P8"><text:tab/><text:span text:style-name="T13">[-: </text:span><text:span text:style-name="T1">vej</text:span><text:span text:style-name="T13">]</text:span> – den angivne vej må ikke <text:span text:style-name="T1">ikke</text:span> være farbar<text:line-break/><text:tab/><text:span text:style-name="T13">[/: </text:span><text:span text:style-name="T1">mål</text:span><text:span text:style-name="T13">]</text:span> – det sidste hovedmål skal være det angivne<text:span text:style-name="T1"><text:line-break/><text:tab/></text:span><text:span text:style-name="T13">[/: </text:span><text:span text:style-name="T1">mål, ...</text:span><text:span text:style-name="T13">]</text:span> – ...eller et af dem. <text:s/><text:span text:style-name="T13">$</text:span> <text:s/>angiver at indeværende hovedmål er det første.</text:p>
      <text:p text:style-name="P8">Bemærk at lister bruges i to niveauer, med forskellig betydning:</text:p>
      <text:p text:style-name="P8"><text:tab/><text:span text:style-name="T1">spor</text:span><text:span text:style-name="T13">, </text:span><text:span text:style-name="T1">... </text:span>– et af sporene skal være farbart<text:line-break/><text:tab/>Et spor kan bestå af flere skridt der skal tages efter hinanden</text:p>
      <text:p text:style-name="P8">For tydelighedens skyld bør de spor der udgør en vej, adskilles af kommaer, mens spor der består af flere skridt, skrives på kort listeform, uden kommaer.</text:p>
      <text:p text:style-name="P8">Hvor der kun er et enkelt spor som består af flere skridt, skal sporet afsluttes med et komma for at gøre det til en liste af spor, ellers vil hvert skridt blive opfattet som et spor – jf. <text:span text:style-name="T13">.hexadecimal <text:s/></text:span>herunder.</text:p>
      <text:p text:style-name="P8">Denne tekstsplitter genkender hexadecimale tal:</text:p>
      <text:p text:style-name="P8"><text:tab/><text:span text:style-name="T1">s </text:span><text:span text:style-name="T13">split<text:line-break/><text:tab/>[ hexadecimal,<text:line-break/><text:tab/> <text:s/>.hexadecimal "0x" [+: hexdigit],<text:line-break/><text:tab/> <text:s/>.hexdigit "0-9", "A-F", "a-f"<text:line-break/><text:tab/>]</text:span></text:p>
      <text:p text:style-name="P8">Dette splitter <text:span text:style-name="T1">s</text:span> i enkelte utf-8-tegn (gyldige) og klumper af ikke-utf-8-konforme data:</text:p>
      <text:p text:style-name="P8"><text:tab/><text:span text:style-name="T1">s </text:span><text:span text:style-name="T13">split<text:line-break/><text:tab/>[ gyldig ugyldig<text:line-break/><text:tab/> <text:s/>.gyldig ""00"-"7f, ""c0"-"df x, <text:s/>""e0"-"ef x x, ""f0"-"f7 x x x<text:line-break/><text:tab/> <text:s/>.x "80"-"bf<text:line-break/><text:tab/> <text:s/>.ugyldig [^*: gyldig]<text:line-break/><text:tab/>]</text:span></text:p>
      <text:p text:style-name="P8">Instruksen <text:s/><text:span text:style-name="T13">-:</text:span> <text:s/>kan bruges til test som disse:</text:p>
      <text:p text:style-name="P8"><text:span text:style-name="T4"><text:tab/></text:span><text:span text:style-name="T13">[-: 1]</text:span><text:span text:style-name="T1"> <text:s text:c="3"/>–</text:span> slutningen af teksten<text:span text:style-name="T1"><text:line-break/><text:tab/></text:span><text:span text:style-name="T13">[-: -:</text:span><text:span text:style-name="T4"> </text:span><text:span text:style-name="T1">vej</text:span><text:span text:style-name="T13">]</text:span><text:span text:style-name="T1"> <text:s text:c="3"/>– </text:span>snydekig fremad, <text:span text:style-name="T1">vej</text:span> skal være farbar men følges ikke</text:p>
      <text:h text:style-name="Heading_20_3" text:outline-level="3">Fælles operationer for tekststrenge og lister</text:h>
      <text:p text:style-name="P1">Operationerne i dette afsnit virker på tekststrenge såvel som lister. Tekststrenge bearbejdes byte for byte, så visse operationer kan give uventede resultater med utf-8 bytesekvenser.</text:p>
      <text:p text:style-name="P1">Tekststrengs- og listehhåndtering er optimeret så oprettelse af mellemresultater undgås når det er muligt. Disse optimeringer fungerer ikke når mellemresultater bindes til variable – hvis du har hastighedsproblemer med disse operationer, så brug sammenkædede operationer når det er muligt.</text:p>
      <text:p text:style-name="P1">I det følgende betegner <text:span text:style-name="T1">s </text:span><text:span text:style-name="T6">og </text:span><text:span text:style-name="T1">t</text:span><text:span text:style-name="T6"> tekststrenge eller lister, </text:span><text:span text:style-name="T1">n</text:span><text:span text:style-name="T6"> et ikke-negativt heltal, og </text:span><text:span text:style-name="T1">op</text:span><text:span text:style-name="T6"> en operator. Et <text:s/></text:span><text:span text:style-name="T1">(</text:span><text:span text:style-name="T9">&lt;</text:span><text:span text:style-name="T1">)</text:span><text:span text:style-name="T6"> <text:s/>foran en operator – som <text:s text:c="2"/></text:span><text:span text:style-name="T1">(</text:span><text:span text:style-name="T9">&lt;</text:span><text:span text:style-name="T1">)</text:span><text:span text:style-name="T9">+#</text:span><text:span text:style-name="T6"> <text:s/>– betyder at operator <text:s/></text:span><text:span text:style-name="T9">+#</text:span><text:span text:style-name="T6"> <text:s/>har en dobbeltgænger <text:s/></text:span><text:span text:style-name="T9">&lt;+# <text:s/></text:span><text:span text:style-name="T6">der arbejder i modsat retning, idet positioner regnes fra tekststrengens eller listens slutning.</text:span></text:p>
      <text:p text:style-name="P1"><text:span text:style-name="T1">s </text:span><text:span text:style-name="T9">.</text:span><text:span text:style-name="T1"> n</text:span><text:span text:style-name="T6"> <text:s text:c="3"/>– </text:span><text:span text:style-name="T1">n</text:span><text:span text:style-name="T6">'te byte/element af s idet der tællles fra 1, svipser hvis ikke <text:s/></text:span><text:span text:style-name="T9">1 &lt;=</text:span><text:span text:style-name="T6"> </text:span><text:span text:style-name="T1">n</text:span><text:span text:style-name="T6"> </text:span><text:span text:style-name="T9">&lt;=</text:span><text:span text:style-name="T6"> </text:span><text:span text:style-name="T1">s</text:span><text:span text:style-name="T6"> </text:span><text:span text:style-name="T9">antal</text:span><text:span text:style-name="T6"> </text:span><text:span text:style-name="T9">.</text:span></text:p>
      <text:p text:style-name="P1"><text:span text:style-name="T1">s</text:span><text:span text:style-name="T6"> </text:span><text:span text:style-name="T9">antal <text:s text:c="3"/></text:span><text:span text:style-name="T6">giver antallet af elementer i </text:span><text:span text:style-name="T1">s</text:span><text:span text:style-name="T6">. ( </text:span><text:span text:style-name="T1">s </text:span><text:span text:style-name="T9">utf-8 antal <text:s/></text:span><text:span text:style-name="T6">tæller tegnene i en tekststreng.)</text:span></text:p>
      <text:p text:style-name="P1"><text:span text:style-name="T1">s</text:span><text:span text:style-name="T6"> </text:span><text:span text:style-name="T9">antal (</text:span><text:span text:style-name="T1">t</text:span><text:span text:style-name="T9">) <text:s text:c="3"/></text:span><text:span text:style-name="T6">antal ikke-overlappende forekomster af </text:span><text:span text:style-name="T1">t</text:span><text:span text:style-name="T6"> i </text:span><text:span text:style-name="T1">s</text:span><text:span text:style-name="T6">.</text:span></text:p>
      <text:p text:style-name="P1"><text:span text:style-name="T1">s</text:span><text:span text:style-name="T9"> vend <text:s text:c="3"/></text:span><text:span text:style-name="T6">– s</text:span><text:span text:style-name="T9"> </text:span><text:span text:style-name="T6">bagfra. Brug <text:s/></text:span><text:span text:style-name="T1">s </text:span><text:span text:style-name="T9">utf-8 vend</text:span><text:span text:style-name="T6"> </text:span><text:span text:style-name="T9">utf-8 <text:s/></text:span><text:span text:style-name="T6">for at vende en tekst tegnvis.</text:span></text:p>
      <text:p text:style-name="P1"><text:span text:style-name="T1">s</text:span><text:span text:style-name="T6"> </text:span><text:span text:style-name="T1">(</text:span><text:span text:style-name="T9">&lt;</text:span><text:span text:style-name="T1">)</text:span><text:span text:style-name="T9">+#</text:span><text:span text:style-name="T6"> </text:span><text:span text:style-name="T1">n</text:span><text:span text:style-name="T6"> <text:s text:c="3"/>– de første </text:span><text:span text:style-name="T1">n</text:span><text:span text:style-name="T6"> <text:s/>elementer af </text:span><text:span text:style-name="T1">s</text:span><text:span text:style-name="T6">; svipser hvis <text:s/></text:span><text:span text:style-name="T1">n</text:span><text:span text:style-name="T6"> </text:span><text:span text:style-name="T9">&gt;</text:span><text:span text:style-name="T6"> </text:span><text:span text:style-name="T1">s</text:span><text:span text:style-name="T6"> </text:span><text:span text:style-name="T9">antal </text:span><text:span text:style-name="T6">.</text:span></text:p>
      <text:p text:style-name="P1"><text:span text:style-name="T1">s</text:span><text:span text:style-name="T6"> </text:span><text:span text:style-name="T1">(</text:span><text:span text:style-name="T9">&lt;</text:span><text:span text:style-name="T1">)</text:span><text:span text:style-name="T9">-#</text:span><text:span text:style-name="T6"> </text:span><text:span text:style-name="T1">n</text:span><text:span text:style-name="T6"> <text:s text:c="3"/>– </text:span><text:span text:style-name="T1">s</text:span><text:span text:style-name="T6"> uden de første </text:span><text:span text:style-name="T1">n</text:span><text:span text:style-name="T6"> elementer; svipser hvis <text:s/></text:span><text:span text:style-name="T1">n</text:span><text:span text:style-name="T6"> </text:span><text:span text:style-name="T9">&gt;</text:span><text:span text:style-name="T6"> </text:span><text:span text:style-name="T1">s</text:span><text:span text:style-name="T6"> </text:span><text:span text:style-name="T9">antal </text:span><text:span text:style-name="T6">.</text:span></text:p>
      <text:p text:style-name="P1"><text:span text:style-name="T1">s</text:span><text:span text:style-name="T6"> </text:span><text:span text:style-name="T1">(</text:span><text:span text:style-name="T9">&lt;</text:span><text:span text:style-name="T1">)+</text:span><text:span text:style-name="T9">+#</text:span><text:span text:style-name="T6"> </text:span><text:span text:style-name="T1">n</text:span><text:span text:style-name="T6"> <text:s text:c="3"/>– de første </text:span><text:span text:style-name="T1">n</text:span><text:span text:style-name="T6"> elementer af </text:span><text:span text:style-name="T1">s, </text:span><text:span text:style-name="T6">eller hele </text:span><text:span text:style-name="T1">s </text:span><text:span text:style-name="T6">hvis <text:s/></text:span><text:span text:style-name="T1">n</text:span><text:span text:style-name="T6"> </text:span><text:span text:style-name="T9">&gt;</text:span><text:span text:style-name="T6"> </text:span><text:span text:style-name="T1">s</text:span><text:span text:style-name="T6"> </text:span><text:span text:style-name="T9">antal </text:span><text:span text:style-name="T6">.<text:line-break/>For lister udføres <text:s/></text:span><text:span text:style-name="T9">++#</text:span><text:span text:style-name="T6"> <text:s/>på samlebånd; så vidt muligt beregnes kun de første </text:span><text:span text:style-name="T1">n </text:span><text:span text:style-name="T6">elementer af </text:span><text:span text:style-name="T1">s</text:span><text:span text:style-name="T6">.</text:span></text:p>
      <text:p text:style-name="P1"><text:span text:style-name="T1">s</text:span><text:span text:style-name="T6"> </text:span><text:span text:style-name="T1">(</text:span><text:span text:style-name="T9">&lt;</text:span><text:span text:style-name="T1">)</text:span><text:span text:style-name="T9">--#</text:span><text:span text:style-name="T6"> </text:span><text:span text:style-name="T1">n</text:span><text:span text:style-name="T6"> <text:s text:c="3"/>– </text:span><text:span text:style-name="T1">s</text:span><text:span text:style-name="T6"> uden de første </text:span><text:span text:style-name="T1">n</text:span><text:span text:style-name="T6"> elementerne; </text:span><text:span text:style-name="T9">""</text:span><text:span text:style-name="T6"> hvis <text:s/></text:span><text:span text:style-name="T1">n</text:span><text:span text:style-name="T6"> </text:span><text:span text:style-name="T9">&gt;</text:span><text:span text:style-name="T6"> </text:span><text:span text:style-name="T1">s</text:span><text:span text:style-name="T6"> </text:span><text:span text:style-name="T9">antal </text:span><text:span text:style-name="T6">.</text:span></text:p>
      <text:p text:style-name="P1"><text:span text:style-name="T6">I det følgende angiver </text:span><text:span text:style-name="T1"><text:s/>(</text:span><text:span text:style-name="T9">&lt;</text:span><text:span text:style-name="T1">)(</text:span><text:span text:style-name="T9">+#</text:span><text:span text:style-name="T1">/</text:span><text:span text:style-name="T9">-#</text:span><text:span text:style-name="T1">)op</text:span><text:span text:style-name="T6"> <text:s/>at </text:span><text:span text:style-name="T1">op</text:span><text:span text:style-name="T6"> har 2 fætre<text:line-break/><text:tab/></text:span><text:span text:style-name="T1">s</text:span><text:span text:style-name="T6"> +</text:span><text:span text:style-name="T9">#</text:span><text:span text:style-name="T1">op</text:span><text:span text:style-name="T6"> </text:span><text:span text:style-name="T1">t <text:s text:c="3"/>=</text:span><text:span text:style-name="T6"> <text:s text:c="4"/></text:span><text:span text:style-name="T1">s</text:span><text:span text:style-name="T6"> +</text:span><text:span text:style-name="T9"># (</text:span><text:span text:style-name="T1">s</text:span><text:span text:style-name="T9"> </text:span><text:span text:style-name="T1">op</text:span><text:span text:style-name="T6"> </text:span><text:span text:style-name="T1">t</text:span><text:span text:style-name="T9">)<text:line-break/></text:span><text:span text:style-name="T6"><text:tab/></text:span><text:span text:style-name="T1">s</text:span><text:span text:style-name="T6"> </text:span><text:span text:style-name="T9">-#</text:span><text:span text:style-name="T1">op</text:span><text:span text:style-name="T6"> </text:span><text:span text:style-name="T1">t <text:s text:c="3"/>=</text:span><text:span text:style-name="T6"> <text:s text:c="4"/></text:span><text:span text:style-name="T1">s</text:span><text:span text:style-name="T6"> </text:span><text:span text:style-name="T9">-# (</text:span><text:span text:style-name="T1">s</text:span><text:span text:style-name="T9"> </text:span><text:span text:style-name="T1">op</text:span><text:span text:style-name="T6"> </text:span><text:span text:style-name="T1">t</text:span><text:span text:style-name="T9">)<text:line-break/></text:span><text:span text:style-name="T6">og alle de tre har bagvendte dobbeltgængere <text:s/></text:span><text:span text:style-name="T9">&lt;</text:span><text:span text:style-name="T1">op <text:s/></text:span><text:span text:style-name="T9">&lt;+#</text:span><text:span text:style-name="T1">op <text:s/></text:span><text:span text:style-name="T9">&lt;+#</text:span><text:span text:style-name="T1">op</text:span></text:p>
      <text:p text:style-name="P2">Disse kan uden videre bruges med utf-8 multibyte-tegn:</text:p>
      <text:p text:style-name="P1"><text:span text:style-name="T1">s (</text:span><text:span text:style-name="T9">&lt;</text:span><text:span text:style-name="T1">)(</text:span><text:span text:style-name="T9">+#</text:span><text:span text:style-name="T1">/</text:span><text:span text:style-name="T9">-#</text:span><text:span text:style-name="T1">)</text:span><text:span text:style-name="T9">=*</text:span><text:span text:style-name="T1"> t <text:s text:c="3"/></text:span><text:span text:style-name="T6">– længden af </text:span><text:span text:style-name="T1">s </text:span><text:span text:style-name="T6">til og med første forekomst af </text:span><text:span text:style-name="T1">t</text:span><text:span text:style-name="T6">, eller <text:s/></text:span><text:span text:style-name="T9">0</text:span><text:span text:style-name="T6"> <text:s/>hvis </text:span><text:span text:style-name="T1">t</text:span><text:span text:style-name="T6"> ikke findes i </text:span><text:span text:style-name="T1">s</text:span><text:span text:style-name="T6">.</text:span></text:p>
      <text:p text:style-name="P1"><text:span text:style-name="T1">s (</text:span><text:span text:style-name="T9">&lt;</text:span><text:span text:style-name="T1">)(</text:span><text:span text:style-name="T9">+#</text:span><text:span text:style-name="T1">/</text:span><text:span text:style-name="T9">-#</text:span><text:span text:style-name="T1">)^</text:span><text:span text:style-name="T9">*</text:span><text:span text:style-name="T1"> t <text:s text:c="3"/></text:span><text:span text:style-name="T6">– <text:s/>længden af </text:span><text:span text:style-name="T1">s </text:span><text:span text:style-name="T6">indtil første forekomst af </text:span><text:span text:style-name="T1">t</text:span><text:span text:style-name="T6">, eller <text:s/></text:span><text:span text:style-name="T1">s</text:span><text:span text:style-name="T6"> </text:span><text:span text:style-name="T9">antal <text:s/></text:span><text:span text:style-name="T6">hvis </text:span><text:span text:style-name="T1">t</text:span><text:span text:style-name="T6"> ikke findes.</text:span></text:p>
      <text:p text:style-name="P1"><text:span text:style-name="T1">s (</text:span><text:span text:style-name="T9">&lt;</text:span><text:span text:style-name="T1">)(</text:span><text:span text:style-name="T9">+#</text:span><text:span text:style-name="T1">/</text:span><text:span text:style-name="T9">-#</text:span><text:span text:style-name="T1">)$</text:span><text:span text:style-name="T9">*</text:span><text:span text:style-name="T1"> t <text:s text:c="3"/></text:span><text:span text:style-name="T6">– længden af </text:span><text:span text:style-name="T1">t</text:span><text:span text:style-name="T6"> hvis </text:span><text:span text:style-name="T1">s</text:span><text:span text:style-name="T6"> begynder med </text:span><text:span text:style-name="T1">t</text:span><text:span text:style-name="T6">, ellers <text:s/></text:span><text:span text:style-name="T9">0 </text:span><text:span text:style-name="T6">.</text:span></text:p>
      <text:p text:style-name="P1"><text:span text:style-name="T6">Disse kan give uventede resultater hvis </text:span><text:span text:style-name="T1">t</text:span><text:span text:style-name="T6"> indeholder utf-8 multibyte-tegn.</text:span></text:p>
      <text:p text:style-name="P1"><text:span text:style-name="T1">s (</text:span><text:span text:style-name="T9">&lt;</text:span><text:span text:style-name="T1">)(</text:span><text:span text:style-name="T9">+#</text:span><text:span text:style-name="T1">/</text:span><text:span text:style-name="T9">-#</text:span><text:span text:style-name="T1">)#</text:span><text:span text:style-name="T9">*</text:span><text:span text:style-name="T1"> t <text:s text:c="3"/></text:span><text:span text:style-name="T6">– længden af sammenfaldende start af </text:span><text:span text:style-name="T1">s </text:span><text:span text:style-name="T6">og </text:span><text:span text:style-name="T1">t</text:span><text:span text:style-name="T6">.</text:span></text:p>
      <text:p text:style-name="P1"><text:span text:style-name="T1">s (</text:span><text:span text:style-name="T9">&lt;</text:span><text:span text:style-name="T1">)(</text:span><text:span text:style-name="T9">+#</text:span><text:span text:style-name="T1">/</text:span><text:span text:style-name="T9">-#</text:span><text:span text:style-name="T1">)~</text:span><text:span text:style-name="T9">*</text:span><text:span text:style-name="T1"> t <text:s text:c="3"/></text:span><text:span text:style-name="T6">– længden af </text:span><text:span text:style-name="T1">s </text:span><text:span text:style-name="T6">til med sidste element af en spredt forekomst af </text:span><text:span text:style-name="T1">t, </text:span><text:span text:style-name="T6">eller <text:s/></text:span><text:span text:style-name="T9">0</text:span><text:span text:style-name="T6"> .</text:span></text:p>
      <text:p text:style-name="P1"><text:span text:style-name="T1">s (</text:span><text:span text:style-name="T9">&lt;</text:span><text:span text:style-name="T1">)(</text:span><text:span text:style-name="T9">+#</text:span><text:span text:style-name="T1">/</text:span><text:span text:style-name="T9">-#</text:span><text:span text:style-name="T1">)+</text:span><text:span text:style-name="T9">*</text:span><text:span text:style-name="T1"> t <text:s text:c="3"/></text:span><text:span text:style-name="T6">– antal begyndende elementer i </text:span><text:span text:style-name="T1">s</text:span><text:span text:style-name="T6"> der også findes et sted i </text:span><text:span text:style-name="T1">t</text:span><text:span text:style-name="T6">.</text:span></text:p>
      <text:p text:style-name="P1"><text:span text:style-name="T1">s (</text:span><text:span text:style-name="T9">&lt;</text:span><text:span text:style-name="T1">)(</text:span><text:span text:style-name="T9">+#</text:span><text:span text:style-name="T1">/</text:span><text:span text:style-name="T9">-#</text:span><text:span text:style-name="T1">)-</text:span><text:span text:style-name="T9">*</text:span><text:span text:style-name="T1"> t <text:s text:c="3"/></text:span><text:span text:style-name="T6">– antal begyndende elementerne i </text:span><text:span text:style-name="T1">s</text:span><text:span text:style-name="T6"> der ikke findes i </text:span><text:span text:style-name="T1">t</text:span><text:span text:style-name="T6">.</text:span></text:p>
      <text:p text:style-name="P1">Som eksempel på hvordan de kombinerede operatorer virker, er her et udtryk der giver navnedelen af et filnavn idet stien og filtypen klippes fra, hvor både <text:s/><text:span text:style-name="T13">\</text:span> <text:s/>og <text:s/><text:span text:style-name="T13">/</text:span> <text:s/>opfattes som sti-separatorer:</text:p>
      <text:p text:style-name="P1"><text:tab/><text:span text:style-name="T1">fn </text:span><text:span text:style-name="T9">&lt;+#-* "\/" &lt;-#=* "."</text:span></text:p>
      <text:p text:style-name="P1"><text:span text:style-name="T9">&lt;+#-* </text:span><text:span text:style-name="T6">operatoren er sikker at bruge selvom filnavnene kan indeholde <text:s/>utf-8 multibyte-tegn, idet <text:s/></text:span><text:span text:style-name="T9">\ <text:s/></text:span><text:span text:style-name="T6">og <text:s/>/ <text:s text:c="2"/>er ASCII-tegn og disse aldrig forekommer i utf-8 multibyte-tegn.</text:span></text:p>
      <text:h text:style-name="Heading_20_2" text:outline-level="2">Listeoperationer</text:h>
      <text:p text:style-name="Text_20_body">De følgende afsnit beskriver operationer der er specifike for lister.</text:p>
      <text:h text:style-name="Heading_20_3" text:outline-level="3">Simple listeoperationer</text:h>
      <text:p text:style-name="P5">De indbyggede listeoperationer i PILS virker efter samlebåndsprincippet: i stedet for at konstruere mellemresultater som lister sendes elementerne videre enkeltvis til efterfølgende listeoperationer. Efter den sidste listeoperation opsamles elementerne i en intern struktur, og listen konstrueres når alle elementer er behandlet.</text:p>
      <text:p text:style-name="P5">I det følgende er <text:span text:style-name="T1">m</text:span> og <text:span text:style-name="T1">n</text:span> heltal, <text:span text:style-name="T1">s</text:span> og <text:span text:style-name="T1">t</text:span> er lister hvis ikke andet er nævnt.</text:p>
      <text:p text:style-name="P5"><text:span text:style-name="T13">listevis <text:s/></text:span>og <text:s/><text:span text:style-name="T13">enkeltvis <text:s/></text:span><text:span text:style-name="T14">er bekvemmeligheds</text:span>operationer til situationer hvor der valgfrit kan bruges et enkelt element eller en liste, typisk når der skal angives en eller flere parametre til en funktion.</text:p>
      <text:p text:style-name="Text_20_body"><text:span text:style-name="T1"><text:tab/>s </text:span><text:span text:style-name="T9">listevis <text:s text:c="3"/></text:span><text:span text:style-name="T8">er det samme som <text:s text:c="3"/></text:span><text:span text:style-name="T2">s </text:span><text:span text:style-name="T9">kald {e|:ok e,} {&amp; ok|:ok}</text:span></text:p>
      <text:p text:style-name="P12"><text:span text:style-name="T8">Hvis </text:span><text:span text:style-name="T14">s</text:span><text:span text:style-name="T8"> er a liste, ryger den direkte igennem, ellers indlægges den som eneste element i en liste.</text:span></text:p>
      <text:p text:style-name="Text_20_body"><text:span text:style-name="T1"><text:tab/>s </text:span><text:span text:style-name="T9">enkeltvis <text:s text:c="3"/></text:span><text:span text:style-name="T8">er det samme som <text:s text:c="3"/></text:span><text:span text:style-name="T2">s </text:span><text:span text:style-name="T9">prøv {ok,|:ok}</text:span></text:p>
      <text:p text:style-name="P12"><text:span text:style-name="T8">Det modsatte af <text:s/></text:span><text:span text:style-name="T9">listevis</text:span><text:span text:style-name="T8"> : hvis </text:span><text:span text:style-name="T14">s</text:span><text:span text:style-name="T8"> er en liste med et enkelt element, udtages det, alle andre værdier videregives bare..</text:span></text:p>
      <text:p text:style-name="Text_20_body"><text:span text:style-name="T1"><text:tab/>s</text:span> <text:span text:style-name="T13">&amp;</text:span> <text:span text:style-name="T1">t <text:s/></text:span><text:span text:style-name="T6">sammenstykker <text:s/></text:span><text:span text:style-name="T1">s</text:span><text:span text:style-name="T6"> </text:span><text:span text:style-name="T9">listevis <text:s/></text:span><text:span text:style-name="T6">og <text:s/></text:span><text:span text:style-name="T1">t </text:span><text:span text:style-name="T9">listevis </text:span><text:span text:style-name="T6">.</text:span></text:p>
      <text:p text:style-name="P5"><text:tab/><text:span text:style-name="T1">s </text:span><text:span text:style-name="T13">først </text:span><text:span text:style-name="T2">(</text:span><text:span text:style-name="T1">e) <text:s text:c="3"/></text:span>indskyder elementet <text:span text:style-name="T1">e </text:span>foran elementerne i <text:span text:style-name="T1">s</text:span>, <text:s/>til brug for<text:span text:style-name="T14"> <text:s/></text:span><text:span text:style-name="T13">fold</text:span><text:span text:style-name="T14"> -operation</text:span></text:p>
      <text:p text:style-name="P5"><text:span text:style-name="T14">Operationerne <text:s/></text:span><text:span text:style-name="T13">op <text:s/></text:span>og <text:s text:c="2"/><text:span text:style-name="T13">ned <text:s/></text:span><text:span text:style-name="T14">danner </text:span>lister af stigende og faldende heltal:</text:p>
      <text:p text:style-name="Text_20_body"><text:span text:style-name="T1"><text:tab/>m </text:span><text:span text:style-name="T9">op (</text:span><text:span text:style-name="T1">n</text:span><text:span text:style-name="T9">) <text:s text:c="3"/></text:span><text:span text:style-name="T2">m, m + 1, m + 2 ... n</text:span><text:span text:style-name="T9"> <text:s/></text:span><text:span text:style-name="T8">eller <text:s/></text:span><text:span text:style-name="T9">[] <text:s/></text:span><text:span text:style-name="T8">hvis <text:s/>n &lt; m<text:line-break/></text:span><text:span text:style-name="T1"><text:tab/>m </text:span><text:span text:style-name="T9">ned (</text:span><text:span text:style-name="T1">n</text:span><text:span text:style-name="T9">) <text:s text:c="3"/></text:span><text:span text:style-name="T2">m, m - 1, ... n</text:span><text:span text:style-name="T9"> <text:s/></text:span><text:span text:style-name="T8">eller <text:s/></text:span><text:span text:style-name="T9">[] <text:s/></text:span><text:span text:style-name="T8">hvis <text:s/>n &gt; m<text:line-break/></text:span><text:span text:style-name="T1"><text:tab/>n </text:span><text:span text:style-name="T9">op <text:s text:c="3"/></text:span><text:span text:style-name="T8">er det same som <text:s text:c="3"/></text:span><text:span text:style-name="T9">1 op (</text:span><text:span text:style-name="T2">n</text:span><text:span text:style-name="T9">)</text:span><text:span text:style-name="T8"><text:line-break/></text:span><text:span text:style-name="T4"><text:tab/></text:span><text:span text:style-name="T2">n</text:span><text:span text:style-name="T4"> ned</text:span><text:span text:style-name="T9"> <text:s text:c="3"/></text:span><text:span text:style-name="T8">er det same som <text:s text:c="3"/></text:span><text:span text:style-name="T2">n</text:span><text:span text:style-name="T9"> ned 1</text:span></text:p>
      <text:p text:style-name="P2">Lister kan splittes op i mindre lister af en given længde:</text:p>
      <text:p text:style-name="P1"><text:span text:style-name="T6"><text:tab/></text:span><text:span text:style-name="T1">s </text:span><text:span text:style-name="T9">split</text:span><text:span text:style-name="T6"> </text:span><text:span text:style-name="T1">(n)<text:line-break/><text:tab/>s </text:span><text:span text:style-name="T9">split 2 <text:s text:c="3"/></text:span><text:span text:style-name="T6">splitter </text:span><text:span text:style-name="T1">s</text:span><text:span text:style-name="T6"> i par.</text:span></text:p>
      <text:p text:style-name="P2">En liste af lister kan samles til en enkelt liste:</text:p>
      <text:p text:style-name="P1"><text:span text:style-name="T6"><text:tab/></text:span><text:span text:style-name="T1">s</text:span><text:span text:style-name="T6"> </text:span><text:span text:style-name="T9">splejs</text:span></text:p>
      <text:p text:style-name="P1"><text:span text:style-name="T6">Eventuelle elementer af </text:span><text:span text:style-name="T1">s</text:span><text:span text:style-name="T6"> som ikke er lister, medtages i den splejsede liste.</text:span></text:p>
      <text:h text:style-name="Heading_20_3" text:outline-level="3">Opbygning, filtrering og foldning af lister</text:h>
      <text:p text:style-name="P2">Lister kan opbygges med listebyggeren:</text:p>
      <text:p text:style-name="P2"><text:tab/><text:span text:style-name="T13">:liste </text:span><text:span text:style-name="T1">...</text:span><text:span text:style-name="T13"> liste := </text:span><text:span text:style-name="T1">værdi</text:span><text:span text:style-name="T13"> </text:span><text:span text:style-name="T1">... ...</text:span><text:span text:style-name="T13"><text:line-break/><text:tab/>:liste [</text:span><text:span text:style-name="T1">mærkat</text:span><text:span text:style-name="T13">]; </text:span><text:span text:style-name="T1">...</text:span><text:span text:style-name="T13"> liste [</text:span><text:span text:style-name="T1">mærkat</text:span><text:span text:style-name="T13">] := </text:span><text:span text:style-name="T1">værdi ...</text:span></text:p>
      <text:p text:style-name="P2">Dette danner en liste af alle de tildelte værdier. Den afmærkede form giver kontrol over indlejrede listebyggere.</text:p>
      <text:p text:style-name="P2">Listebyggere skrives tit som halekrøller: <text:span text:style-name="T1">(</text:span><text:span text:style-name="T13">... liste := </text:span><text:span text:style-name="T1">værdi</text:span><text:span text:style-name="T13"> ... ...</text:span><text:span text:style-name="T1">)</text:span><text:span text:style-name="T13"> .:liste</text:span></text:p>
      <text:p text:style-name="P2">Lister kan filteres med de følgende operationer. Filtrene er typisk regelsæt der ikke behøver parenteser.</text:p>
      <text:p text:style-name="P5"><text:tab/><text:span text:style-name="T1">s</text:span> <text:span text:style-name="T13">hver </text:span><text:span text:style-name="T2">(filter)</text:span></text:p>
      <text:p text:style-name="P5"><text:span text:style-name="T1">filter </text:span>-funktion prøves på alle elementer af <text:span text:style-name="T1">s </text:span>efter tur. Resultaterne sendes videres som en liste, idet svipsere springes over.</text:p>
      <text:p text:style-name="P5"><text:tab/><text:span text:style-name="T1">s</text:span> <text:span text:style-name="T13">undtagen </text:span><text:span text:style-name="T2">(filter)</text:span></text:p>
      <text:p text:style-name="P5"><text:span text:style-name="T14">Som </text:span><text:span text:style-name="T13">hver, </text:span><text:span text:style-name="T14">men videresender kun de elementer hvor filteret svipser. Resultaterne fra filteret bortkastes.</text:span></text:p>
      <text:p text:style-name="P5"><text:tab/><text:span text:style-name="T1">s</text:span> <text:span text:style-name="T13">benene </text:span><text:span text:style-name="T2">(tildelings-filter)</text:span></text:p>
      <text:p text:style-name="P5"><text:span text:style-name="T14">Som </text:span><text:span text:style-name="T13">hver, </text:span><text:span text:style-name="T14">men for hvert element </text:span><text:span text:style-name="T2">e </text:span><text:span text:style-name="T14">på position </text:span><text:span text:style-name="T2">n </text:span><text:span text:style-name="T14">(talt fra 1 som altid) prøves tildelingen <text:s/></text:span><text:span text:style-name="T2">n </text:span><text:span text:style-name="T13">:=</text:span><text:span text:style-name="T2"> e <text:s/></text:span><text:span text:style-name="T14">i</text:span><text:span text:style-name="T2"> </text:span><text:span text:style-name="T14">filteret</text:span><text:span text:style-name="T17">, i stedet for bare </text:span><text:span text:style-name="T5">e</text:span><text:span text:style-name="T18">.</text:span></text:p>
      <text:p text:style-name="P5"><text:tab/><text:span text:style-name="T1">s</text:span> <text:span text:style-name="T13">enhver </text:span><text:span text:style-name="T2">(filter)</text:span></text:p>
      <text:p text:style-name="P5"><text:span text:style-name="T14">Som</text:span><text:span text:style-name="T4"> </text:span><text:span text:style-name="T13"><text:s/>hver</text:span><text:span text:style-name="T2"> </text:span><text:span text:style-name="T14">,</text:span><text:span text:style-name="T2"> </text:span><text:span text:style-name="T14">men kræver at filteret behandler alle elementerne.</text:span></text:p>
      <text:p text:style-name="P5"><text:tab/><text:span text:style-name="T1">s</text:span> <text:span text:style-name="T13">find </text:span><text:span text:style-name="T2">(filter)</text:span></text:p>
      <text:p text:style-name="P5">Som <text:s/><text:span text:style-name="T1">a</text:span> <text:span text:style-name="T13">hver </text:span><text:span text:style-name="T2">(filter)</text:span><text:span text:style-name="T13"> 1 </text:span><text:span text:style-name="T14">men hurtigere – giver det første filterede element, svipser hvis ingen elementer slipper igennem filteret.</text:span></text:p>
      <text:p text:style-name="P2">Denne operation fjerner dubletter fra en liste, så kun første forekomst af hver værdi slipper igennem.</text:p>
      <text:p text:style-name="P5"><text:span text:style-name="T14"><text:tab/></text:span><text:span text:style-name="T2">s</text:span><text:span text:style-name="T14"> </text:span><text:span text:style-name="T13">forskellig</text:span></text:p>
      <text:p text:style-name="P2">Eller baseret på en nøglefunktion:</text:p>
      <text:p text:style-name="P5"><text:span text:style-name="T14"><text:tab/></text:span><text:span text:style-name="T2">s</text:span><text:span text:style-name="T14"> </text:span><text:span text:style-name="T13">forskellig </text:span><text:span text:style-name="T2">(filter)</text:span></text:p>
      <text:p text:style-name="P5"><text:span text:style-name="T14">Filteret prøves på alle elementer i </text:span><text:span text:style-name="T2">s</text:span><text:span text:style-name="T14">. Hver gang det giver en konstant der ikke er brugt før, sendes <text:s/>det originale element igennem. Hvis filteret giver en node <text:s/></text:span><text:span text:style-name="T13">:navn </text:span><text:span text:style-name="T2">navn</text:span><text:span text:style-name="T13">; </text:span><text:span text:style-name="T2">værdi</text:span><text:span text:style-name="T14"> <text:s/>og <text:s/></text:span><text:span text:style-name="T2">navn</text:span><text:span text:style-name="T14"> <text:s/>er en ubrugt konstant, sendes <text:s/></text:span><text:span text:style-name="T2">værdi</text:span><text:span text:style-name="T13"> <text:s/></text:span><text:span text:style-name="T14">videre i stedet for det originale element.</text:span></text:p>
      <text:p text:style-name="P2">Denne operation folder en liste sammen i en tilstand, som returneres.</text:p>
      <text:p text:style-name="P5"><text:tab/><text:span text:style-name="T1">s</text:span> <text:span text:style-name="T13">fold </text:span><text:span text:style-name="T2">(tildelings-filter)</text:span></text:p>
      <text:p text:style-name="P2">Listen skal have mindst et element. Det første element bruges som starttilstand, typisk angivet som:</text:p>
      <text:p text:style-name="P5"><text:span text:style-name="T2"><text:tab/>s</text:span><text:span text:style-name="T14"> </text:span><text:span text:style-name="T13">først </text:span><text:span text:style-name="T2">(starttilstand)</text:span><text:span text:style-name="T13"> fold </text:span><text:span text:style-name="T2">(tildelings-filter)</text:span></text:p>
      <text:p text:style-name="P5"><text:span text:style-name="T14">For alle efterfølgende elementerne </text:span><text:span text:style-name="T2">e </text:span><text:span text:style-name="T14">skal </text:span><text:span text:style-name="T2">assign-filter</text:span><text:span text:style-name="T14"> behandle tildelingen <text:s/></text:span><text:span text:style-name="T13">{</text:span><text:span text:style-name="T2">tilstand </text:span><text:span text:style-name="T13">:=</text:span><text:span text:style-name="T2"> e</text:span><text:span text:style-name="T13">|</text:span><text:span text:style-name="T2">...</text:span><text:span text:style-name="T13">}</text:span><text:span text:style-name="T14"> , og tilstanden sættes til resutatet heraf. Når alle elementer er behandlet, returneres sluttilstanden.</text:span></text:p>
      <text:p text:style-name="P2">Foldning kan kombineres med en listebygger hvis man har brug for filtrering med tilstand, som vist i dette eksempel:</text:p>
      <text:p text:style-name="P7"><text:tab/>["Rene", han, "John", "Peter", hun, "Jane", "Susan"]<text:line-break/><text:tab/>først [ukendt] fold<text:line-break/><text:tab/>{ køn := $ navn | :ok liste := køn, navn; køn }<text:line-break/><text:tab/>{ ? := / køn | :ok køn }<text:line-break/><text:tab/>.:liste</text:p>
      <text:p text:style-name="P5"><text:span text:style-name="T13"><text:s/></text:span><text:span text:style-name="T14">Resultatet er:</text:span></text:p>
      <text:p text:style-name="P7"><text:tab/>[ukendt "Rene", han "John", han "Peter", hun "Jane", hun "Susan"]</text:p>
      <text:p text:style-name="P2">( <text:span text:style-name="T13">$</text:span> <text:s/>og <text:s/><text:span text:style-name="T13">/</text:span> <text:s/>er typetjek, som forklaret i kapitlet om pasformer.)</text:p>
      <text:h text:style-name="Heading_20_3" text:outline-level="3">Sortering, sammentælling, gruppering og omformning af lister</text:h>
      <text:p text:style-name="P2">En liste kan sorteres efter nøgler:</text:p>
      <text:p text:style-name="P2"><text:tab/><text:span text:style-name="T1">s</text:span> <text:span text:style-name="T13">orden</text:span> (<text:span text:style-name="T1">nøgle-funktion</text:span>)<text:line-break/><text:tab/>s <text:span text:style-name="T13">orden [ok]</text:span> <text:s text:c="3"/>(simpel sortering med triviel nøglefunktion)</text:p>
      <text:p text:style-name="P2">Det kræves at<text:span text:style-name="T1"> nøglefunktion</text:span> virker på alle elementerne i <text:span text:style-name="T1">s</text:span>. Resultatet er kopi af listen, sorteret efter nøglerne. Tal og tidsstempler sammenlignes numerisk, tekststrengene sammenlignes byte for byte uden hensyn til alfabetiseringsregler. Alfabetisk sortering opnås ved at bruge en nøglefunktion der genererer kollateringsnøgler. Sortering efter flere nøgler kan udføres ved at lade nøglefunktionen danne lister; første element i listen er det mest betydende.</text:p>
      <text:p text:style-name="P2">Udtræk af et enkelt element ud fra en nøgles størrelse kan ske med:</text:p>
      <text:p text:style-name="P5"><text:span text:style-name="T13"><text:tab/></text:span><text:span text:style-name="T2">s</text:span><text:span text:style-name="T13"> mindst </text:span><text:span text:style-name="T2">(nøgle-funktion)<text:line-break/></text:span><text:span text:style-name="T13"><text:tab/></text:span><text:span text:style-name="T2">s</text:span><text:span text:style-name="T13"> størst </text:span><text:span text:style-name="T2">(nøgle-funktion)</text:span></text:p>
      <text:p text:style-name="P2">Simpelt udtræk af det mindste eller største element kan ske med:</text:p>
      <text:p text:style-name="P5"><text:span text:style-name="T2"><text:tab/>s</text:span><text:span text:style-name="T13"> mindst<text:line-break/></text:span><text:span text:style-name="T2"><text:tab/>s</text:span><text:span text:style-name="T13"> størst</text:span></text:p>
      <text:p text:style-name="P2">Dette eksempel udtrækker den længste tekststreng i en liste::</text:p>
      <text:p text:style-name="P5"><text:span text:style-name="T14"><text:tab/></text:span><text:span text:style-name="T2">s</text:span><text:span text:style-name="T13"> størst {? $ ok|:ok}</text:span></text:p>
      <text:p text:style-name="P2">Hvis den største nøgle findes for flere elementer, udtrækkes det første.</text:p>
      <text:p text:style-name="P2">Tallister kan sammentælles med:</text:p>
      <text:p text:style-name="P2"><text:tab/><text:span text:style-name="T1">s</text:span> <text:span text:style-name="T13">sum</text:span></text:p>
      <text:p text:style-name="P2">Gruppering af data efter nøgler:</text:p>
      <text:p text:style-name="P5"><text:span text:style-name="T14"><text:tab/></text:span><text:span text:style-name="T2">s </text:span><text:span text:style-name="T13">grupperne </text:span><text:span text:style-name="T2">(nøgle-funktion)</text:span></text:p>
      <text:p text:style-name="P5"><text:span text:style-name="T2">nøgle-funktion </text:span><text:span text:style-name="T14">prøves på alle listeelementerne; den bør enten give et konstant navn eller en node <text:s/></text:span><text:span text:style-name="T13">:navn </text:span><text:span text:style-name="T2">navn</text:span><text:span text:style-name="T13">; </text:span><text:span text:style-name="T2">værdi</text:span><text:span text:style-name="T14"> <text:s/>hvor <text:s/></text:span><text:span text:style-name="T2">navn</text:span><text:span text:style-name="T14"> <text:s/>er en konstant nøgle, eller svipse; alt andet får operationen til at fejle.</text:span></text:p>
      <text:p text:style-name="P2">Operationen danner en node som for hver forskellig nøgle har et ben med nøglen som navn og en liste af de elementer der gav denne nøgle som værdi; men for de elementer hvor nøglefunktionen giver en <text:s/><text:span text:style-name="T13">:navn </text:span><text:span text:style-name="T1">navn</text:span><text:span text:style-name="T13">; </text:span><text:span text:style-name="T1">værdi</text:span><text:span text:style-name="T13"> </text:span>-node, indlægges <text:span text:style-name="T13">værdi</text:span> i stedet for det originale element.</text:p>
      <text:p text:style-name="P5"><text:span text:style-name="T14"><text:tab/></text:span><text:span text:style-name="T13">grupperne: .</text:span><text:span text:style-name="T2">navn værdi-liste ...</text:span></text:p>
      <text:p text:style-name="P2">Hvis der ingen nøgler dannes, giver operationen den tomme liste <text:s/><text:span text:style-name="T13">[]</text:span> .</text:p>
      <text:p text:style-name="P2">Dette eksempel:</text:p>
      <text:p text:style-name="P7"><text:tab/>15 op grupperne {n|:ok {} skriv (n) antal}{13|?}</text:p>
      <text:p text:style-name="P2">grupperer heltallene fra 1 til 15 efter antal cifre, idet 13 udelades. Resultatet er:</text:p>
      <text:p text:style-name="P2"><text:tab/><text:span text:style-name="T13">[grupperne: .2 10 11 12 14 15 .1 1 2 3 4 5 6 7 8 9]</text:span></text:p>
      <text:p text:style-name="P2">For hver nøgleværdi opregnes værdierne i samme orden som i den original liste, men nøglernes orden er vilkårlig, som det altid er tilfælde med benene i en node.</text:p>
      <text:p text:style-name="P2">Hvis der kun er brug for en enkelt repræsentant for hver nøgleværdi:</text:p>
      <text:p text:style-name="P5"><text:span text:style-name="T14"><text:tab/>s</text:span><text:span text:style-name="T2"> </text:span><text:span text:style-name="T13">første </text:span><text:span text:style-name="T2">(nøgle-funktion)<text:line-break/></text:span><text:span text:style-name="T14"><text:tab/></text:span><text:span text:style-name="T2">s </text:span><text:span text:style-name="T13">sidste </text:span><text:span text:style-name="T2">(nøgle-funktion)</text:span></text:p>
      <text:p text:style-name="P5"><text:span text:style-name="T14">virker som <text:s/></text:span><text:span text:style-name="T13">grupperne</text:span><text:span text:style-name="T14"> , men opsamler kun det første/sidste element for hver nøgleværdi, i stedet for en liste af alle elementerne.</text:span></text:p>
      <text:p text:style-name="P5"><text:span text:style-name="T14"><text:tab/></text:span><text:span text:style-name="T2">s </text:span><text:span text:style-name="T13">eneste </text:span><text:span text:style-name="T2">(nøgle-funktion)</text:span></text:p>
      <text:p text:style-name="P5"><text:span text:style-name="T14">som <text:s/></text:span><text:span text:style-name="T13">første</text:span><text:span text:style-name="T14"> , <text:s/>men fejler hvis en nøgleværdi forekommer mere end én gang</text:span></text:p>
      <text:p text:style-name="P5"><text:span text:style-name="T14"><text:tab/></text:span><text:span text:style-name="T2">s </text:span><text:span text:style-name="T13">foldene </text:span><text:span text:style-name="T2">(kombineret-nøglefunktion-og-tildelingsfilter)</text:span></text:p>
      <text:p text:style-name="P5"><text:span text:style-name="T14">som <text:s/></text:span><text:span text:style-name="T13">første</text:span><text:span text:style-name="T14"> ,</text:span><text:span text:style-name="T13"> <text:s/></text:span><text:span text:style-name="T14">men når en brugt nøgle kommer igen, kræves der at den den ny værdi kan foldes med filterets tildelingsregler, og resultatet heraf huskes nu som nøglens værdi. Hele udtrykket svipser hvis en foldning svipser.</text:span></text:p>
      <text:p text:style-name="P2">Her er et eksempel der tæller en vareliste sammen:</text:p>
      <text:p text:style-name="P7"><text:tab/>[æble 1, appelsin 2, banan 3, æble 4]<text:line-break/><text:tab/>foldene {slags, antal|:ok :navn slags; antal} {a := b|:prøv a + b}</text:p>
      <text:p text:style-name="P2">giver</text:p>
      <text:p text:style-name="P7"><text:tab/>[foldene: .æble 5 .banan 3 .appelsin 2]</text:p>
      <text:p text:style-name="P2">idet værdier for <text:span text:style-name="T13">æble</text:span> <text:s/>foldes af tildelingsreglen som lægger dem sammen.</text:p>
      <text:p text:style-name="P5"><text:span text:style-name="T14">Operationen <text:s/></text:span><text:span text:style-name="T13">tværs <text:s/></text:span><text:span text:style-name="T14">vender en liste af lister af ens længder på den anden led:</text:span></text:p>
      <text:p text:style-name="Text_20_body"><text:span text:style-name="T8"><text:tab/></text:span><text:span text:style-name="T9">[en 1, to 2, tre 3] tværs <text:s text:c="3"/></text:span><text:span text:style-name="T8">giver <text:s text:c="3"/></text:span><text:span text:style-name="T9">[en to tre, 1 2 3]</text:span></text:p>
      <text:h text:style-name="Heading_20_2" text:outline-level="2">Operationer på noder og klicheer</text:h>
      <text:p text:style-name="P1">Noder med normale navne kan opbygges ved simpel tolkning:</text:p>
      <text:p text:style-name="P1"><text:tab/><text:span text:style-name="T13">hovsa: 1 + 2 <text:s text:c="3"/></text:span>giver nodekonstanten <text:s text:c="3"/><text:span text:style-name="T13">[hovsa: 3]</text:span></text:p>
      <text:p text:style-name="P1">Handlings- og bindingsnoder opbygges på lignende vis med omsvøb:</text:p>
      <text:p text:style-name="P1"><text:tab/><text:span text:style-name="T13">: 4 + 5 + 6</text:span></text:p>
      <text:p text:style-name="P1"><text:span text:style-name="T13"><text:s/></text:span>er det same som</text:p>
      <text:p text:style-name="P1"><text:tab/><text:span text:style-name="T13">::hvem (:hvem 4 .kald +: 5) .kald +: 6</text:span></text:p>
      <text:p text:style-name="P1">og giver <text:s/><text:span text:style-name="T13">9 + 6</text:span> .</text:p>
      <text:p text:style-name="P1"><text:span text:style-name="T13"><text:tab/>:: 4 + 5 + 6 <text:s text:c="3"/></text:span>giver <text:s text:c="3"/><text:span text:style-name="T13">: 15 <text:s text:c="3"/></text:span>– det dobbelte omsvøb genererer et enkelt omsvøb.</text:p>
      <text:p text:style-name="P1">Tolkning af et regelsæt i omsvøb resulterer i et nyt regelsæt hvor alle pasformer og handlinger fra det oprindelige regelsæt er tolket.</text:p>
      <text:p text:style-name="P1">En nodes ben kan behandles efter tur:</text:p>
      <text:p text:style-name="P1"><text:tab/><text:span text:style-name="T1">node </text:span><text:span text:style-name="T9">benene</text:span><text:span text:style-name="T1"> (tildelings-filter)</text:span></text:p>
      <text:p text:style-name="P2">For hvert ben forsøges tildelingen <text:span text:style-name="T1">navn </text:span>:=<text:span text:style-name="T1"> værdi <text:s/></text:span>i filteret; resultaterne videregives som liste idet svipsere ignoreres.</text:p>
      <text:p text:style-name="P2">En node kan kopieres uden et navngivet ben:</text:p>
      <text:p text:style-name="P2"><text:tab/><text:span text:style-name="T1">node </text:span><text:span text:style-name="T13">uden </text:span><text:span text:style-name="T4">(</text:span><text:span text:style-name="T1">ben-navn</text:span><text:span text:style-name="T4">)</text:span></text:p>
      <text:p text:style-name="P2">Et ben kan tilføjes eller erstattes med en angivet værdi:</text:p>
      <text:p text:style-name="P2"><text:tab/><text:span text:style-name="T1">node </text:span><text:span text:style-name="T13">flet (</text:span><text:span text:style-name="T1">ben-name</text:span><text:span text:style-name="T13">, </text:span><text:span text:style-name="T1">ben-værdi</text:span><text:span text:style-name="T13">)</text:span></text:p>
      <text:p text:style-name="P2">To noder kan flettes sammen:</text:p>
      <text:p text:style-name="P2"><text:tab/><text:span text:style-name="T1">a</text:span> <text:span text:style-name="T13">flet (</text:span><text:span text:style-name="T1">b</text:span><text:span text:style-name="T13">)</text:span></text:p>
      <text:p text:style-name="P2">Benene i <text:span text:style-name="T1">b</text:span> har forrang for ben i <text:span text:style-name="T1">a</text:span> med samme navnen. Nodenavnet fra <text:span text:style-name="T1">b </text:span>bruges hvis det ikke er <text:s/><text:span text:style-name="T13">[] ;</text:span> i så fald bruges nodenavnet fra <text:span text:style-name="T1">a</text:span>.</text:p>
      <text:p text:style-name="P2">Hvis et af argumenterne til <text:s/><text:span text:style-name="T13">flet <text:s/>er</text:span> <text:s/><text:span text:style-name="T13">[]</text:span> , er resultatet det andet argument, undtagen i dette tilfælde:</text:p>
      <text:p text:style-name="P2"><text:tab/><text:span text:style-name="T13">[] flet (</text:span><text:span text:style-name="T1">ikke-tom-liste</text:span><text:span text:style-name="T13">)</text:span></text:p>
      <text:p text:style-name="P2">som svipser hvis ikke listen er et pair <text:s/><text:span text:style-name="T13">(</text:span><text:span text:style-name="T1">navn</text:span><text:span text:style-name="T13">,</text:span><text:span text:style-name="T1"> værdi</text:span><text:span text:style-name="T13">) <text:s/></text:span>hvor <text:span text:style-name="T1">navn</text:span> er en konstant. I dette tilfælde resulterer operationen i en node <text:s/><text:span text:style-name="T13">pyt: .</text:span><text:span text:style-name="T1">navn</text:span><text:span text:style-name="T13"> </text:span><text:span text:style-name="T1">værdi</text:span></text:p>
      <text:p text:style-name="P2">Denne konvention gør det nemt at bygge noder med <text:s/><text:span text:style-name="T13">flet, </text:span><text:s/>ud fra den tomme liste.</text:p>
      <text:p text:style-name="P2">Noder eller klicheer kan udstyres med et andet navn:</text:p>
      <text:p text:style-name="P2"><text:tab/><text:span text:style-name="T1">a</text:span> <text:span text:style-name="T13">hoved (</text:span><text:span text:style-name="T1">h</text:span><text:span text:style-name="T13">)</text:span></text:p>
      <text:p text:style-name="P2">De etbenede klicheer der bruges som navne i PILS, kan opbygges med operationen</text:p>
      <text:p text:style-name="P2"><text:tab/><text:span text:style-name="T1">ordklassenøgle </text:span><text:span text:style-name="T13">//</text:span><text:span text:style-name="T1"> navnestreng</text:span></text:p>
      <text:p text:style-name="P2">Operationen virker med alle konstanter, men bruges mest med tekststrenge.</text:p>
      <text:h text:style-name="Heading_20_3" text:outline-level="3">Dyb søgning og erstatning med <text:s/>**=**</text:h>
      <text:p text:style-name="P2">Dyb erstatning i noder og lister kan ske med:</text:p>
      <text:p text:style-name="P2"><text:tab/><text:span text:style-name="T1">s</text:span> <text:span text:style-name="T13">**=** </text:span><text:span text:style-name="T1">filter</text:span></text:p>
      <text:p text:style-name="P2">Først får <text:span text:style-name="T1">filter </text:span>et forsøg på at behandle <text:span text:style-name="T1">s</text:span> i et enkelt kald. Hvis det lykkes, returneres resultatet uden videre behandling. Hvis det svipser og <text:span text:style-name="T1">s </text:span>er en node eller en liste, behandles benene, idet først tildelingen <text:s/><text:span text:style-name="T1">n </text:span><text:span text:style-name="T13">:= </text:span><text:span text:style-name="T1">værdi</text:span> <text:s/>hvor <text:span text:style-name="T1">n</text:span> er benets navn eller nummer, og derefter <text:span text:style-name="T1">værdi </text:span>prøves i <text:s/><text:span text:style-name="T1">filter</text:span>;<text:span text:style-name="T1"> hvis </text:span>begge forsøg svipser og <text:span text:style-name="T1">værdi </text:span>er<text:span text:style-name="T1"> </text:span>en node eller liste, kaldes videre ud i denne. Hvor filterkaldene lykkes og resulterer i ændrede værdier, genereres nye noder eller lister hvis resultatet af operationen skal bruges.</text:p>
      <text:p text:style-name="P2">Dette eksempel nulstiller alle tal undtagen pris-ben som fordoubles. Bemærk at tildelingen prøves først, uanset rækkefølgen af reglerne.</text:p>
      <text:p text:style-name="P2"><text:tab/><text:span text:style-name="T1">s </text:span><text:span text:style-name="T13">**=** {[pris] := # ok|:ok . * 2} {#?|:ok 0}</text:span></text:p>
      <text:p text:style-name="P2">Hvis operationen bruges i en sammenhæng hvor resultatet ikke bruges (typisk en listeygger), vælger PILS fortolkeren automatisk en hurtigere version der ikke genererer den omformede node.</text:p>
      <text:p text:style-name="P2">Dette eksempel bygger en liste af alle nodenavnene i <text:span text:style-name="T1">s</text:span>:</text:p>
      <text:p text:style-name="P2"><text:tab/><text:span text:style-name="T1">s </text:span><text:span text:style-name="T13">**=** {navn * ?|liste := navn} .:liste</text:span></text:p>
      <text:p text:style-name="P14">Tip: <text:span text:style-name="T14">hvis filteret kun består af tildelingsregler, kan det ikke behandle hele s i ét hug. Hvis den øverste regel (som er den der prøves sidst) har formen</text:span></text:p>
      <text:p text:style-name="P14"><text:span text:style-name="T8"><text:tab/></text:span><text:span text:style-name="T6">{ ? := ok | :ok }</text:span></text:p>
      <text:p text:style-name="P13">virker søgningen kun i et niveau.</text:p>
      <text:h text:style-name="Heading_20_2" text:outline-level="2">Diverse kontrolstrukturer</text:h>
      <text:h text:style-name="Heading_20_3" text:outline-level="3">Tolkning og citat</text:h>
      <text:p text:style-name="P2">PILS udtryk kan tolkes (en ekstra gang) med operatoren <text:s/><text:span text:style-name="T13">--- <text:s/></text:span>der kan bruges både mellemstillet og foranstillet:</text:p>
      <text:p text:style-name="P2"><text:tab/><text:span text:style-name="T13">---</text:span> <text:span text:style-name="T1">e <text:s text:c="3"/></text:span>(kan også skrives <text:s/><text:span text:style-name="T1">e </text:span><text:span text:style-name="T4">---</text:span><text:span text:style-name="T13">.</text:span><text:span text:style-name="T1"> </text:span>) tolker værdien af <text:span text:style-name="T1">e</text:span> i de aktuelle bindinger.</text:p>
      <text:p text:style-name="P2"><text:span text:style-name="T1"><text:tab/>e </text:span><text:span text:style-name="T13">---</text:span><text:span text:style-name="T1"> c <text:s text:c="3"/></text:span>tolker værdien af <text:span text:style-name="T1">e</text:span> i bindingerne angivet ved <text:span text:style-name="T1">c </text:span>.</text:p>
      <text:p text:style-name="P2">Udtryk kan citeres med <text:s/><text:span text:style-name="T13">:citat</text:span> -sætningen:</text:p>
      <text:p text:style-name="P2"><text:tab/><text:span text:style-name="T13">:citat</text:span> <text:span text:style-name="T1">e <text:s text:c="3"/></text:span>eller, skrevet med halekrølle: <text:s text:c="3"/><text:span text:style-name="T1">e </text:span><text:span text:style-name="T13">.:citat</text:span></text:p>
      <text:p text:style-name="P2">Resultatet er <text:span text:style-name="T1">e </text:span>som det står, uden tolkning.</text:p>
      <text:p text:style-name="P14">Bemærk: <text:span text:style-name="T6">:citat</text:span><text:span text:style-name="T14"> -sætningen bruges sjældent i PILS. Der er ingen grund til at bruge den på konstante noder og lister.</text:span></text:p>
      <text:h text:style-name="Heading_20_3" text:outline-level="3">Erklæring af lokale bindinger og regler</text:h>
      <text:p text:style-name="P5">Navne kan bindes til værdierne lokalt:</text:p>
      <text:p text:style-name="Text_20_body"><text:span text:style-name="T6"><text:tab/></text:span><text:span text:style-name="T9">;</text:span><text:span text:style-name="T1">navn værdi</text:span><text:span text:style-name="T9">;</text:span><text:span text:style-name="T6"> </text:span><text:span text:style-name="T1">hale</text:span></text:p>
      <text:p text:style-name="P5"><text:span text:style-name="T1">værdi</text:span> is tolkes i den aktuelle kontekst <text:span text:style-name="T1">k</text:span>,<text:span text:style-name="T1"> </text:span>og <text:span text:style-name="T1">hale </text:span>tolkes i konteksten <text:s/><text:span text:style-name="T13">;</text:span><text:span text:style-name="T2">navn</text:span><text:span text:style-name="T4"> </text:span><text:span text:style-name="T2">v</text:span><text:span text:style-name="T13">; </text:span><text:span text:style-name="T2">k <text:s/></text:span><text:span text:style-name="T14">hvor </text:span><text:span text:style-name="T2">v </text:span><text:span text:style-name="T14">er den tolkede </text:span><text:span text:style-name="T2">værdi</text:span><text:span text:style-name="T14">.</text:span></text:p>
      <text:p text:style-name="P2">Flere navne kan bindes med én bindingsnode:</text:p>
      <text:p text:style-name="P5"><text:span text:style-name="T14"><text:tab/></text:span><text:span text:style-name="T13">;</text:span><text:span text:style-name="T2">navn1 værdi1 </text:span><text:span text:style-name="T13">.</text:span><text:span text:style-name="T2">navn2 værdi2 ...</text:span><text:span text:style-name="T14">; </text:span><text:span text:style-name="T2">hale</text:span></text:p>
      <text:p text:style-name="P5"><text:span text:style-name="T14">Alle værdierne tolkes i den aktuelle kontekst </text:span><text:span text:style-name="T2">k</text:span><text:span text:style-name="T14"> <text:s/>i vilkårlig orden. (Fremtidige versioner af PILS fortolkeren vil måske tolke dem samtidigt.)</text:span></text:p>
      <text:p text:style-name="P5"><text:span text:style-name="T14">Alle konstanter undtagen <text:s/></text:span><text:span text:style-name="T13">[]</text:span><text:span text:style-name="T14"> <text:s/>kan bindes som navne.</text:span></text:p>
      <text:p text:style-name="P2">Et objekt – typisk angivet ved et regelsæt, her kaldet <text:span text:style-name="T1">reglerne – </text:span>kan indflettes i konteksten:</text:p>
      <text:p text:style-name="P6"><text:span text:style-name="T14"><text:tab/></text:span><text:span text:style-name="T13">:brug</text:span><text:span text:style-name="T14"> </text:span><text:span text:style-name="T2">reglerne</text:span><text:span text:style-name="T13">;<text:line-break/><text:tab/></text:span><text:span text:style-name="T2">udtryk</text:span></text:p>
      <text:p text:style-name="P3">eller</text:p>
      <text:p text:style-name="P6"><text:span text:style-name="T14"><text:tab/></text:span><text:span text:style-name="T2">udtryk<text:line-break/><text:tab/></text:span><text:span text:style-name="T13">===<text:line-break/><text:tab/></text:span><text:span text:style-name="T2">reglerne</text:span></text:p>
      <text:p text:style-name="P6"><text:span text:style-name="T14">De to former har same virkning: </text:span><text:span text:style-name="T2">reglerne </text:span><text:span text:style-name="T14">tolkes i den aktuelle kontekst og kombineres med denne til en kontekst hvori </text:span><text:span text:style-name="T2">udtryk </text:span><text:span text:style-name="T14">tolkes.</text:span></text:p>
      <text:h text:style-name="Heading_20_3" text:outline-level="3">Betingede udtryk</text:h>
      <text:p text:style-name="P1">Et betinget udtryk har denne generelle form:</text:p>
      <text:p text:style-name="P1"><text:tab/><text:span text:style-name="T13">:hvis </text:span><text:span text:style-name="T1">betingelse</text:span><text:span text:style-name="T9">;</text:span><text:span text:style-name="T6"> </text:span><text:span text:style-name="T1">udtryk </text:span><text:span text:style-name="T9">.ellers </text:span><text:span text:style-name="T1">ellers-udtryk</text:span></text:p>
      <text:p text:style-name="P2">hvor <text:s/>.<text:span text:style-name="T13">ellers</text:span> -delen kan udelades:</text:p>
      <text:p text:style-name="P1"><text:tab/><text:span text:style-name="T13">:hvis </text:span><text:span text:style-name="T1">betingelse</text:span><text:span text:style-name="T9">;</text:span><text:span text:style-name="T6"> </text:span><text:span text:style-name="T1">udtryk <text:s text:c="3"/></text:span><text:span text:style-name="T6">svarer til <text:s text:c="3"/></text:span><text:span text:style-name="T9">:hvis </text:span><text:span text:style-name="T1">betingelse</text:span><text:span text:style-name="T9">; </text:span><text:span text:style-name="T1">udtryk </text:span><text:span text:style-name="T9">.ellers []</text:span></text:p>
      <text:p text:style-name="P2">Hvis <text:s/><text:span text:style-name="T1">betingelse</text:span> <text:s/>lykkes, ignoreres værdien og <text:s/><text:span text:style-name="T1">udtryk <text:s/></text:span>tolkes. Hvis <text:s/><text:span text:style-name="T1">betingelse</text:span> <text:s/>fejler, ignoreres fejlen og <text:s/><text:span text:style-name="T1">ellers-udtryk</text:span> <text:s/>tolkes.</text:p>
      <text:p text:style-name="P2">Betingelser kan kombineres med <text:s/><text:span text:style-name="T13">og</text:span><text:span text:style-name="T1"> <text:s/></text:span>og <text:s/><text:span text:style-name="T13">eller</text:span> .</text:p>
      <text:p text:style-name="P1"><text:tab/><text:span text:style-name="T13">:hvis (vare </text:span><text:span text:style-name="T9">pris &lt; maxpris) og ((vare kvalitet = [god]) eller (vare kvalitet = [fremragende])); køb (vare)</text:span></text:p>
      <text:h text:style-name="Heading_20_3" text:outline-level="3">Eksplicitte kald</text:h>
      <text:p text:style-name="P1">Som alternativ til formen <text:s/><text:span text:style-name="T1">(objekt)</text:span><text:span text:style-name="T6"> (</text:span><text:span text:style-name="T1">argument)</text:span><text:span text:style-name="T6"> </text:span><text:span text:style-name="T1"><text:s/></text:span><text:span text:style-name="T6">kan objektkald angives med <text:s/></text:span><text:span text:style-name="T9">kald</text:span><text:span text:style-name="T6"> -operationen:</text:span></text:p>
      <text:p text:style-name="P1"><text:span text:style-name="T6"><text:tab/>(</text:span><text:span text:style-name="T1">argument) </text:span><text:span text:style-name="T9">kald </text:span><text:span text:style-name="T1">(objekt)</text:span></text:p>
      <text:p text:style-name="P1"><text:span text:style-name="T6">Operationen anvender <text:s/></text:span><text:span text:style-name="T1">objekt <text:s/></text:span><text:span text:style-name="T6">på</text:span><text:span text:style-name="T4"> <text:s/></text:span><text:span text:style-name="T1">argument </text:span><text:span text:style-name="T6">.</text:span></text:p>
      <text:p text:style-name="P1"><text:span text:style-name="T6">Dette adskiller sig fra <text:s/></text:span><text:span text:style-name="T1">(objekt)</text:span><text:span text:style-name="T6"> (</text:span><text:span text:style-name="T1">argument) <text:s/></text:span><text:span text:style-name="T6">på følgende måde:</text:span></text:p>
      <text:list text:style-name="L6">
        <text:list-item>
          <text:p text:style-name="P23"><text:span text:style-name="T6">Formen <text:s/></text:span><text:span text:style-name="T1">(objekt)</text:span><text:span text:style-name="T6"> (</text:span><text:span text:style-name="T1">argument) </text:span><text:span text:style-name="T6"><text:s/>kan genkende <text:s/></text:span><text:span text:style-name="T1">argument </text:span><text:span text:style-name="T6"><text:s/>som en indbygget operation. Det sker ikke med den eksplicitte <text:s/></text:span><text:span text:style-name="T9">kald</text:span><text:span text:style-name="T6"> -operation.</text:span></text:p>
        </text:list-item>
        <text:list-item>
          <text:p text:style-name="P23"><text:span text:style-name="T6">Hvis</text:span><text:span text:style-name="T1"> </text:span><text:span text:style-name="T6">objektkaldet svipser, vil </text:span><text:span text:style-name="T1">(objekt)</text:span><text:span text:style-name="T6"> (</text:span><text:span text:style-name="T1">argument) </text:span><text:span text:style-name="T6"><text:s/>formen danne en node <text:s/></text:span><text:span text:style-name="T9">:hvem</text:span><text:span text:style-name="T4"> </text:span><text:span text:style-name="T1">objekt </text:span><text:span text:style-name="T9">.kald </text:span><text:span text:style-name="T1">argument <text:s/></text:span><text:span text:style-name="T6">og kalde den i den aktuelle kontekst, så bagved liggende regler får mulighed for at håndtere operations der svipser. Det sker ikke med den eksplicitte <text:s/></text:span><text:span text:style-name="T9">kald</text:span><text:span text:style-name="T6"> -operation.</text:span></text:p>
        </text:list-item>
      </text:list>
      <text:p text:style-name="P2">I den aktuelle version af PILS fortolkeren er tolkningsrækkefølgen i begge tilfælde den omvendte af den tekstlige rækkefølge – i <text:s/><text:span text:style-name="T1">(objekt)</text:span> (<text:span text:style-name="T1">argument)</text:span> -formen tolkes <text:span text:style-name="T1">argument</text:span> først, i det eksplicitte kald tolkes <text:s/><text:span text:style-name="T1">objekt <text:s/></text:span>først.</text:p>
      <text:h text:style-name="Heading_20_3" text:outline-level="3">Prøvelser og gentagelser</text:h>
      <text:p text:style-name="P2">Et kald kan forsøges med <text:s/><text:span text:style-name="T13">prøv </text:span>-operationen:</text:p>
      <text:p text:style-name="P1"><text:span text:style-name="T6"><text:tab/></text:span><text:span text:style-name="T1">(argument) </text:span><text:span text:style-name="T9">prøv </text:span><text:span text:style-name="T1">(filter)</text:span></text:p>
      <text:p text:style-name="P2">Det virker som <text:span text:style-name="T13">kald -</text:span>operationen, men hvis kaldet svipser, videregives argumentet som det er.</text:p>
      <text:p text:style-name="P2">Gentagelse kan udføres med <text:s/><text:span text:style-name="T13">gentag <text:s/></text:span>operation:</text:p>
      <text:p text:style-name="P1"><text:span text:style-name="T6"><text:tab/></text:span><text:span text:style-name="T1">(argument) </text:span><text:span text:style-name="T9">gentag </text:span><text:span text:style-name="T6">(</text:span><text:span text:style-name="T1">filter)</text:span></text:p>
      <text:p text:style-name="P2">Dette virker som <text:s/><text:span text:style-name="T13">prøv -</text:span>operation, men <text:s/><text:span text:style-name="T1">filter </text:span>anvendes igen og igen indtil det svipser, hvorpå den sidste værdi returneres.</text:p>
      <text:p text:style-name="P2">Dette eksempel lister heltallene fra 1 til 10 <text:s/>(vi glemmer lige at <text:s/><text:span text:style-name="T13">10 op</text:span> <text:s/>er en nemmere måde.):</text:p>
      <text:p text:style-name="P7"><text:tab/>1 gentag {n &lt;= 10|:ok liste := n; n + 1} .:liste</text:p>
      <text:p text:style-name="P2">Bearbejdning af en konstant så længe det ændrer den:</text:p>
      <text:p text:style-name="P1"><text:span text:style-name="T6"><text:tab/></text:span><text:span text:style-name="T1">(argument) </text:span><text:span text:style-name="T9">igen </text:span><text:span text:style-name="T6">(</text:span><text:span text:style-name="T1">filter)</text:span></text:p>
      <text:p text:style-name="P2"><text:span text:style-name="T1">argument </text:span>tolkes og skal give en konstant, ellers fejler operation. Derpå anvendes <text:span text:style-name="T1">filter</text:span> igen og igen, hvilket skal resultere i konstanter, ellers fejler operationen. Når resultatet er det samme som den sidste værdi, returneres det.</text:p>
      <text:p text:style-name="P7"><text:tab/>1 igen {x|:ok 1 / x + 1}</text:p>
      <text:p text:style-name="P2">svarer til:</text:p>
      <text:p text:style-name="P7"><text:tab/>1 gentag {x|;x' 1 / x + 1; :hvis x' &lt;&gt; x; :ok x'}</text:p>
      <text:p text:style-name="P2">og giver <text:s/><text:span text:style-name="T13">1.618033988749895</text:span> <text:s/>på en x86 (operationen vil måske fejle på maskiner hvor flydende tal håndteres anderledes).</text:p>
      <text:p text:style-name="P2">Som beskyttelse mod uendelige løkker har <text:s/><text:span text:style-name="T13">igen </text:span>-operatoren et simpelt indbygget tjek mod cykliske sekvenser: ved iteration nummer 64, 128, 256, 512, 1024... opsamles værdien og sammenlignes med de the følgende værdier. Hvis den kommer igen efter mindst én mellemliggende værdi, antages det at der er tale om en cyklus, og operationen fejler. I eksempler som ovenstående kan afrundingsfejl bevirke at værdien ender med at skifte mellemto eller flere værdierne – uden tjekket mod cykliske sekvenser ville det resultere i en uendelig løkke.</text:p>
      <text:h text:style-name="Heading_20_3" text:outline-level="3">Genkald</text:h>
      <text:p text:style-name="P2">Rekursiv analyse med hukommelse understøttes af <text:s/><text:span text:style-name="T13">genkald </text:span>-operationen:</text:p>
      <text:p text:style-name="P1"><text:span text:style-name="T6"><text:tab/></text:span><text:span text:style-name="T1">(startkonstant) </text:span><text:span text:style-name="T9">genkald </text:span><text:span text:style-name="T1">(analyseregler)</text:span></text:p>
      <text:p text:style-name="P2">Som <text:span text:style-name="T13">kald</text:span> -operationen, men <text:s/><text:span text:style-name="T13">:hvem</text:span> -binderen i <text:span text:style-name="T1">analyseregler</text:span> henviser til et omsvøb der husker både igangværende og afsluttede kald; kun konstanter tillades som kald. Hvis et allerede afsluttet kald gentages, afleveres den gamle værdi. Hvis et igangværende kald direkte eller indirekte gentager sig selv, svipser det inderste kald.</text:p>
      <text:h text:style-name="Heading_20_3" text:outline-level="3">Udgange</text:h>
      <text:p text:style-name="P2"><text:span text:style-name="T13">:udgang -</text:span>sætningen ligner <text:s/><text:span text:style-name="T13">:liste</text:span> -sætningen:</text:p>
      <text:p text:style-name="P2"><text:tab/><text:span text:style-name="T13">:udgang ... udgang := </text:span><text:span text:style-name="T1">værdi</text:span><text:span text:style-name="T13"> </text:span><text:span text:style-name="T1">... ...</text:span><text:span text:style-name="T13"><text:line-break/><text:tab/>:udgang [</text:span><text:span text:style-name="T1">mærkat</text:span><text:span text:style-name="T13">]; </text:span><text:span text:style-name="T1">...</text:span><text:span text:style-name="T13"> udgang [</text:span><text:span text:style-name="T1">mærkat</text:span><text:span text:style-name="T13">] := </text:span><text:span text:style-name="T1">værdi ...</text:span></text:p>
      <text:p text:style-name="P2">Ligesom <text:s/><text:span text:style-name="T13">:liste</text:span> -sætningen skrives <text:s/><text:span text:style-name="T13">:udgang -</text:span>sætningen gerne med halekrølle:</text:p>
      <text:p text:style-name="P2"><text:tab/><text:span text:style-name="T1">(</text:span><text:span text:style-name="T13">... udgang := </text:span><text:span text:style-name="T1">værdi</text:span><text:span text:style-name="T13"> ... ...</text:span><text:span text:style-name="T1">)</text:span><text:span text:style-name="T13"> .:udgang</text:span></text:p>
      <text:p text:style-name="P2">Hvis tildelingen udføres, afleveres <text:span text:style-name="T1">værdi </text:span>straks som resultat af <text:s/><text:span text:style-name="T13">:udgang</text:span> -sætningen.</text:p>
      <text:h text:style-name="Heading_20_3" text:outline-level="3">Udtryksfølger</text:h>
      <text:p text:style-name="P1">To udtryk kan kombineres med operatorerne <text:s/><text:span text:style-name="T13">og , <text:s/>eller <text:s/></text:span>og <text:s/><text:span text:style-name="T13">pyt</text:span> :</text:p>
      <text:p text:style-name="P1"><text:tab/><text:span text:style-name="T1">e1 </text:span><text:span text:style-name="T13">og: </text:span><text:span text:style-name="T1">e2</text:span></text:p>
      <text:p text:style-name="P1"><text:span text:style-name="T1">e1 </text:span>tolkes. Hvis det lykkes, bortkastes resultat og <text:span text:style-name="T1">e2</text:span> tolkes. Hvis det fejler eller svipser, gælder dette for hele udtrykket, og <text:span text:style-name="T1">e2 </text:span><text:span text:style-name="T6">ignoreres.</text:span></text:p>
      <text:p text:style-name="P1"><text:tab/><text:span text:style-name="T1">e1 </text:span><text:span text:style-name="T13">eller: </text:span><text:span text:style-name="T1">e2</text:span></text:p>
      <text:p text:style-name="P1"><text:span text:style-name="T1">e1 </text:span>tolkes og returneres hvis det lykkes. Hvis <text:span text:style-name="T1">e1 </text:span>fejler eller svipser, tolkes <text:span text:style-name="T1">e2</text:span>.</text:p>
      <text:p text:style-name="P1"><text:tab/><text:span text:style-name="T1">e1 </text:span><text:span text:style-name="T13">pyt:</text:span> <text:span text:style-name="T1">e2</text:span></text:p>
      <text:p text:style-name="P1"><text:span text:style-name="T1">e1 </text:span><text:span text:style-name="T6">tolkes og resultatet ignoreres, uanset om det fejler, svipser eller lykkes. Derefter tolkes </text:span><text:span text:style-name="T1">e2</text:span><text:span text:style-name="T6">.</text:span></text:p>
      <text:h text:style-name="Heading_20_2" text:outline-level="2">Sammesatte objekter</text:h>
      <text:h text:style-name="Heading_20_3" text:outline-level="3">Omkald</text:h>
      <text:p text:style-name="P2">Omkald - noder af form</text:p>
      <text:p text:style-name="P2"><text:tab/><text:span text:style-name="T13">kald:</text:span> <text:span text:style-name="T1">argument</text:span></text:p>
      <text:p text:style-name="P2">har særlig betydning når de bruges som objekter: de udskifter argumentet med objekt. Brugen af det kan illustreres med dette udtryk:</text:p>
      <text:p text:style-name="P2"><text:tab/><text:span text:style-name="T1">liste </text:span><text:span text:style-name="T13">hver {emne|:prøv emne pris}</text:span></text:p>
      <text:p text:style-name="P2">Udtrykket giver en liste af priserne fra de listeemner der har en pris. Men en nemmere og hurtigere måde er:</text:p>
      <text:p text:style-name="P2"><text:tab/><text:span text:style-name="T1">liste </text:span><text:span text:style-name="T13">hver [kald: pris]</text:span></text:p>
      <text:p text:style-name="P2">Dette virker som følger: hvert emne fra <text:span text:style-name="T1">liste </text:span>forsøges behandlet af objektet <text:s/><text:span text:style-name="T13">[kald: pris]</text:span> , som håndterer dem ved at prøve at kalde theres <text:s/><text:span text:style-name="T13">pris</text:span> -metoder.</text:p>
      <text:h text:style-name="Heading_20_3" text:outline-level="3">Bundter</text:h>
      <text:p text:style-name="P5">To objekter <text:span text:style-name="T1">a</text:span> og <text:span text:style-name="T1">b</text:span> kan kombineres til et <text:span text:style-name="T1">bredt bundt </text:span>med <text:s/><text:span text:style-name="T13">+++</text:span><text:span text:style-name="T14"> -operatoren:</text:span></text:p>
      <text:p text:style-name="P5"><text:tab/><text:span text:style-name="T1">base</text:span> <text:span text:style-name="T13">+++</text:span> <text:span text:style-name="T1">udvidelse</text:span></text:p>
      <text:p text:style-name="P5">Når det udvidende bundt kaldes, kaldes <text:s/><text:span text:style-name="T1">udvidelse</text:span> <text:s/>først. Hvis det svipser, kaldes <text:span text:style-name="T1">base</text:span>.</text:p>
      <text:p text:style-name="P5">Bred bundtning svarer til <text:span text:style-name="T1">subklasser </text:span>i traditionel objektorienteret programmering, men bundtning er dynamisk og sker direkte på objekter, idet PILS ikke har klasser.</text:p>
      <text:p text:style-name="P5">Hvis <text:s/><text:span text:style-name="T1">udvidelse </text:span>er <text:span text:style-name="T13"><text:s/>[]</text:span> , giver <text:s/><text:span text:style-name="T13">+++</text:span><text:span text:style-name="T14"> -operationen</text:span> simpelthen <text:s/><text:span text:style-name="T1">base </text:span>.</text:p>
      <text:p text:style-name="P5">Et <text:span text:style-name="T1">smalt bundt</text:span> kan oprettes med <text:s/><text:span text:style-name="T13">-&gt;</text:span> -operatoren:</text:p>
      <text:p text:style-name="P5"><text:tab/><text:span text:style-name="T1">a</text:span> <text:span text:style-name="T13">-&gt;</text:span> <text:span text:style-name="T1">b</text:span></text:p>
      <text:p text:style-name="P5">Når dette bundt kaldes, kaldes <text:span text:style-name="T1">a</text:span> først, og hvis det lykkes, kaldes <text:span text:style-name="T1">b</text:span> på resultatet.</text:p>
      <text:p text:style-name="P5">Smalle bundter kan ikke behandle tildelinger.</text:p>
      <text:p text:style-name="P5">Bemærk: <text:s/><text:span text:style-name="T13">-&gt; </text:span>-operator har præcedens som sammenligningsoperatorne og samles fra højre. Præcedensen afledes af det sidste tegn i operatoren.</text:p>
      <text:h text:style-name="Heading_20_2" text:outline-level="2">Styring af <text:s/>:hvem -binderen</text:h>
      <text:p text:style-name="P5">Normalt vil <text:span text:style-name="T13"><text:s/>:hvem </text:span><text:span text:style-name="T14">-binderen binde til hele bundtet hvis den bruges i et objekt i et bundt, således at bundtets enkelte objekter kan kalde metoder på det samede bundt, svarende til virtuelle kald i traditionel objektorientering. Et objekt kan isoleres ved at indlægge det i en <text:s/></text:span><text:span text:style-name="T13">hvem:</text:span><text:span text:style-name="T14"> -node:</text:span></text:p>
      <text:p text:style-name="P12"><text:span text:style-name="T8"><text:tab/></text:span><text:span text:style-name="T9">hvem:</text:span><text:span text:style-name="T8"> </text:span><text:span text:style-name="T14">objekt</text:span></text:p>
      <text:p text:style-name="P5"><text:span text:style-name="T14">Det bevirker at <text:s/></text:span><text:span text:style-name="T13">:hvem</text:span><text:span text:style-name="T14">-bindere i </text:span><text:span text:style-name="T2">objekt </text:span><text:span text:style-name="T14">bindes til </text:span><text:span text:style-name="T2">objekt </text:span><text:span text:style-name="T14">alene, uanset om det indgår i bundtning.</text:span></text:p>
      <text:p text:style-name="P2">Til brug for programmeringssystemets indpakning af platformspecifikke objekter findes en udvidet form: </text:p>
      <text:p text:style-name="P5"><text:span text:style-name="T14"><text:tab/></text:span><text:span text:style-name="T13">hvem: .</text:span><text:span text:style-name="T14"> </text:span><text:span text:style-name="T2">hvem-binding</text:span><text:span text:style-name="T13">;</text:span><text:span text:style-name="T14"> </text:span><text:span text:style-name="T2">objekt</text:span></text:p>
      <text:p text:style-name="P5"><text:span text:style-name="T14">hvor </text:span><text:span text:style-name="T2">hvem-binding</text:span><text:span text:style-name="T14"> specifikt angiver værdien af <text:s/></text:span><text:span text:style-name="T13">:hvem</text:span><text:span text:style-name="T14"> -bindinger i </text:span><text:span text:style-name="T2">objekt</text:span><text:span text:style-name="T14">.</text:span></text:p>
      <text:h text:style-name="Heading_20_2" text:outline-level="2">Ikke-filtre</text:h>
      <text:p text:style-name="P2">Bundter af form</text:p>
      <text:p text:style-name="P5"><text:span text:style-name="T14"><text:tab/></text:span><text:span text:style-name="T13">ikke: </text:span><text:span text:style-name="T2">objekt</text:span></text:p>
      <text:p text:style-name="P5"><text:span text:style-name="T14">svipser for kald der kan behandles af </text:span><text:span text:style-name="T2">objekt</text:span><text:span text:style-name="T14">. Hvis dette derimod svipser, afleveres kaldet uændret.</text:span></text:p>
      <text:h text:style-name="Heading_20_1" text:outline-level="1">Regler og pasformer</text:h>
      <text:h text:style-name="Heading_20_2" text:outline-level="2">Pasformer</text:h>
      <text:p text:style-name="P2">Pasformer bruges i regler; de angiver en struktur som data skal indpasses i. I det følgende gennemgås betydningen af forskellige PILS udtryk når de bruges i pasformer.</text:p>
      <text:h text:style-name="Heading_20_3" text:outline-level="3">Konstanter, variable og jokere</text:h>
      <text:p text:style-name="P1">En konstant kan stå for den selvsame konstant og intet andet.</text:p>
      <text:p text:style-name="P1">En <text:span text:style-name="T1">variabel – </text:span><text:span text:style-name="T6">typisk s</text:span>krevet som <text:span text:style-name="T6">et regulært navn, </text:span>repræsenteret ved en node <text:s/><text:span text:style-name="T13">:kald [</text:span><text:span text:style-name="T1">navn</text:span><text:span text:style-name="T9">] </text:span><text:span text:style-name="T1"><text:s/>– </text:span><text:span text:style-name="T6">er en stedfortræder der kan stå for hvad som helst og binder det til navnet.</text:span> Hvis et navn bindes flere gange i samme pasform, skal værdierne være identiske, og der genereres kun én binding.</text:p>
      <text:p text:style-name="P1">Jokeren <text:s/><text:span text:style-name="T13">?</text:span> <text:s/>eller i omstændelig notation: <text:s/><text:span text:style-name="T13">:kald []</text:span> <text:s/>står for hvad som helst og ignorerer værdien.</text:p>
      <text:p text:style-name="P1">For alle andre konstanter end <text:s/><text:span text:style-name="T13">[]</text:span> <text:s/>behandles <text:s/><text:span text:style-name="T13">:kald</text:span> <text:span text:style-name="T1">konstant <text:s/></text:span>som en variabel.</text:p>
      <text:p text:style-name="P13"><text:span text:style-name="T13">OBS:</text:span> denne regel:</text:p>
      <text:p text:style-name="P10"><text:tab/>{ fac (0) | :ok 1 }</text:p>
      <text:p text:style-name="P1"><text:span text:style-name="T1">gør ikke hvad det umiddelbart ser ud til. Frasen</text:span> <text:s/><text:span text:style-name="T13">fac (0)</text:span> <text:s/><text:span text:style-name="T1">læses som</text:span> <text:s/><text:span text:style-name="T13">:kald [fac: 0]</text:span> <text:s/><text:span text:style-name="T1">der kan stå for hvad som hels t og binder navnet</text:span> <text:s/><text:span text:style-name="T13">[fac: 0]</text:span> <text:s/><text:span text:style-name="T1">til værdien.</text:span></text:p>
      <text:h text:style-name="Heading_20_3" text:outline-level="3">Lister, noder og omsvøb</text:h>
      <text:p text:style-name="P2">En liste som pasform står for en liste af samme længde, med elementer der passer til pasformens elementer.</text:p>
      <text:p text:style-name="P2">En node som pasform står for en node med samme nodenavn og ben med samme navne og værdier der passer til pasformens tilsvarende ben – undtagen i de tilfælde der er angivet i de følgende afsnit. Som altid er benenes rækkefølge irrelevant.</text:p>
      <text:p text:style-name="P2">For konstante noder og lister er kravet om samme struktur og passende værdier ensbetydende med at der skal være tale om den eksakt samme konstant. Det testes med en simpel og hurtig adressesammenligning, uanset konstantens størrelse og art.</text:p>
      <text:p text:style-name="P2">Når handlingsnoder bruges i pasformer og skal tages for pålydende – altså, dække over en tilsvarende handlingsnode – skal de sættes i omsvøb.</text:p>
      <text:p text:style-name="P2">En pasform i omsvøb:</text:p>
      <text:p text:style-name="P2"><text:tab/> <text:span text:style-name="T13">:</text:span> <text:span text:style-name="T1">pasform</text:span></text:p>
      <text:p text:style-name="P2">er det samme som hvis <text:s/><text:span text:style-name="T1">pasform <text:s/></text:span>stod der direkte, bort set fra at eventuelle særlige regler for node-pasformer ignoreres. Dette muliggør angivelse af nodeformer som ellers ville have speciel betydning. Det følger heraf at et dobbelt omsvøb i pasformen</text:p>
      <text:p text:style-name="P2"><text:tab/><text:span text:style-name="T13">::</text:span> <text:span text:style-name="T1">x</text:span></text:p>
      <text:p text:style-name="P2">står for et enkelt omsvøb i data – det yderste omsvøb betyder at det inderste omsvøb behandles som en almindelig node og står for en node af samme struktur, altså et omsvøb.</text:p>
      <text:h text:style-name="Heading_20_3" text:outline-level="3">Typetjek</text:h>
      <text:p text:style-name="P2">Disse operationer angiver typetjek; <text:span text:style-name="T1">s </text:span>er typisk en variabel eller <text:s/><text:span text:style-name="T13">? </text:span>.</text:p>
      <text:p text:style-name="P2"><text:tab/><text:span text:style-name="T13">#</text:span> <text:span text:style-name="T1">s <text:s text:c="3"/>– </text:span>tal<text:line-break/><text:tab/><text:span text:style-name="T13">% </text:span><text:span text:style-name="T1">s <text:s text:c="3"/>– </text:span>heltal<text:line-break/><text:tab/><text:span text:style-name="T13">+ </text:span><text:span text:style-name="T1">s <text:s text:c="3"/>– </text:span>heltal &gt; 0, det samme som <text:s/><text:span text:style-name="T13">%</text:span> <text:span text:style-name="T1">s</text:span> <text:span text:style-name="T13">&gt; 0</text:span> , se nedenstående<text:line-break/><text:tab/><text:span text:style-name="T1">s </text:span><text:span text:style-name="T13">antal <text:s text:c="2"/>– </text:span>heltal &gt;= 0, det samme som <text:s/><text:span text:style-name="T13">%</text:span> <text:span text:style-name="T1">s</text:span> <text:span text:style-name="T13">&gt;= 0</text:span></text:p>
      <text:p text:style-name="P2"><text:tab/><text:span text:style-name="T1">s</text:span> <text:span text:style-name="T13">tid</text:span> <text:s text:c="3"/>– tidsstempel<text:line-break/><text:tab/><text:span text:style-name="T1">s</text:span> <text:span text:style-name="T13">varighed</text:span> <text:s text:c="3"/>– varighed<text:line-break/><text:tab/><text:span text:style-name="T1">s</text:span> <text:span text:style-name="T13">datering</text:span> <text:s text:c="3"/>– datering</text:p>
      <text:p text:style-name="P2"><text:tab/><text:span text:style-name="T13">$</text:span> <text:span text:style-name="T1">s <text:s text:c="3"/>– </text:span>tekststreng<text:line-break/><text:tab/><text:span text:style-name="T13">+$ </text:span><text:span text:style-name="T1">s <text:s text:c="3"/>– </text:span>ikke-tom tekststreng, det samme som <text:s/><text:span text:style-name="T1">s</text:span> <text:span text:style-name="T13">$ (? &gt; 0)</text:span> , se nedenstående<text:line-break/><text:tab/><text:span text:style-name="T13">++$ </text:span><text:span text:style-name="T1">s <text:s text:c="3"/>– </text:span>tekststreng med 2 eller flere bytes, det samme som <text:s/><text:span text:style-name="T1">s</text:span> <text:span text:style-name="T13">$ (? &gt; 1)</text:span></text:p>
      <text:p text:style-name="P2"><text:tab/><text:span text:style-name="T13">&amp;</text:span> <text:span text:style-name="T1">s <text:s text:c="3"/>– </text:span>liste<text:line-break/><text:tab/><text:span text:style-name="T13">+&amp; </text:span><text:span text:style-name="T1">s <text:s text:c="3"/>– </text:span>ikke-tom liste, det samme som <text:s/><text:span text:style-name="T1">s</text:span> <text:span text:style-name="T13">&amp; (? &gt; 0)</text:span><text:line-break/><text:tab/><text:span text:style-name="T13">++&amp; </text:span><text:span text:style-name="T1">s <text:s text:c="3"/>– </text:span>liste af length &gt; 1, det samme som <text:s/><text:span text:style-name="T1">s</text:span> <text:span text:style-name="T13">&amp; (? &gt; 1)</text:span></text:p>
      <text:p text:style-name="P2"><text:span text:style-name="T13"><text:tab/>*</text:span> <text:span text:style-name="T1">s <text:s text:c="3"/>– </text:span>node<text:line-break/><text:span text:style-name="T13"><text:tab/>/</text:span> <text:span text:style-name="T1">s <text:s text:c="3"/>– </text:span>kliche<text:line-break/><text:tab/><text:span text:style-name="T13">=</text:span> <text:span text:style-name="T1">s</text:span> <text:s text:c="3"/>– vilkårlig konstant<text:line-break/><text:tab/>s <text:span text:style-name="T13">benene</text:span> <text:s text:c="3"/>– node eller liste</text:p>
      <text:p text:style-name="P2">Konstant-typetjekket <text:s/><text:span text:style-name="T13">=</text:span> <text:s/>kan kombineres med andre typetjek:</text:p>
      <text:p text:style-name="P2"><text:tab/><text:span text:style-name="T13">=</text:span> <text:span text:style-name="T13">&amp;</text:span> <text:span text:style-name="T1">s <text:s text:c="3"/>– </text:span>liste konstant</text:p>
      <text:p text:style-name="Text_20_body">Platformsbindingerne kan definere yderligere typetjek for systemobjekter.</text:p>
      <text:h text:style-name="Heading_20_3" text:outline-level="3">Søgninger</text:h>
      <text:p text:style-name="P1"><text:span text:style-name="T6">Søgeoperatorerne <text:s text:c="2"/></text:span><text:span text:style-name="T1"><text:s/>(</text:span><text:span text:style-name="T9">&lt;</text:span><text:span text:style-name="T1">)</text:span><text:span text:style-name="T9">=* <text:s text:c="3"/></text:span><text:span text:style-name="T1">(</text:span><text:span text:style-name="T9">&lt;</text:span><text:span text:style-name="T1">)^</text:span><text:span text:style-name="T9">*</text:span><text:span text:style-name="T1"> <text:s text:c="3"/>(</text:span><text:span text:style-name="T9">&lt;</text:span><text:span text:style-name="T1">)$</text:span><text:span text:style-name="T9">*</text:span><text:span text:style-name="T1"> </text:span><text:span text:style-name="T6"><text:s text:c="3"/></text:span><text:span text:style-name="T1">(</text:span><text:span text:style-name="T9">&lt;</text:span><text:span text:style-name="T1">)#</text:span><text:span text:style-name="T9">* <text:s text:c="3"/></text:span><text:span text:style-name="T1">(</text:span><text:span text:style-name="T9">&lt;</text:span><text:span text:style-name="T1">)~</text:span><text:span text:style-name="T9">*</text:span><text:span text:style-name="T1"> <text:s text:c="3"/>(</text:span><text:span text:style-name="T9">&lt;</text:span><text:span text:style-name="T1">)+</text:span><text:span text:style-name="T9">*</text:span><text:span text:style-name="T1"> t <text:s text:c="3"/>(</text:span><text:span text:style-name="T9">&lt;</text:span><text:span text:style-name="T1">)-</text:span><text:span text:style-name="T9">*</text:span><text:span text:style-name="T6"> <text:s text:c="2"/>kan bruges på direkte angivne tekststrenge og listekonstanter. Det resulterende heltal kan ikke udtrækkes men skal være </text:span><text:span text:style-name="T9">&gt; 0 </text:span><text:span text:style-name="T6">.</text:span></text:p>
      <text:p text:style-name="P1">Dette står for en tekststreng der begynder med <text:s/><text:span text:style-name="T13">"http://"</text:span> <text:s/>og slutter med <text:s/><text:span text:style-name="T13">"/" </text:span>:</text:p>
      <text:p text:style-name="P1"><text:tab/><text:span text:style-name="T1">s</text:span> <text:span text:style-name="T13">$* "http://" &lt;$*</text:span> <text:span text:style-name="T13">"/"</text:span></text:p>
      <text:p text:style-name="P1">Dette står for en liste der skal indeholde navnet <text:span text:style-name="T13">[sprog] </text:span>:</text:p>
      <text:p text:style-name="P1"><text:tab/><text:span text:style-name="T1">s </text:span><text:span text:style-name="T9">=* [sprog,]</text:span></text:p>
      <text:p text:style-name="P2">(Bemærk kommaet; søgeoperationerne bruger lister, ikke enkelte elementer.)</text:p>
      <text:h text:style-name="Heading_20_3" text:outline-level="3">Navnesplittere</text:h>
      <text:p text:style-name="Text_20_body"><text:span text:style-name="T6">Klicheer med enkelt attribut som <text:s/></text:span><text:span text:style-name="T9">[</text:span><text:span text:style-name="T1">ordklassenøgle</text:span><text:span text:style-name="T9">|</text:span><text:span text:style-name="T1">navnestreng</text:span><text:span text:style-name="T9">] <text:s/></text:span><text:span text:style-name="T8">kan splittes i en pasform som:</text:span></text:p>
      <text:p text:style-name="Text_20_body"><text:span text:style-name="T1"><text:tab/>ordklassenøgle </text:span><text:span text:style-name="T13">//</text:span><text:span text:style-name="T1"> navnestreng</text:span></text:p>
      <text:p text:style-name="Text_20_body"><text:span text:style-name="T6">idet <text:s/></text:span><text:span text:style-name="T1">ordklassenøgle <text:s/></text:span><text:span text:style-name="T14">og </text:span><text:span text:style-name="T2"><text:s/></text:span><text:span text:style-name="T1">navnestreng <text:s/></text:span><text:span text:style-name="T6">kan stå for vilkårlige konstanter, men typisk er det tekststrenge.</text:span></text:p>
      <text:p text:style-name="P5">Denne pasform står for et navn i standard-ordklassen, idet <text:s/><text:span text:style-name="T13">navn</text:span><text:span text:style-name="T14"> <text:s/>bindes til hele navnet og <text:s/></text:span><text:span text:style-name="T13">navnestreng <text:s/></text:span><text:span text:style-name="T14">til navnestrengen.</text:span></text:p>
      <text:p text:style-name="Text_20_body"><text:span text:style-name="T6"><text:tab/></text:span><text:span text:style-name="T9">navn = ?:? // namestring</text:span></text:p>
      <text:p text:style-name="P5">Opsplitning af klicheer med flere ben understøttes ikke; det er fravalgt fordi benenes udefinerede rækkefølge ville give diffuse regler.</text:p>
      <text:h text:style-name="Heading_20_3" text:outline-level="3">Aliasser</text:h>
      <text:p text:style-name="P2">Pasformer som <text:s/><text:span text:style-name="T1">alias = pasform <text:s text:c="2"/></text:span>kræver at data passer til både <text:span text:style-name="T1">alias </text:span>og <text:span text:style-name="T1">pasform</text:span>. Typisk er <text:span text:style-name="T1">alias </text:span>en variabel der bindes til en node eller liste som analyseres yderligere af <text:span text:style-name="T1">pasform</text:span>.</text:p>
      <text:h text:style-name="Heading_20_3" text:outline-level="3">Sammenligninger</text:h>
      <text:p text:style-name="P1">En værdi kan forudsættes forskellig fra en given konstant:</text:p>
      <text:p text:style-name="P1"><text:tab/><text:span text:style-name="T1">s </text:span><text:span text:style-name="T9">&lt;&gt;</text:span><text:span text:style-name="T1"> konstant</text:span></text:p>
      <text:p text:style-name="P2">eller sammenlignes med talkonstanter:</text:p>
      <text:p text:style-name="P2"><text:tab/><text:span text:style-name="T1">s op k</text:span></text:p>
      <text:p text:style-name="P2">hvor <text:span text:style-name="T1">k</text:span> er en talkonstant og <text:span text:style-name="T1">op </text:span>en af operatorerne <text:s/><text:span text:style-name="T13">&lt; &gt; &lt;= &gt;=</text:span></text:p>
      <text:p text:style-name="P2">Denne pasform står for et heltal i intervallet 10 – 20:</text:p>
      <text:p text:style-name="P7"><text:tab/>% x &gt;= 10 &lt;= 20</text:p>
      <text:h text:style-name="Heading_20_3" text:outline-level="3">Udtræk af længder fra lister og tekststrenge</text:h>
      <text:p text:style-name="P2">Længden af lister og tekststrenge kan udtrækkes med disse udgaver af typetjekkene:</text:p>
      <text:p text:style-name="P2"><text:tab/><text:span text:style-name="T1">liste </text:span><text:span text:style-name="T13">&amp; </text:span><text:span text:style-name="T1">længde</text:span></text:p>
      <text:p text:style-name="P2"><text:tab/><text:span text:style-name="T1">tekststreng $</text:span><text:span text:style-name="T13"> </text:span><text:span text:style-name="T1">længde</text:span></text:p>
      <text:p text:style-name="P2">Specifikke krav kan stilles til længden ved at bruge sammenligninger. Denne pasform står for en tekst med mellem 5 og 10 bytes.</text:p>
      <text:p text:style-name="P2"><text:tab/><text:span text:style-name="T1">tekststreng </text:span><text:span text:style-name="T13">$ (5 &lt;= </text:span><text:span text:style-name="T1">længde </text:span><text:span text:style-name="T13">&lt;= 10)</text:span></text:p>
      <text:h text:style-name="Heading_20_3" text:outline-level="3">Udtrækning af listeelementer</text:h>
      <text:p text:style-name="P2">Specifikke listeelementerne kan udtrækkes ved indeksering med heltal.. Positive heltal udtrækker elementer talt fra starten af listen, som altid tælles der fra <text:s/><text:span text:style-name="T13">1</text:span> . <text:s/><text:span text:style-name="T13">0</text:span> <text:s/>udtrækker det sidste element, <text:span text:style-name="T13">-1 <text:s/></text:span>det næstsidste osv..</text:p>
      <text:p text:style-name="P2">Dette binder 3. element fra en liste til variablen <text:s/><text:span text:style-name="T13">e</text:span> , idet resten af listen ignoreres:</text:p>
      <text:p text:style-name="P2"><text:tab/><text:span text:style-name="T13">(e) 3</text:span></text:p>
      <text:p text:style-name="P2">Dette står for en liste <text:s/><text:span text:style-name="T13">q</text:span> <text:s/>med identisk start- og slutelement <text:span text:style-name="T13">e</text:span> :</text:p>
      <text:p text:style-name="P7"><text:tab/>q = (e) 1 = (e) 0</text:p>
      <text:h text:style-name="Heading_20_3" text:outline-level="3">Ufuldstændige nodeangivelser og pytter</text:h>
      <text:p text:style-name="P1">Når navnløse noder (hvilket er det samme som noder med nodenavnet <text:s/><text:span text:style-name="T13">[]</text:span> )<text:span text:style-name="T13"> </text:span>bruges som pasformer uden omsvøb, er nodens navn uspecificeret.</text:p>
      <text:p text:style-name="P10"><text:tab/>;x</text:p>
      <text:p text:style-name="P1">står for en node med et <text:s/><text:span text:style-name="T13">x</text:span> -ben og ingen andre ben, idet <text:s/><text:span text:style-name="T13">x</text:span> <text:s/>bindes til benets værdi.</text:p>
      <text:p text:style-name="P1">Nodens navn kan udtrækkes:</text:p>
      <text:p text:style-name="P10"><text:tab/>h ;x</text:p>
      <text:p text:style-name="P1">Dette er som <text:s/><text:span text:style-name="T13">;x <text:s/></text:span>men <text:s/><text:span text:style-name="T13">h</text:span> <text:s/>is bindes til nodenavnet.</text:p>
      <text:p text:style-name="P1">Brug af node-typetjekkeren <text:s/><text:span text:style-name="T13">*</text:span> <text:s/>med en nodepasform åbner for noder med flere ben end de angivne:</text:p>
      <text:p text:style-name="P1"><text:tab/><text:span text:style-name="T13">* punkt: .x .y</text:span> <text:s text:c="3"/>kan stå for noder som <text:s text:c="2"/><text:span text:style-name="T13">punkt: .x .y .z</text:span> <text:s text:c="2"/>osv.</text:p>
      <text:p text:style-name="P1">Pytter åbner for noder der mangler de angivne ben, idet pyttens konstanter bruges i stedet for de manglende ben:</text:p>
      <text:p text:style-name="P10"><text:tab/>(<text:span text:style-name="T2">navn</text:span>: .<text:span text:style-name="T2">ben</text:span> <text:span text:style-name="T2">...</text:span>) pyt [.<text:span text:style-name="T2">ben</text:span> <text:span text:style-name="T2">...</text:span>]</text:p>
      <text:p text:style-name="P2">Dette kan kombineres med <text:s/>*  -typetjekkeren for også at tillade ekstra ben:</text:p>
      <text:p text:style-name="P10"><text:tab/>(* <text:span text:style-name="T2">navn</text:span>: .<text:span text:style-name="T2">ben</text:span> <text:span text:style-name="T2">...</text:span>) pyt [.<text:span text:style-name="T2">ben</text:span> <text:span text:style-name="T2">...</text:span>]</text:p>
      <text:p text:style-name="P2">I forbindelse med pytter behandles nodenavnet <text:s/><text:span text:style-name="T13">[] <text:s/></text:span>på lige fod med andre navne. Hvis alle de angivne ben er dækket af pytten, tillades selve nodenavnet som stedfortræder for en benløs node (idet benløse noder ikke eksisterer i PILS).</text:p>
      <text:p text:style-name="P2">Pytter i pasformer er indført for at muliggøre automatisk udfyldning af manglende parametre.</text:p>
      <text:h text:style-name="Heading_20_3" text:outline-level="3">Konstantudskiftere</text:h>
      <text:p text:style-name="P1">Konstantudskiftere <text:s/>udfører simple udskiftninger før indpasning i den berørte pasform. Der er to varianter:</text:p>
      <text:p text:style-name="P1"><text:tab/><text:span text:style-name="T1">pasform </text:span><text:span text:style-name="T9">kald [.</text:span><text:span text:style-name="T1">nøgle erstatning ...</text:span><text:span text:style-name="T9">]</text:span></text:p>
      <text:p text:style-name="P1"><text:span text:style-name="T6">Nøglerne er de eneste mulige værdier, og den tilsvarende erstatning indpasses i </text:span><text:span text:style-name="T1">pasform</text:span><text:span text:style-name="T6">.</text:span></text:p>
      <text:p text:style-name="P1"><text:span text:style-name="T9"><text:tab/></text:span><text:span text:style-name="T1">pasform </text:span><text:span text:style-name="T9">prøv [.</text:span><text:span text:style-name="T1">nøgle erstatning ...</text:span><text:span text:style-name="T9">]</text:span></text:p>
      <text:p text:style-name="P2">Nøglerne udskiftes, men andre værdier passerer uændret igennem.</text:p>
      <text:p text:style-name="P2">Konstantoversættere er blandt andet indført for at håndtere oversættelse mellem talkoder og symbolske navne ved systeminterfacing.</text:p>
      <text:h text:style-name="Heading_20_3" text:outline-level="3">Systemorienterede udtrækkere</text:h>
      <text:p text:style-name="Text_20_body">De fulde navne kan udtrækkes af fil- og mappeobjekter:</text:p>
      <text:p text:style-name="Text_20_body"><text:tab/><text:span text:style-name="T1">fil</text:span> <text:span text:style-name="T13">fil:</text:span> <text:span text:style-name="T1">filnavn</text:span></text:p>
      <text:p text:style-name="Text_20_body"><text:tab/><text:span text:style-name="T1">mappe</text:span> <text:span text:style-name="T13">mappe:</text:span> <text:span text:style-name="T1">sti</text:span></text:p>
      <text:p text:style-name="Text_20_body">PILS udvidelser til systemobjekter kan udtrækkes: </text:p>
      <text:p text:style-name="Text_20_body"><text:tab/><text:span text:style-name="T1">systemobjekt</text:span> <text:span text:style-name="T13">når:</text:span> <text:span text:style-name="T1">pils-udvidelse</text:span></text:p>
      <text:h text:style-name="Heading_20_3" text:outline-level="3">Om PILS systemets håndtering af pasformer</text:h>
      <text:p text:style-name="Text_20_body">PILS er generelt et fortolket sprog, men alle pasformer kompileres til en mellemform kaldet <text:span text:style-name="T1">quicksteps</text:span>, som udføres betydelig hurtigere end fortolkede udtryk. Quicksteps opdaterer aldrig referencetællere, opretter aldrig objekter og søger aldrig i konteksten undervejs. Først når en indpasning er lykkedes, oprettes eventuelle bindinger og referencetællere opdateres.</text:p>
      <text:p text:style-name="Text_20_body">Kompileringen er hurtig og sker automatisk når som helst læses af parseren eller genereres ved tolkning af PILS udtryk.</text:p>
      <text:p text:style-name="Text_20_body">Regelsøgning er optimeret ved indeksering af reglerne i et regelsæt. For at en pasform kan indekseres, skal yderste niveau være en fuldt specificeret liste eller node, eller en konstant.</text:p>
      <text:p text:style-name="Text_20_body">Aliasser påvirker ikke indekseringen, så regler som <text:s/><text:span text:style-name="T13">{ </text:span><text:span text:style-name="T2">alias</text:span><text:span text:style-name="T4"> = </text:span><text:span text:style-name="T2">indekserbar-pasform</text:span><text:span text:style-name="T13"> | </text:span><text:span text:style-name="T1">... </text:span><text:span text:style-name="T13">} </text:span><text:span text:style-name="T14">er indekserbare.</text:span></text:p>
      <text:p text:style-name="Text_20_body">Tildelingsregler indekseres efter tildelingens venstreside og holdes adskilt fra de øvrige regler.</text:p>
      <text:p text:style-name="Text_20_body">Indekseringen er usynlig for programmøren, når der ses bort fra udførelseshastigheden. Ved opbygning af store regelsæt, såsom tilstandsmaskiner for parsere, bør reglerne så vidt muligt være indekserbare, og ikke-indekserbare regler bør samles i klumper, helst øverst i regelsættet.</text:p>
      <text:h text:style-name="Heading_20_2" text:outline-level="2">Regelhandlingerne</text:h>
      <text:p text:style-name="P2">Når en regelhandling påbegyndes, er reglen <text:span text:style-name="T1">uskyldig</text:span>:<text:span text:style-name="T1"> </text:span>det er ikke afgjort om reglen vil lykkes, fejle eller svipse. De ansvarsrelaterede konstruktioner der beskrives i det følgende, er kun gyldige i reglens uskyldige tilstand; hvis de bruges efter at ansvaret er taget, fejler de.</text:p>
      <text:h text:style-name="Heading_20_3" text:outline-level="3">Ansvarsforskydere</text:h>
      <text:p text:style-name="P2">PILS har fem ansvarsforskydere:</text:p>
      <text:p text:style-name="Text_20_body"><text:span text:style-name="T8"><text:tab/></text:span><text:span text:style-name="T9">:ok </text:span><text:span text:style-name="T2">hale<text:line-break/><text:tab/></text:span><text:span text:style-name="T9">:prøv </text:span><text:span text:style-name="T2">udtryk<text:line-break/><text:tab/></text:span><text:span text:style-name="T9">:kræv </text:span><text:span text:style-name="T2">udtryk <text:s text:c="3"/></text:span><text:span text:style-name="T8">(skrives gerne som <text:s/></text:span><text:span text:style-name="T2">udtryk </text:span><text:span text:style-name="T9">.:kræv</text:span><text:span text:style-name="T2"> </text:span><text:span text:style-name="T8">) </text:span><text:span text:style-name="T2"><text:line-break/><text:tab/></text:span><text:span text:style-name="T9">:muligvis </text:span><text:span text:style-name="T2">udtryk</text:span><text:span text:style-name="T8"> </text:span><text:span text:style-name="T2"><text:line-break/><text:tab/></text:span><text:span text:style-name="T9">:fejl </text:span><text:span text:style-name="T2">udtryk</text:span></text:p>
      <text:p text:style-name="Text_20_body"><text:span text:style-name="T14">Ansvarsforskydernes leksikalske binding og deres tilknytning til specifikke operationer frem for <text:s/>kodeblokke muliggør en mere finkornet fejlhåndtering end </text:span><text:span text:style-name="T2">try-catch </text:span><text:span text:style-name="T8">-konstruktionen</text:span><text:span text:style-name="T14"> der bruges i mange udbredte sprog.</text:span></text:p>
      <text:p text:style-name="Text_20_body"><text:span text:style-name="T14">Ansvarstageren</text:span> <text:s/><text:span text:style-name="T13">:ok</text:span> <text:s/>er<text:span text:style-name="T14"> den almindeligste måde at få et resultat ud af en regel på. Ansvaret for kaldet tages, og <text:s/></text:span><text:span text:style-name="T2">udtryk</text:span><text:span text:style-name="T8"> <text:s/>tolkes og afleveres</text:span><text:span text:style-name="T2">. </text:span><text:span text:style-name="T8">Eventuelle ansvarsforskydere i </text:span><text:span text:style-name="T2">udtryk</text:span><text:span text:style-name="T8"> fejler; fortolkeren har bortkastet den information der muliggjorde forskydning af ansvaret.</text:span></text:p>
      <text:p text:style-name="Text_20_body"><text:span text:style-name="T8">Konstruktionen svarer til </text:span><text:span text:style-name="T2">return</text:span><text:span text:style-name="T8">-sætningen i C og lignende sprog, men med garanti for haleudfladning.</text:span></text:p>
      <text:p text:style-name="Text_20_body"><text:span text:style-name="T4">Implementationsnote:</text:span><text:span text:style-name="T2"> Når</text:span><text:span text:style-name="T8"> <text:s/></text:span><text:span text:style-name="T9">:ok</text:span><text:span text:style-name="T2"> -ansvarstageren er den første og eneste handling bort set fra eventuelle forudgående bindere, bortoptimerer kompileren stakoperationerne til håndtering af ansvar. Hvis halen er en konstant, en variabel der er bundet af reglen, eller en simpel node- eller listekonstruktion baseret alene på konstanter og reglens egne variable, kompileres reglen helt igennem, og bindingsnoden bortoptimeres.</text:span></text:p>
      <text:p text:style-name="Text_20_body"><text:span text:style-name="T8">Ansvarsforskyderen</text:span><text:span text:style-name="T9"> <text:s/>:prøv <text:s/></text:span><text:span text:style-name="T8">forsøger at videregive ansvaret til det øverste niveau i </text:span><text:span text:style-name="T2">udtryk</text:span><text:span text:style-name="T8">,</text:span><text:span text:style-name="T2"> </text:span><text:span text:style-name="T8">uden selv at tage ansvar. Hvis det øverste niveau i <text:s/></text:span><text:span text:style-name="T2">udtryk</text:span><text:span text:style-name="T8"> <text:s/>lykkes eller fejler, sker det samme for det originale kald, med haleudfladning hele vejen. Hvis det svipser, returnerer <text:s/></text:span><text:span text:style-name="T9">:prøv</text:span><text:span text:style-name="T8"> -konstruktionen den tomme liste. Reglen vil så svipse, hvis ikke en anden konstruktion tager ansvaret.</text:span></text:p>
      <text:p text:style-name="Text_20_body"><text:span text:style-name="T8">I modsætning til </text:span><text:span text:style-name="T2">try</text:span><text:span text:style-name="T8"> -sætningen i C++ og lignende sprog gælder <text:s/></text:span><text:span text:style-name="T9">:prøv <text:s/></text:span><text:span text:style-name="T8">ikke for deludtryk der fejler <text:s/>eller svipser.</text:span></text:p>
      <text:p text:style-name="Text_20_body"><text:span text:style-name="T8">Ansvarsfralæggeren <text:s/></text:span><text:span text:style-name="T9">:kræv <text:s/></text:span><text:span text:style-name="T8">bruges til delresultater der er nødvendige men ikke tilstrækkelige for at reglen kan lykkes.</text:span></text:p>
      <text:p text:style-name="Text_20_body"><text:span text:style-name="T8">Hvis den yderste operation lykkes, gives den som resultat af <text:s text:c="2"/></text:span><text:span text:style-name="T9">:kræv</text:span><text:span text:style-name="T8"> -sætningen og indgår i det omgivende udtryk. Hvis den fejler, videregives til det originale kald. En svipser får en eventuel igangværende <text:s/></text:span><text:span text:style-name="T9">:prøv</text:span><text:span text:style-name="T8"> -sætning for same regel til at svipse og aflevere den tomme liste. Hvis ingen <text:s/></text:span><text:span text:style-name="T9">:prøv</text:span><text:span text:style-name="T8"> -sætning er aktiv, svipser reglen.</text:span></text:p>
      <text:p text:style-name="Text_20_body"><text:span text:style-name="T8">Hvis et krævet <text:s/></text:span><text:span text:style-name="T2">udtryk </text:span><text:span text:style-name="T8">har deludtryk der kan fejle eller svipse, kan de dækkes af indlejrede <text:s/></text:span><text:span text:style-name="T9">:kræv</text:span><text:span text:style-name="T8"> -ansvarsfralæggere. Halekrølle-formen <text:s/></text:span><text:span text:style-name="T2">udtryk</text:span><text:span text:style-name="T4"> </text:span><text:span text:style-name="T9">.:kræv <text:s/></text:span><text:span text:style-name="T8">er praktisk til dette brug.</text:span></text:p>
      <text:p text:style-name="Text_20_body"><text:span text:style-name="T8">Den forsigtige ansvarstager</text:span><text:span text:style-name="T9"> <text:s/>:muligvis <text:s/></text:span><text:span text:style-name="T8">tolker og afleverer <text:s/></text:span><text:span text:style-name="T2">udtryk </text:span><text:span text:style-name="T8">, men tillader i modsætning til <text:s/></text:span><text:span text:style-name="T9">:ok <text:s/></text:span><text:span text:style-name="T8">indlejrede ansvarsforskydere, typisk <text:s/></text:span><text:span text:style-name="T9">:kræv </text:span><text:span text:style-name="T8">, der har samme virkning som i en <text:s/></text:span><text:span text:style-name="T9">:prøv</text:span><text:span text:style-name="T8"> -ansvarsforskyder.</text:span></text:p>
      <text:p text:style-name="Text_20_body"><text:span text:style-name="T8">Ansvarsfralæggeren <text:s/></text:span><text:span text:style-name="T9">:fejl <text:s/></text:span><text:span text:style-name="T8">får det originale kald til at fejle med den angivne værdi.</text:span></text:p>
      <text:h text:style-name="Heading_20_3" text:outline-level="3">Bindere</text:h>
      <text:p text:style-name="Text_20_body">Disse <text:span text:style-name="T6">bindere</text:span>:</text:p>
      <text:p text:style-name="Text_20_body"><text:span text:style-name="T1"><text:tab/></text:span><text:span text:style-name="T9">:selv</text:span><text:span text:style-name="T1"> hale<text:line-break/></text:span><text:tab/><text:span text:style-name="T13">:hvem</text:span> <text:span text:style-name="T1">hale<text:line-break/><text:tab/></text:span><text:span text:style-name="T9">:hvor</text:span><text:span text:style-name="T1"> hale<text:line-break/><text:tab/></text:span><text:span text:style-name="T9">:hvad</text:span><text:span text:style-name="T1"> hale</text:span></text:p>
      <text:p text:style-name="P5">binder deres navne til data omkring kaldet, som følger.</text:p>
      <text:p text:style-name="Text_20_body"><text:span text:style-name="T9">selv <text:s/></text:span><text:span text:style-name="T8">binder til det bundne regelsæt hvor reglen optræder, og kun dette regelsæt.</text:span></text:p>
      <text:p text:style-name="Text_20_body"><text:span text:style-name="T9">hvem</text:span><text:span text:style-name="T8"> <text:s/>binder til det kaldte objekt, som kan være et bundt hvori det bundne regelsæt indgår. Hvis regelsættet ikke er bundtet, er <text:s/></text:span><text:span text:style-name="T9">hvem <text:s/></text:span><text:span text:style-name="T8">det same som <text:s/></text:span><text:span text:style-name="T9">selv </text:span><text:span text:style-name="T8">.</text:span></text:p>
      <text:p text:style-name="Text_20_body"><text:span text:style-name="T8">For simple kald uden angivelse af objekt vil <text:s/></text:span><text:span text:style-name="T9">hvem <text:s/></text:span><text:span text:style-name="T8">binde til den kontekst hvorfra kaldet blev foretaget, dvs. det samme som <text:s/></text:span><text:span text:style-name="T9">hvor .</text:span></text:p>
      <text:p text:style-name="Text_20_body"><text:span text:style-name="T9">hvor <text:s/></text:span><text:span text:style-name="T8">binder til konteksten for det originale kald.</text:span></text:p>
      <text:p text:style-name="Text_20_body"><text:span text:style-name="T9">hvad <text:s/></text:span><text:span text:style-name="T8">binder til det udtryk der udløste kaldet.</text:span></text:p>
      <text:p text:style-name="Text_20_body"><text:span text:style-name="T8">Binderne</text:span><text:span text:style-name="T2"> <text:s/></text:span><text:span text:style-name="T9">selv</text:span><text:span text:style-name="T8"> <text:s/>og <text:s/></text:span><text:span text:style-name="T9">hvem</text:span><text:span text:style-name="T8"> <text:s/>bruges typisk når et objekt skal kalde sine egne metoder. Brug af <text:s/></text:span><text:span text:style-name="T9">hvem</text:span><text:span text:style-name="T8"> <text:s/>svarer i denne sammenhæng omtrent til OO sprogenes </text:span><text:span text:style-name="T2">virtuelle kald</text:span><text:span text:style-name="T8">.</text:span></text:p>
      <text:p text:style-name="Text_20_body"><text:span text:style-name="T8">Binderne <text:s/></text:span><text:span text:style-name="T9">hvor <text:s/></text:span><text:span text:style-name="T8">og <text:s/></text:span><text:span text:style-name="T9">hvad <text:s/></text:span><text:span text:style-name="T8">bruges til at stedfæste fejl. Når ansvaret for et kald sendes videre til et andet kald med <text:s/></text:span><text:span text:style-name="T9">:prøv</text:span><text:span text:style-name="T8"> <text:s/>eller <text:s/></text:span><text:span text:style-name="T9">:kræv</text:span><text:span text:style-name="T8"> , vil bindere i viderekaldet opføre sig som følger:</text:span></text:p>
      <text:p text:style-name="Text_20_body"><text:span text:style-name="T8"><text:tab/></text:span><text:span text:style-name="T9">:hvor</text:span><text:span text:style-name="T8"> <text:s text:c="3"/>og <text:s text:c="3"/></text:span><text:span text:style-name="T9">:hvad <text:s text:c="3"/></text:span><text:span text:style-name="T8">binder</text:span><text:span text:style-name="T9"> </text:span><text:span text:style-name="T8">til det original kald.</text:span></text:p>
      <text:p text:style-name="Text_20_body"><text:span text:style-name="T8"><text:tab/></text:span><text:span text:style-name="T9">:selv</text:span><text:span text:style-name="T8"> <text:s text:c="3"/>og <text:s text:c="3"/></text:span><text:span text:style-name="T9">:hvem</text:span><text:span text:style-name="T8"> <text:s text:c="3"/>binder til viderekaldet.</text:span></text:p>
      <text:h text:style-name="Heading_20_3" text:outline-level="3">Mærkater</text:h>
      <text:p text:style-name="P2">Bindere og ansvarsforskydere findes i mærkede versioner til brug i indlejrede regler.</text:p>
      <text:p text:style-name="P5">De mærkede bindere</text:p>
      <text:p text:style-name="Text_20_body"><text:tab/><text:span text:style-name="T13">:</text:span><text:span text:style-name="T9">selv [</text:span><text:span text:style-name="T2">mærkat</text:span><text:span text:style-name="T9">];</text:span><text:span text:style-name="T4"> </text:span><text:span text:style-name="T2">hale</text:span><text:span text:style-name="T8"><text:line-break/></text:span><text:span text:style-name="T2"><text:tab/></text:span><text:span text:style-name="T8">:</text:span><text:span text:style-name="T13">hvem [</text:span><text:span text:style-name="T2">mærkat</text:span><text:span text:style-name="T13">];</text:span> <text:span text:style-name="T1">hale<text:line-break/><text:tab/></text:span><text:span text:style-name="T9">:hvor [</text:span><text:span text:style-name="T2">mærkat</text:span><text:span text:style-name="T9">];</text:span><text:span text:style-name="T1"> hale<text:line-break/><text:tab/></text:span><text:span text:style-name="T9">:hvad [</text:span><text:span text:style-name="T2">mærkat</text:span><text:span text:style-name="T9">];</text:span><text:span text:style-name="T1"> hale</text:span></text:p>
      <text:p text:style-name="P5"><text:span text:style-name="T14">binder <text:s/></text:span><text:span text:style-name="T2">navn </text:span><text:span text:style-name="T13">[</text:span><text:span text:style-name="T2">mærkat</text:span><text:span text:style-name="T13">]</text:span><text:span text:style-name="T2"> <text:s/></text:span><text:span text:style-name="T14">i stedet for <text:s/></text:span><text:span text:style-name="T2">navn </text:span><text:span text:style-name="T14">.</text:span></text:p>
      <text:p text:style-name="P2">De mærkede ansvarsforskydere</text:p>
      <text:p text:style-name="Text_20_body"><text:span text:style-name="T8"><text:tab/></text:span><text:span text:style-name="T9">:ok [</text:span><text:span text:style-name="T2">mærkat</text:span><text:span text:style-name="T9">]; </text:span><text:span text:style-name="T2">hale<text:line-break/><text:tab/></text:span><text:span text:style-name="T9">:prøv [</text:span><text:span text:style-name="T2">mærkat</text:span><text:span text:style-name="T9">]; </text:span><text:span text:style-name="T2">hale<text:line-break/><text:tab/></text:span><text:span text:style-name="T9">:kræv [</text:span><text:span text:style-name="T2">mærkat</text:span><text:span text:style-name="T9">]; </text:span><text:span text:style-name="T2">udtryk</text:span><text:span text:style-name="T8"> </text:span><text:span text:style-name="T2"><text:line-break/><text:tab/></text:span><text:span text:style-name="T9">:tak [</text:span><text:span text:style-name="T2">mærkat</text:span><text:span text:style-name="T9">]; </text:span><text:span text:style-name="T2">udtryk</text:span><text:span text:style-name="T8"> </text:span><text:span text:style-name="T2"><text:line-break/><text:tab/></text:span><text:span text:style-name="T9">:fejl [</text:span><text:span text:style-name="T2">mærkat</text:span><text:span text:style-name="T9">]; </text:span><text:span text:style-name="T2">udtryk</text:span></text:p>
      <text:p text:style-name="P5"><text:span text:style-name="T14">bruges med en </text:span><text:span text:style-name="T2">mærkat</text:span><text:span text:style-name="T14">:</text:span></text:p>
      <text:p text:style-name="P5"><text:span text:style-name="T14"><text:tab/></text:span><text:span text:style-name="T13">:mærkat [</text:span><text:span text:style-name="T2">mærkat</text:span><text:span text:style-name="T13">]; </text:span><text:span text:style-name="T2">hale</text:span></text:p>
      <text:p text:style-name="P2">og tillader en indre regel at agere på vegne af en ydre regel:</text:p>
      <text:p text:style-name="P5"><text:span text:style-name="T14"><text:tab/></text:span><text:span text:style-name="T13">{ </text:span><text:span text:style-name="T2">...</text:span><text:span text:style-name="T13"><text:line-break/><text:tab/>| </text:span><text:span text:style-name="T2">... </text:span><text:span text:style-name="T13">:mærkat [</text:span><text:span text:style-name="T2">mærkat</text:span><text:span text:style-name="T13">]; ...<text:line-break/><text:tab/> <text:s/></text:span><text:span text:style-name="T2">...</text:span><text:span text:style-name="T13"> { </text:span><text:span text:style-name="T2">...</text:span><text:span text:style-name="T13"> | </text:span><text:span text:style-name="T2">... </text:span><text:span text:style-name="T13">:ok [</text:span><text:span text:style-name="T2">mærkat</text:span><text:span text:style-name="T13">];</text:span><text:span text:style-name="T2"> <text:s/>... </text:span><text:span text:style-name="T13">}<text:line-break/><text:tab/>}</text:span></text:p>
      <text:p text:style-name="P2">Generelt bruges mærkater sjældent, men PILS redigeringen bruger dem til håndtering af syntaksfejl.</text:p>
      <text:h text:style-name="Heading_20_2" text:outline-level="2">Udpegning af fejlkilder med ansvarsforskydere</text:h>
      <text:p text:style-name="P2">Den finkornede håndtering af <text:s/>ansvar gør det nemmere at sætte fingeren på en fejlkilde. Et af de største problemer ved løst typede sprog viser sig i situationer som den der her skitseres med et simpelt eksempel:</text:p>
      <text:p text:style-name="P2"><text:tab/><text:span text:style-name="T1">! Annas program forsøger at fordoble et tal ved hjælp af Bennys fordobler-bibliotek.<text:line-break/></text:span><text:tab/><text:span text:style-name="T13">dobbelt "MMVII"</text:span><text:line-break/><text:tab/><text:span text:style-name="T13">===<text:line-break/><text:tab/></text:span><text:span text:style-name="T1">! Bennys bibliotek bruger Børges bibliotek:<text:line-break/></text:span><text:tab/><text:span text:style-name="T13">{ dobbelt: x | :ok gang (x <text:s/>.med 2) }</text:span><text:span text:style-name="T1"><text:line-break/></text:span><text:tab/><text:span text:style-name="T13">===<text:line-break/></text:span><text:tab/> <text:span text:style-name="T1">! Børges biblioteksfunktion forventer talværdier, ikke tekststrenge med romertal:<text:line-break/></text:span><text:tab/><text:span text:style-name="T13">{ gang: x .med | :ok x * med }</text:span></text:p>
      <text:p text:style-name="P2">Når Anna kører sit program, vil operationen <text:s/><text:span text:style-name="T13">x * med <text:s/></text:span>svipse og udløse en fejlmeddelelse i Børges bibliotek, hvad der godt kan virke forvirrende på Anne, eftersom hun ikke aner at hun bruger Børges bibliotek igennem Bennys.</text:p>
      <text:p text:style-name="P2">Halfdan Rasmussen har beskrevet det rammende:</text:p>
      <text:p text:style-name="P13"><text:tab/>Bennys bukser brændte,<text:line-break/><text:tab/>Børge råbte: åh!<text:line-break/><text:tab/>Børge havde nemlig<text:line-break/><text:tab/>Bennys bukser på.</text:p>
      <text:p text:style-name="P2">Traditionelt vil man i en sådan situation granske stakdump eller skridte igennem koden for at finde fejlkilden. Men i PILS kan man gennem hensigtsmæssig brug af ansvarsbegrebet typisk straks slå ned på fejlkinden.</text:p>
      <text:p text:style-name="P2">Med ansvarsforskyderne <text:s/><text:span text:style-name="T13">:prøv</text:span> <text:s/>og <text:s/><text:span text:style-name="T13">:kræv</text:span> <text:s/>kan en biblioteksfunktion udføre specifikke operationer på vegne af kaldet af funktionen, så kaldet får skylden hvis noget går galt.</text:p>
      <text:p text:style-name="P2">Når Børge bliver træt af brok fra folk der bruger hans biblioteksfunktion med forkerte parametre, laver han måske en revideret udgave der forholder sig pessimistisk til argumenterne og ikke stoler på at de har de forventede operationer. Anna vil nu have denne situation:</text:p>
      <text:p text:style-name="P2"><text:tab/><text:span text:style-name="T13">dobbelt "MMVII" </text:span><text:s/><text:span text:style-name="T1">! Anna's application</text:span><text:line-break/><text:tab/><text:span text:style-name="T13">===<text:line-break/></text:span><text:tab/><text:span text:style-name="T13">{ dobbelt: x | :ok gang (x .med 2) } </text:span><text:span text:style-name="T1">! Bennys bibliotek<text:line-break/></text:span><text:tab/><text:span text:style-name="T13">===<text:line-break/></text:span><text:tab/><text:span text:style-name="T13">{ gang: x .med | :prøv x * med }</text:span> <text:span text:style-name="T1">! Børges reviderede bibliotek</text:span></text:p>
      <text:p text:style-name="P2">Nu får operationen <text:s/><text:span text:style-name="T13">gang (x .med 2) <text:s/></text:span>i Bennys bibliotek skylden. Benny kunne så revidere sit bibliotek, så Anna får denne situtation:</text:p>
      <text:p text:style-name="P2"><text:tab/><text:span text:style-name="T13">dobbelt "MMVII" </text:span><text:s/><text:span text:style-name="T1">! Anna's application</text:span><text:line-break/><text:tab/><text:span text:style-name="T13">===<text:line-break/></text:span><text:tab/><text:span text:style-name="T13">{ dobbelt: x | :prøv gang (x .med 2) } </text:span><text:span text:style-name="T1">! Bennys reviderede bibliotek<text:line-break/></text:span><text:tab/><text:span text:style-name="T13">===<text:line-break/></text:span><text:tab/><text:span text:style-name="T13">{ gang: x .med | :prøv x * med }</text:span> <text:span text:style-name="T1">! Børges reviderede bibliotek</text:span></text:p>
      <text:p text:style-name="Text_20_body"><text:span text:style-name="T8">Nu skydes skylden straks på kaldet <text:s/></text:span><text:span text:style-name="T9">dobbelt "MMVII"</text:span><text:span text:style-name="T8"> <text:s/>– og vi får udpeget den rygende tændstik i Annas hånd. Mysteriet er opklaret.</text:span></text:p>
      <text:p text:style-name="P2">Ovenstående lille eksempel er kun til illustration af konceptet; til simple beregninger af den art vil et typetjek i pasformen være tilstrækkeligt. Men i situationer hvor parametrene er objekter der formodes at understøtte visse metoder, er typetjekkene ikke til megen hjælp, idet PILS ikke har klasser eller interfaces der kan testes mod. I stedet kan metodekaldene foretages med ansvarsfralæggelse, så det kald der har leveret parametrene, får skylden hvis disse ikke understøtter de forventede metoder.</text:p>
      <text:p text:style-name="P2">PILS er indrettet så denne teknik stort set ikke kræver ekstra skrivearbejde.</text:p>
      <text:h text:style-name="Heading_20_1" text:outline-level="1">Systemnære faciliteter</text:h>
      <text:h text:style-name="Heading_20_2" text:outline-level="2">Supplerende konstanttyper</text:h>
      <text:p text:style-name="Text_20_body">PILS kernen understøtter udvidelse af datamodellen med konstanttyper, som kan behandles af parseren ved udvidelser af denne.</text:p>
      <text:p text:style-name="Text_20_body">Når parseren møder en startkrølparentes <text:s/><text:span text:style-name="T13">{</text:span><text:span text:style-name="T8"> , spoler den frem idet der holdes styr på kommentarer, tekststrenge og indlejrede parenteser. Hvis den finder en slutkrølparentes <text:s/></text:span><text:span text:style-name="T9">} <text:s/></text:span><text:span text:style-name="T8">uden en mellemliggende bjælke <text:s/></text:span><text:span text:style-name="T9">|</text:span><text:span text:style-name="T8"> , prøves parserudvidelserne på de mellemliggende tegn.</text:span></text:p>
      <text:p text:style-name="P2">De ekstra typer levers af platformsbindingerne og kan være forskellige for forskellige platforme.</text:p>
      <text:h text:style-name="Heading_20_2" text:outline-level="2">Tilstande i en omskiftelig verden</text:h>
      <text:p text:style-name="P1">Normalt er PILS data tilstandsløse og uforanderlige<text:span text:style-name="T6">, men nogle få tilstandsbærende objekter er indført i sproget for at håndtere grænseflader til en foranderlig verden. De er udformet så risikoen for resurselækager er lille, ved specielle forholdsregler omkring de konstruktioner der gør det muligt at opbygge cirkulære strukturer.</text:span></text:p>
      <text:h text:style-name="Heading_20_3" text:outline-level="3">Kanaler, lyttere og kontakter</text:h>
      <text:p text:style-name="Text_20_body">En <text:span text:style-name="T1">kanal </text:span><text:span text:style-name="T6">er en n</text:span>odekonstant af form</text:p>
      <text:p text:style-name="Text_20_body"><text:span text:style-name="T13"><text:tab/>[kanal</text:span>: <text:span text:style-name="T1">nøgle</text:span><text:span text:style-name="T9">]</text:span></text:p>
      <text:p text:style-name="P1"><text:span text:style-name="T6">hvor </text:span><text:span text:style-name="T1">nøgle </text:span><text:span text:style-name="T6">er en vilkårlig konstant. Operationen</text:span></text:p>
      <text:p text:style-name="P1"><text:span text:style-name="T6"><text:tab/></text:span><text:span text:style-name="T1">kanal </text:span><text:span text:style-name="T9">lyt </text:span><text:span text:style-name="T1">(lytter)</text:span></text:p>
      <text:p text:style-name="P2">opretter en <text:span text:style-name="T1">kontakt</text:span>, der i hele sin levetid forbinder <text:span text:style-name="T1">lytter</text:span> med <text:span text:style-name="T1">kanal</text:span> og ikke har andre funktioner.<text:span text:style-name="T1"> </text:span>Den eneste måde kontakten kan afbrydes på, er at tabe alle referencer til den så den fjernes af PILS afrydningen.</text:p>
      <text:p text:style-name="P1"><text:span text:style-name="T6">Når en kanal</text:span><text:span text:style-name="T1"> </text:span><text:span text:style-name="T6">udsættes for et kald, videresendes det til kanalens lyttere efter tur, idet de sidst indsatte lyttere prøves først, indtil en af dem tager ansvaret, som hvis lyttterne havde været bundtet med <text:s/></text:span><text:span text:style-name="T9">+++</text:span><text:span text:style-name="T6"> -operatoren, bort set fra at <text:s/></text:span><text:span text:style-name="T9">:hvem <text:s/></text:span><text:span text:style-name="T6">binder til kontakten.</text:span></text:p>
      <text:p text:style-name="P1"><text:span text:style-name="T6">Som alle konstanter er kanaler unikke. Hvis et udtryk som </text:span><text:span text:style-name="T9">(kanal:</text:span><text:span text:style-name="T6"> </text:span><text:span text:style-name="T1">nøgle</text:span><text:span text:style-name="T9">) <text:s/></text:span><text:span text:style-name="T6">udføres flere gange for samme nøgle, genbruges kanalen. PILS programmeringssystemet bruger kanaler til at holde redigeringer af PILS filer og moduler unikke, ved at bruge fil- og modulnavne i kanalnøgler.</text:span></text:p>
      <text:p text:style-name="P2">Kanaler er trådsikre.</text:p>
      <text:h text:style-name="Heading_20_3" text:outline-level="3">Udefrastyrede huskere</text:h>
      <text:p text:style-name="Text_20_body">Når PILS bruges med et vinduesbaseret brugerfladesystem, vil vinduernes levetid generelt være styret af brugeren eller platformen, ikke af PILS. <text:span text:style-name="T6">Sådanne objekter kaldes </text:span><text:span text:style-name="T1">udefrastyrede</text:span><text:span text:style-name="T6">,</text:span><text:span text:style-name="T1"> </text:span><text:span text:style-name="T6">og PILS håndterer dem gennem indpakningsobjekter der håndteres som konstanter, med metoder som defineres af platformsbindingerne.</text:span></text:p>
      <text:p text:style-name="Text_20_body"><text:span text:style-name="T1">Huskere</text:span> er udefrastyrede objekter der kan have tilknyttede PILS objekter og herigennem kan referere cirkulært til hinanden.</text:p>
      <text:p text:style-name="Text_20_body">PILS bindingerne bruger platformens hændelses-håndtering <text:span text:style-name="T6">(på nørdsk: </text:span><text:span text:style-name="T1">event handling</text:span><text:span text:style-name="T6">) til at <text:s/>holde</text:span> styr på hvornår udefrastyrede objekter bliver nedlagt – når det sker, blænder PILS indpakningsobjektet og frigiver eventuelle tilknyttede data hvis objektet er en husker.</text:p>
      <text:p text:style-name="Text_20_body">Data kan tilknyttes en huskekage og hentes igen:</text:p>
      <text:p text:style-name="Text_20_body"><text:tab/><text:span text:style-name="T1">huskekage </text:span><text:span text:style-name="T13">husk .</text:span> <text:span text:style-name="T1">nøgle </text:span><text:span text:style-name="T9">:=</text:span><text:span text:style-name="T1"> værdi</text:span><text:span text:style-name="T9">;<text:line-break/></text:span><text:tab/><text:span text:style-name="T1">...<text:line-break/><text:tab/>huskekage </text:span><text:span text:style-name="T13">husk .</text:span> <text:span text:style-name="T1">nøgle</text:span></text:p>
      <text:p text:style-name="Text_20_body">Værdierne kan overskrives, men nøglerne kan ikke slettes når de først er oprettet. Værdierne kan kun udtrækkes hvis man har de tilsvarende nøgler; der er ingen mulighed for systematisk gennemløb af huskekager.</text:p>
      <text:h text:style-name="Heading_20_3" text:outline-level="3">Stropper</text:h>
      <text:p text:style-name="Text_20_body">Noder af form <text:s/><text:span text:style-name="T13">[strop: </text:span><text:span text:style-name="T2">nøgle</text:span><text:span text:style-name="T13">] <text:s/></text:span><text:span text:style-name="T14">kan bruges som en slags kanaler, men de kan kun have én lytter, og kun når de er hægtet på en eller flere udefrastyrede objekter. Hvis de udefrastyrede objekter nedlægges, taber stropperne straks hukommelsen.</text:span></text:p>
      <text:p text:style-name="P1">Stropper bruges af programmeringsystemet til programstropper der hægtes på alle programmets vinduer. Nå alle de vinduer der hører til et program, taber programstroppen hukommelsen og frigiver dermed programmets resurser.</text:p>
      <text:p text:style-name="P1">Ved opstart af programmer hæftes stropperne midlertidigt på universalnøglem-</text:p>
      <text:h text:style-name="Heading_20_2" text:outline-level="2">Simple filoperationer</text:h>
      <text:p text:style-name="Text_20_body">Fil- og mappeobjekter giver adgang til simple operations på filer og filsystemer.</text:p>
      <text:p text:style-name="Text_20_body">En mappe er det der på nørdsk hedder et <text:span text:style-name="T1">directory</text:span>.</text:p>
      <text:p text:style-name="Text_20_body">Læsning og skrivning er kun understøttet som afsluttede operationer på hele filer. Fil- og mappeobjekter er ret beset kun indpakninger af navnene, med adgangsbillet filsystemet; konceptet <text:span text:style-name="T1">åbne filer</text:span><text:span text:style-name="T6"> findes ikke i PILS.</text:span></text:p>
      <text:p text:style-name="Text_20_body">Fil- og mappenavnene angives med fuld sti, med <text:s/><text:span text:style-name="T13">/</text:span> <text:s/>som skilletegn på alle systemer, også MS Windows. Det sædvanlige MS Windows-skilletegn <text:s/><text:span text:style-name="T13">\</text:span> <text:s/>bruges ikke i PILS filnavne.</text:p>
      <text:p text:style-name="Text_20_body">Mappenavne har altid et afsluttende <text:s/><text:span text:style-name="T13">/</text:span> .</text:p>
      <text:p text:style-name="Text_20_body">Funktionerne <text:s/><text:span text:style-name="T13">fil <text:s/></text:span>og <text:s/><text:span text:style-name="T13">mappe <text:s/></text:span><text:span text:style-name="T14">er metoder på universalnøglen og virker ikke uden den. Ved at skjule universalnøglen kan der konstrueres sandkasser hvor fremmed kode kan udføres med begrænset adgang til filsystemet.</text:span></text:p>
      <text:h text:style-name="Heading_20_3" text:outline-level="3">Filer</text:h>
      <text:p text:style-name="Text_20_body"><text:span text:style-name="T14"><text:tab/></text:span><text:span text:style-name="T13">fil (</text:span><text:span text:style-name="T2">filnavn</text:span><text:span text:style-name="T13">)</text:span><text:span text:style-name="T14"><text:line-break/><text:tab/></text:span><text:span text:style-name="T13">datafil (</text:span><text:span text:style-name="T2">filnavn</text:span><text:span text:style-name="T13">)</text:span></text:p>
      <text:p text:style-name="P1">opretter et filobjekt – <text:s/><text:span text:style-name="T13">fil</text:span> <text:s/>er den indbyggede funktion, <text:s/><text:span text:style-name="T13">datafil <text:s/></text:span>er en indpakning der bruges til dataafhængige moduler.</text:p>
      <text:p text:style-name="P1">Filnavnet kan udtrækkes ned</text:p>
      <text:p text:style-name="Text_20_body"><text:span text:style-name="T14"><text:tab/></text:span><text:span text:style-name="T2">fil </text:span><text:span text:style-name="T9">navn</text:span></text:p>
      <text:p text:style-name="P1">Filen kan læses og skrives i et hug:</text:p>
      <text:p text:style-name="Text_20_body"><text:span text:style-name="T14"><text:tab/></text:span><text:span text:style-name="T2">fil</text:span><text:span text:style-name="T13"> tekst</text:span><text:span text:style-name="T2"><text:line-break/><text:tab/>fil </text:span><text:span text:style-name="T13">tekst := </text:span><text:span text:style-name="T2">tekst</text:span></text:p>
      <text:p text:style-name="P1">Læsning og skrivning sker som rå bytes – eventuelle konverteringer udføres som særskilte operationer:</text:p>
      <text:p text:style-name="P1"><text:span text:style-name="T1"><text:tab/>fil </text:span><text:span text:style-name="T9">tekst</text:span><text:span text:style-name="T6"> </text:span><text:span text:style-name="T9">bytes utf-8</text:span></text:p>
      <text:p text:style-name="P2">indlæser en ANSI-kodet fil som en utf-8-kodet tekststreng.</text:p>
      <text:p text:style-name="P1"><text:span text:style-name="T4"><text:tab/></text:span><text:span text:style-name="T1">fil </text:span><text:span text:style-name="T13">tekst :=</text:span> <text:span text:style-name="T1">tekst </text:span><text:span text:style-name="T9">utf-8 bytes</text:span></text:p>
      <text:p text:style-name="P2">skriver en utf-8-kodet tekststreng som en ANSI-kodet fil.</text:p>
      <text:p text:style-name="P1">Filer kan manipuleres med disse operationer:</text:p>
      <text:p text:style-name="Text_20_body"><text:span text:style-name="T14"><text:tab/></text:span><text:span text:style-name="T9">fil (</text:span><text:span text:style-name="T2">filnavn</text:span><text:span text:style-name="T9">) kopiér (</text:span><text:span text:style-name="T2">nyt-filnavn</text:span><text:span text:style-name="T13">)<text:line-break/></text:span><text:span text:style-name="T14"><text:tab/></text:span><text:span text:style-name="T9">fil (</text:span><text:span text:style-name="T2">filnavn</text:span><text:span text:style-name="T9">)</text:span><text:span text:style-name="T2"> </text:span><text:span text:style-name="T9">flyt (</text:span><text:span text:style-name="T2">nyt-filnavn</text:span><text:span text:style-name="T13">)<text:line-break/></text:span><text:span text:style-name="T14"><text:tab/></text:span><text:span text:style-name="T9">fil (</text:span><text:span text:style-name="T2">filnavn</text:span><text:span text:style-name="T9">)</text:span><text:span text:style-name="T4"> </text:span><text:span text:style-name="T9">slet</text:span></text:p>
      <text:p text:style-name="Text_20_body"><text:span text:style-name="T8">Resultat af <text:s/></text:span><text:span text:style-name="T9">kopiér</text:span><text:span text:style-name="T8"> <text:s/>og <text:s/></text:span><text:span text:style-name="T9">flyt</text:span><text:span text:style-name="T8"> <text:s/>er filobjektet for </text:span><text:span text:style-name="T2">nyt-filnavn</text:span><text:span text:style-name="T8">.</text:span></text:p>
      <text:p text:style-name="P2">Eksistensen af filer kan testes med</text:p>
      <text:p text:style-name="Text_20_body"><text:span text:style-name="T14"><text:tab/></text:span><text:span text:style-name="T2">fil</text:span><text:span text:style-name="T4"> </text:span><text:span text:style-name="T9">ok</text:span></text:p>
      <text:p text:style-name="Text_20_body"><text:span text:style-name="T6">som giver </text:span><text:span text:style-name="T1">fil</text:span><text:span text:style-name="T6"> hvis filen findes, og ellers svipser</text:span></text:p>
      <text:p text:style-name="Text_20_body"><text:span text:style-name="T14"><text:tab/></text:span><text:span text:style-name="T2">fil</text:span><text:span text:style-name="T4"> </text:span><text:span text:style-name="T9">læsbar <text:s text:c="3"/></text:span><text:span text:style-name="T8">giver <text:s/></text:span><text:span text:style-name="T9">1</text:span><text:span text:style-name="T8"> <text:s/>hvis læsning er mulig og tilladt, ellers <text:s/></text:span><text:span text:style-name="T9">0</text:span><text:span text:style-name="T8"> .</text:span><text:span text:style-name="T9"><text:line-break/></text:span><text:span text:style-name="T14"><text:tab/></text:span><text:span text:style-name="T2">fil</text:span><text:span text:style-name="T4"> </text:span><text:span text:style-name="T9">skrivbar <text:s text:c="3"/></text:span><text:span text:style-name="T8">tilsvarende for skrivning</text:span></text:p>
      <text:p text:style-name="Text_20_body"><text:span text:style-name="T14"><text:tab/></text:span><text:span text:style-name="T2">fil</text:span><text:span text:style-name="T4"> </text:span><text:span text:style-name="T9">antal <text:s text:c="3"/></text:span><text:span text:style-name="T8">giver filens størrelse i bytes</text:span></text:p>
      <text:p text:style-name="Text_20_body"><text:span text:style-name="T14"><text:tab/></text:span><text:span text:style-name="T2">fil</text:span><text:span text:style-name="T4"> </text:span><text:span text:style-name="T9">tidsstempel <text:s text:c="3"/></text:span><text:span text:style-name="T8">læser tidsstemplet for ændring af filen</text:span><text:span text:style-name="T9"><text:line-break/></text:span><text:span text:style-name="T14"><text:tab/></text:span><text:span text:style-name="T2">fil</text:span><text:span text:style-name="T4"> </text:span><text:span text:style-name="T9">tidsstempel (</text:span><text:span text:style-name="T2">tid</text:span><text:span text:style-name="T9">) <text:s text:c="2"/></text:span><text:span text:style-name="T8">sætter <text:s/>tidsstemplet for ændring af filen</text:span></text:p>
      <text:p text:style-name="P2">Der er ingen specialiserede operationer til opsplitning af filnavne i dele; dette gøres nemt med de almindelige operationer på tekststrenge:</text:p>
      <text:p text:style-name="Text_20_body"><text:span text:style-name="T8"><text:tab/></text:span><text:span text:style-name="T2">fn</text:span><text:span text:style-name="T9"> &lt;-#-* "/" <text:s text:c="3"/></text:span><text:span text:style-name="T8">giver mappens navn<text:line-break/><text:tab/></text:span><text:span text:style-name="T2">fn </text:span><text:span text:style-name="T9">&lt;+#-* "/" <text:s text:c="3"/></text:span><text:span text:style-name="T8">giver filnavnet uden mappe<text:line-break/><text:tab/></text:span><text:span text:style-name="T2">fn</text:span><text:span text:style-name="T9"> &lt;+#-* "/" &lt;+#=* "." --# 1 <text:s text:c="3"/></text:span><text:span text:style-name="T8">giver filens type<text:line-break/><text:tab/></text:span><text:span text:style-name="T2">fn</text:span><text:span text:style-name="T9"> &lt;-# (</text:span><text:span text:style-name="T2">f</text:span><text:span text:style-name="T3">n </text:span><text:span text:style-name="T9">&lt;+#-* "/" &lt;=* ".") <text:s text:c="3"/></text:span><text:span text:style-name="T8">giver filnavnet uden type<text:line-break/><text:tab/></text:span><text:span text:style-name="T2">fn</text:span><text:span text:style-name="T9"> &lt;+#-* "/" &lt;-#=* "." <text:s text:c="3"/></text:span><text:span text:style-name="T8">giver filnavnet uden mappe og type</text:span></text:p>
      <text:h text:style-name="Heading_20_3" text:outline-level="3">Mapper</text:h>
      <text:p text:style-name="P10"><text:span text:style-name="T14"><text:tab/></text:span>mappe (<text:span text:style-name="T2">mappe-navn</text:span>)</text:p>
      <text:p text:style-name="P1">opretter et mappeobjekt. <text:span text:style-name="T1">mappe-navn </text:span><text:span text:style-name="T6">skal afsluttes med skilletegnet <text:s/></text:span><text:span text:style-name="T9">/</text:span><text:span text:style-name="T6"> <text:s/>og kan udtrækkes med:</text:span></text:p>
      <text:p text:style-name="P1"><text:span text:style-name="T6"><text:tab/></text:span><text:span text:style-name="T1">mappe </text:span><text:span text:style-name="T9">navn</text:span></text:p>
      <text:p text:style-name="P2">Filer og undermapper kan udtrækkes:</text:p>
      <text:p text:style-name="P1"><text:span text:style-name="T6"><text:tab/></text:span><text:span text:style-name="T1">mappe </text:span><text:span text:style-name="T9">filerne <text:s text:c="3"/></text:span><text:span text:style-name="T6">giver en liste af filobjekter <text:line-break/><text:tab/></text:span><text:span text:style-name="T1">mappe </text:span><text:span text:style-name="T9">mapperne</text:span><text:span text:style-name="T1"> <text:s text:c="3"/></text:span><text:span text:style-name="T6">giver en liste af mappeobjekter</text:span></text:p>
      <text:p text:style-name="P1">Filtrering kan udføres som separat skridt. – dette eksempel finder filer af type <text:s/><text:span text:style-name="T13">.pils</text:span> :</text:p>
      <text:p text:style-name="P1"><text:tab/><text:span text:style-name="T1">mappe </text:span><text:span text:style-name="T9">filerne hver {ok fil (? &lt;$* ".pils")|:ok}</text:span></text:p>
      <text:p text:style-name="P2">Dyb søgning i en mappe efter filer kan udføres med en rekursiv regel:</text:p>
      <text:p text:style-name="P1"><text:span text:style-name="T9"><text:tab/></text:span><text:span text:style-name="T1">mappe</text:span><text:span text:style-name="T4"> </text:span><text:span text:style-name="T9">kald {m|:hvem :ok m filerne &amp; (m mapperne enhver (hvem) splejs)}</text:span></text:p>
      <text:p text:style-name="P2">Tomme mapper kan oprettes og slettes:</text:p>
      <text:p text:style-name="P1"><text:span text:style-name="T6"><text:tab/></text:span><text:span text:style-name="T1">mappe </text:span><text:span text:style-name="T9">opret<text:line-break/></text:span><text:span text:style-name="T6"><text:tab/></text:span><text:span text:style-name="T1">mappe </text:span><text:span text:style-name="T9">slet</text:span></text:p>
      <text:h text:style-name="Heading_20_3" text:outline-level="3">Filer og mapper i pasformer</text:h>
      <text:p text:style-name="Text_20_body">Filtering af filer og mapper understøttes ved brugen af <text:s/><text:span text:style-name="T13">fil</text:span><text:span text:style-name="T14"> <text:s/>og <text:s/></text:span><text:span text:style-name="T13">mappe <text:s/></text:span><text:span text:style-name="T14">som operatorer i pasformer.</text:span></text:p>
      <text:p text:style-name="P10"><text:tab/><text:span text:style-name="T2">fil </text:span>fil (<text:span text:style-name="T2">fn</text:span><text:span text:style-name="T6">)</text:span><text:span text:style-name="T1"> <text:s text:c="2"/></text:span><text:span text:style-name="T8">dækker over en </text:span><text:span text:style-name="T2">fil</text:span><text:span text:style-name="T8"> idet </text:span><text:span text:style-name="T2">fn </text:span><text:span text:style-name="T8">dækker over navnet</text:span></text:p>
      <text:p text:style-name="P10"><text:tab/><text:span text:style-name="T2">mappe </text:span>mappe (<text:span text:style-name="T2">mn</text:span><text:span text:style-name="T6">)</text:span><text:span text:style-name="T1"> <text:s text:c="2"/></text:span><text:span text:style-name="T8">dækker over en </text:span><text:span text:style-name="T2">mappe</text:span><text:span text:style-name="T8"> idet </text:span><text:span text:style-name="T2">mn </text:span><text:span text:style-name="T8">dækker over navnet</text:span></text:p>
      <text:p text:style-name="P2">Dette eksempel lister alle <text:s/><text:span text:style-name="T13">.pils</text:span> <text:s/>filer i brugerens dokumentmappe med tidsstempler, idet mapper af navn <text:span text:style-name="T13">backup <text:s/></text:span>og deres undermapper udelades</text:p>
      <text:p text:style-name="P7"><text:tab/>mappe (platform sti dokumenterne) kald<text:line-break/><text:tab/>{ m mappe (?) | :hvem :ok m filerne &amp; (m mapperne hver (hvem) splejs) }<text:line-break/><text:tab/>{ ? mappe (? &lt;$* "/backup/") | ? }<text:line-break/><text:tab/>hver { fil fil (filnavn &lt;$* ".pils") | :ok filnavn, fil tidsstempel }</text:p>
      <text:h text:style-name="Heading_20_3" text:outline-level="3">Zipfiler</text:h>
      <text:p text:style-name="P2">Zipfiler kan læses med:</text:p>
      <text:p text:style-name="P10"><text:span text:style-name="T8"><text:tab/></text:span><text:span text:style-name="T6">fil (</text:span><text:span text:style-name="T2">zipfilnavn</text:span><text:span text:style-name="T6">) zip</text:span></text:p>
      <text:p text:style-name="P1"><text:span text:style-name="T6">som giver en liste af lister <text:s/></text:span><text:span text:style-name="T9">(</text:span><text:span text:style-name="T1">sti, data, tidsstempel</text:span><text:span text:style-name="T4">) <text:s/></text:span><text:span text:style-name="T6">for alle pakkede filer i zipfilen.</text:span></text:p>
      <text:p text:style-name="P2">En zipfil kan oprettes med:</text:p>
      <text:p text:style-name="P10"><text:span text:style-name="T8"><text:tab/></text:span><text:span text:style-name="T6">fil (</text:span><text:span text:style-name="T2">zipfilenavn</text:span><text:span text:style-name="T6">) zip := </text:span><text:span text:style-name="T2">posterne</text:span></text:p>
      <text:p text:style-name="P13"><text:span text:style-name="T13">Bemærk:</text:span> skrivning af zipfiler er p.t. ikke implementeret i jucePILS.</text:p>
      <text:p text:style-name="P2">Ligesom ved almindelige filnavne bruges <text:s/>/ <text:s/>som skilletegn, selvom zip-formatet bruger <text:s/><text:span text:style-name="T13">\</text:span> <text:s/>internt.</text:p>
      <text:p text:style-name="P2">Der er ingen understøttelse for ændringer eller tilføjelser til zipfilerne, udtrækning af enkelte filer eller læsning/skrivning af andre arkivformater.</text:p>
      <text:p text:style-name="P2">Bemærk: OpenOffice-pakken lagrer sine dokumenter i zip-format. HTML-udgaven af PILS dokumentationen er skrevet med OpenOffice Writer og konverteret til HTML af et PILS script.</text:p>
      <text:h text:style-name="Heading_20_2" text:outline-level="2">Tråde, knuder og efternølere</text:h>
      <text:p text:style-name="Text_20_body">Med arbejdstråde kan man undgå at PILS brugergrænsefladen låser under langvarige beregninger, og <text:s/>udnytte multiprocessorsystemer til ad udføre beregninger parallelt.</text:p>
      <text:p text:style-name="Text_20_body">PILS tråde og knuder er beregnet til dette og har ikke den finkornede synkroniseringsmekanik der kræves til proceskontrol. Til gengæld er man fri for at bekymre sig om låsninger der går i hårdknude (på nørdsk: <text:span text:style-name="T1">deadlocks</text:span>), og det er umuligt at kalde objekter fra en forkert tråd.</text:p>
      <text:p text:style-name="Text_20_body">Biblioteket <text:span text:style-name="T13"><text:s/>lib/pils/english/compute/compute.pils </text:span><text:s/>tilbyder a simpel indpakning af brugen af en enkelt arbedstråd til parsning af filer eller lignende.</text:p>
      <text:h text:style-name="Heading_20_3" text:outline-level="3">Opretttelse af en arbejdstråd</text:h>
      <text:p text:style-name="Text_20_body"><text:tab/><text:span text:style-name="T13">:tråd</text:span> <text:span text:style-name="T1">udtryk</text:span></text:p>
      <text:p text:style-name="Text_20_body">Denne konstruktion kan kun bruges i hovedtråden. En arbejdstråd oprettes og startes, og <text:s/><text:span text:style-name="T13">[]</text:span> <text:s/>afleveres som resultat. Arbejdstråden tolker <text:span text:style-name="T1">udtryk</text:span>, bortkaster resultatet og afsluttes.</text:p>
      <text:p text:style-name="Text_20_body">Systemkald og brugergrænsefladeoperationer kan ikke udføres direkte fra arbejdstråde. Men en arbejdstråd kan låne hovedtråden ved at kalde en knude.</text:p>
      <text:h text:style-name="Heading_20_3" text:outline-level="3">Knudekald</text:h>
      <text:p text:style-name="Text_20_body">Den eneste form for synkronisering der findes i PILS er <text:span text:style-name="T1">knudekaldet</text:span><text:span text:style-name="T6">, dvs. kald af metoder på et objekt indpakket i en knude:</text:span></text:p>
      <text:p text:style-name="Text_20_body"><text:span text:style-name="T6"><text:tab/></text:span><text:span text:style-name="T9">(knude:</text:span><text:span text:style-name="T6"> </text:span><text:span text:style-name="T1">objekt</text:span><text:span text:style-name="T9">) </text:span><text:span text:style-name="T2">metode</text:span></text:p>
      <text:p text:style-name="P5">Knuden omdirigerer alle kald af objektet fra arbejdstråde til hovedtråden, som behandler dem når den ikke er optaget af andre opgaver. Den kaldende arbejdstråd blokeres indtil hovedtråden har udført kaldet.</text:p>
      <text:p text:style-name="P5">Der er ingen mulighed for at sætte en arbejdstråd i pausetilstand for at vække den senere.</text:p>
      <text:p text:style-name="P2">Når kaldet lykkes, fejler eller svipser, sættes arbejdstråden i en tilstand der afspeljer dette, og genstartes. Trådskiftet er generelt gennemsigtigt, men haleudfladning og samlebåndsoperationer på lister holdes inden for den enkelte tråd, og ansvarstagere, listebyggere og udgange fejler hvis man forsøger at bruge dem over trådgrænser.</text:p>
      <text:p text:style-name="Text_20_body">Generelt bør arbejdstråde udføre selvstændige beregninger det meste af tiden, og kun lejlighedsvis bruge knuder for at tilgå systemet, opdatere brugergrænsefladen og udveksle information.<text:span text:style-name="T6"> Hvis en arbejdstråd bliver hængende i et knudekald, vil PILS systemet være låst.</text:span></text:p>
      <text:p text:style-name="P5">I hovedtråden behandles knudekald som alle andre kald, uden nogen form for synkronisering.</text:p>
      <text:p text:style-name="P5">Det PILS modul der viser fejlmeldinger, er indlagt i en knude, så når en arbejdstråd udløser en fejlmelding, vil den blive vist i hovedtråden. Arbejdstråden kører videre efter at fejlmeldingen er udløst.</text:p>
      <text:h text:style-name="Heading_20_3" text:outline-level="3">Efternølere</text:h>
      <text:p text:style-name="P5">Under opbygning af brugerflader er det sommetider nødvendigt at sætte operationer i kø til senere udførelse, typisk efter at det vindue der er under konstruktion, er vist og opmålt.</text:p>
      <text:p text:style-name="P5"><text:tab/><text:span text:style-name="T13">:senere</text:span> <text:span text:style-name="T1">udtryk</text:span></text:p>
      <text:p text:style-name="P5"><text:span text:style-name="T1">udtryk </text:span>lægges i kø idet den aktuelle kontekst vedhæftes, og <text:s/><text:span text:style-name="T13">[]</text:span> <text:s/>afleveres straks som resultat. Når hovedtråden er ledig, tolkes <text:span text:style-name="T1">udtryk </text:span>i<text:span text:style-name="T1"> </text:span>den vedhæftede kontekst, og det hele bortkastes.</text:p>
      <text:p text:style-name="P5">Efternølere kan dannes både fra hovedtråden og arbejdstrådene; de udføres altid i hovedtråden.</text:p>
      <text:h text:style-name="Heading_20_1" text:outline-level="1">PILS programmer</text:h>
      <text:p text:style-name="P2">Et PILS program er en samling <text:span text:style-name="T1">moduler</text:span>,<text:span text:style-name="T1"> </text:span>indeholdt i en eller flere <text:span text:style-name="T1">biblioteksfiler</text:span>.<text:span text:style-name="T1"> </text:span>De moduler og biblioteker der er involveret i kørslen af et program, samles i en programstrop.</text:p>
      <text:p text:style-name="Text_20_body"><text:span text:style-name="T8">Programstropperne administreres af biblioteket <text:s/></text:span><text:span text:style-name="T13">pils/english/system/system.pils</text:span><text:span text:style-name="T8"> <text:s/>der ved opstart findes ud fra den eksekverbare fils mappe og dens omgivende mapper, hvorefter modulet <text:s/></text:span><text:span text:style-name="T9">[pils system boot]</text:span><text:span text:style-name="T8"> <text:s/>parses og kaldes.</text:span></text:p>
      <text:p text:style-name="P2">De moduler i systembiblioteket der administrerer programstropperne, bruger selv en forenklet form for referencer til hinanden. De bør ikke ændres hvis man ikke ved hvad man gør – hvis de går i kludder, trækker de PILS fejlmeldingssystemet med sig, og man må ty til primitive og besværlige metoder for at finde ud af hvad der går galt.</text:p>
      <text:h text:style-name="Heading_20_2" text:outline-level="2">Moduler</text:h>
      <text:p text:style-name="P2">De grundlæggende byggeklodser i PILS programmeringssystemet kaldes <text:span text:style-name="T1">moduler</text:span>. Generelt er et module et navngivet PILS udtryk, som typisk resulterer i et bundet regelsæt, som er det der ses udefra..</text:p>
      <text:p text:style-name="P2"><text:tab/><text:span text:style-name="T13">{ </text:span><text:span text:style-name="T1">... </text:span><text:span text:style-name="T13">| } </text:span><text:span text:style-name="T1">! synlige regler</text:span><text:line-break/><text:tab/><text:span text:style-name="T1">...</text:span><text:line-break/><text:tab/><text:span text:style-name="T13">===</text:span><text:line-break/><text:tab/><text:span text:style-name="T1">private definitioner</text:span></text:p>
      <text:p text:style-name="P2">I biblioteksfilerne lagres hvert modul sammen med et modulhoved der indeholder modulets navn og nogle attributter, hvoraf <text:s/><text:span text:style-name="T13">.tidsstempel</text:span> <text:s/>angiver hvornår modulet sidst <text:s/>blev redigeret, og <text:s/><text:span text:style-name="T13">.sprog</text:span> <text:s/>angiver et PILS sprogobjekt som bruges til parsning af modulets tekst.</text:p>
      <text:p text:style-name="P2">Modulerne er det der på nørdsk hedder <text:span text:style-name="T1">singletons</text:span>, på programbasis: når flere dokumenter er åbne samtidig, har de hver sin programstrop med egne eksemplarer af modulerne. Desuden dannes der ekstra eksemplarer som kan eksistere sideløbende med de gamle hvis modulerne redigeres mens de er i brug.</text:p>
      <text:h text:style-name="Heading_20_3" text:outline-level="3">Modulnavne og referencer</text:h>
      <text:p text:style-name="P2">Et modulnavn er en liste af PILS navne. PILS redigeringen præsenterer dem som et træ, idet fælles begyndelser slås sammen.</text:p>
      <text:p text:style-name="P2">Et modul kan ikke umiddelbart kalde sine egne metoder. Hvis en regel har brug for at kalde andre regler i det same regelsæt eller bundt, må det ske gennem binderne <text:s/><text:span text:style-name="T13">:hvem</text:span> <text:s/>eller <text:s/><text:span text:style-name="T13">:selv </text:span>.</text:p>
      <text:p text:style-name="P2">Moduler kan referere til hinanden ved hele modulnavnet:</text:p>
      <text:p text:style-name="Text_20_body"><text:tab/><text:span text:style-name="T9">@@ [spil bræt skak]</text:span><text:span text:style-name="T1"> <text:s text:c="3"/></text:span><text:span text:style-name="T8">refererer altid ti</text:span>l <text:s text:c="3"/><text:span text:style-name="T13">[</text:span><text:span text:style-name="T9">spil bræt skak]</text:span></text:p>
      <text:p text:style-name="P2">Eller ved relative navne. I et modul ved navn <text:s/><text:span text:style-name="T13">[spil bræt]</text:span> <text:s/>vil</text:p>
      <text:p text:style-name="P7"><text:tab/>@@ skak</text:p>
      <text:p text:style-name="Text_20_body"><text:span text:style-name="T8">referere til det første eksisterende af modulerne </text:span><text:span text:style-name="T9"><text:s/>[spil bræt skak] </text:span><text:span text:style-name="T8">, </text:span><text:span text:style-name="T9"><text:s/>[spil skak] <text:s/></text:span><text:span text:style-name="T8">eller <text:s/></text:span><text:span text:style-name="T9">[skak,] </text:span><text:span text:style-name="T8">, mens</text:span></text:p>
      <text:p text:style-name="P7"><text:tab/>@@ . [skak brikker]</text:p>
      <text:p text:style-name="Text_20_body"><text:span text:style-name="T8">tilsvarende refererer til </text:span><text:span text:style-name="T9"><text:s/>[spil bræt skak brikker] </text:span><text:span text:style-name="T8">, </text:span><text:span text:style-name="T9"><text:s/>[spil skak brikker] </text:span><text:span text:style-name="T8">eller <text:s/></text:span><text:span text:style-name="T9">[skak brikker]</text:span></text:p>
      <text:p text:style-name="P2">Absolutte modulreferencer håndteres af en funktionsregel <text:span text:style-name="T13"><text:s/>{@@: modulnavn|</text:span><text:span text:style-name="T1">...</text:span><text:span text:style-name="T13">}</text:span> <text:s/>mens<text:span text:style-name="T13"> </text:span>relative modulreferencer håndteres af et hjælpeobjekt ved navn <text:s/><text:span text:style-name="T13">@@</text:span> .</text:p>
      <text:p text:style-name="P2">Både absolutte og relative modulreferencer kan bruge beregnede modulnavne.</text:p>
      <text:p text:style-name="P2">Moduler bruges typisk via en metode hvis navn er sidste led i modulnavnet. Hjælpeobjektet <text:s/><text:span text:style-name="T13">@</text:span> <text:s/>gør at man slipper for at skrive navnet to gange:</text:p>
      <text:p text:style-name="P2"><text:tab/><text:span text:style-name="T13">@ bræt (</text:span><text:span text:style-name="T1">...</text:span><text:span text:style-name="T13">)</text:span> <text:s text:c="3"/>er det samme som <text:s text:c="3"/><text:span text:style-name="T13">@@ bræt bræt (</text:span><text:span text:style-name="T1">...</text:span><text:span text:style-name="T13">)</text:span></text:p>
      <text:p text:style-name="P2"><text:tab/><text:span text:style-name="T13">@ bræt</text:span> <text:s text:c="3"/>er det samme som <text:s text:c="3"/><text:span text:style-name="T13">@@ bræt bræt</text:span></text:p>
      <text:p text:style-name="P2">Længere referencer kan angives som her:</text:p>
      <text:p text:style-name="P2"><text:tab/><text:span text:style-name="T13">@ [bræt] dam (</text:span><text:span text:style-name="T1">...</text:span><text:span text:style-name="T13">)</text:span> <text:s text:c="3"/>er det samme som <text:s text:c="3"/><text:span text:style-name="T13">@@ . [bræt dam] dam (</text:span><text:span text:style-name="T1">...</text:span><text:span text:style-name="T13">)</text:span></text:p>
      <text:p text:style-name="P2"><text:tab/><text:span text:style-name="T13">@ [spil bræt] dam (</text:span><text:span text:style-name="T1">...</text:span><text:span text:style-name="T13">)</text:span> <text:s text:c="3"/>er det samme som <text:s text:c="3"/><text:span text:style-name="T13">@@ . [spil bræt dam] dam (</text:span><text:span text:style-name="T1">...</text:span><text:span text:style-name="T13">)</text:span></text:p>
      <text:h text:style-name="Heading_20_3" text:outline-level="3">Fælles funktionalitet i === -moduler</text:h>
      <text:p text:style-name="Text_20_body">Funktionalitet som er almindeligt brugt i en applikation, kan defineres som regler i et modul hvis sidste navneled er <text:s/><text:span text:style-name="T13">===</text:span><text:span text:style-name="T9"> </text:span><text:span text:style-name="T14">. Reglerne kan bruges direkte fra alle andre moduler i den pågældende gren af modultræet.</text:span></text:p>
      <text:p text:style-name="Text_20_body"><text:span text:style-name="T14">Systembiblioteket <text:s/></text:span><text:span text:style-name="T13">system.pils</text:span><text:span text:style-name="T14"> <text:s/>indeholder et modul <text:s/></text:span><text:span text:style-name="T13">[===,]</text:span><text:span text:style-name="T14"> <text:s/>med funktionalitet der kan bruges fra alle PILS moduler.</text:span></text:p>
      <text:h text:style-name="Heading_20_3" text:outline-level="3">Modulreferencer og ændringer i kørende programmer</text:h>
      <text:p text:style-name="Text_20_body">Modulreferencer er som udgangspunkt dynamiske: hvis et modul ændres mens det er i brug, vil referencer til modulet herefter resultere i en instans af den nyeste version.</text:p>
      <text:p text:style-name="Text_20_body">Modulreferencer der er udført før rettelsen blev gemt, vil fortsat referere til den gamle version.</text:p>
      <text:p text:style-name="Text_20_body">Denne forskel er væsentlig når man eksperimenterer med ændringer i en kørende applikation: den funktionalitet der tilgås gennem dynamiske modulreferencer, ændres øjeblikkelig når modulerne redigeres, mens funktionalitet der ligger i objekter som blev oprettet ved applikationens start, kræver en genstart hvis en ændret udgave skal testes.</text:p>
      <text:p text:style-name="Text_20_body">Fremgangsmåden med genstart for hver ændring er stadig almindeligt udbredt når der arbejdes med kompilerede sprog, men der er i almindelighed ingen grund til at gøre det i PILS.</text:p>
      <text:h text:style-name="Heading_20_3" text:outline-level="3">Instantiering af moduler</text:h>
      <text:p text:style-name="P2">Første gang et modul refereres i et kørende program, vil programmeringssystem instantiere det ved at parse og tolke udtrykket. Instansen huskes i programstroppen og vil blive genbrugt næste gang modulet refereres, hvis det ikke er redigeret i mellemtiden.</text:p>
      <text:p text:style-name="P2">Når flere PILS programmer kører, har de hver deres egen programstrop og adskilt instantiering.</text:p>
      <text:p text:style-name="P2">Når et modul ændres ved redigering, fjernes det fra instanshukommelsen i alle berørte programstropper, sammen med eventuelle andre modulinstanser som refererede modulet under instantiering. De gamle instanser er stadig brugbare, men nye referencer vil oprette nye instanser.</text:p>
      <text:h text:style-name="Heading_20_3" text:outline-level="3">Datafiler og dataafhængige moduler</text:h>
      <text:p text:style-name="Text_20_body">Hvis et modul under instantiering bruger data fra tekstfiler, XML-filer, regneark eller lignende, kan det være nødvendigt at geninstantiere modulet når filerne er ændrede, for at afspejle de ændrede data i PILS programmet. Det understøttes med funktionerne</text:p>
      <text:p text:style-name="Text_20_body"><text:tab/><text:span text:style-name="T13">datafil</text:span> <text:span text:style-name="T9">(</text:span><text:span text:style-name="T1">filnavn</text:span><text:span text:style-name="T9">)</text:span></text:p>
      <text:p text:style-name="Text_20_body">som opretter et filobjekt og desuden registrerer modulets afhængighed af den tidsstemplede fil hvis det sker under instantiering af modulet, og</text:p>
      <text:p text:style-name="Text_20_body"><text:tab/><text:span text:style-name="T13">datafiltjek</text:span></text:p>
      <text:p text:style-name="Text_20_body">som tjekker tidsstemplerne på samtlige datafiler der er registreret i programmet, og fjerner de modulinstanser fra instanshukommelsen der afhænger af filer hvis tidsstempel er ændret.</text:p>
      <text:h text:style-name="Heading_20_3" text:outline-level="3">Modul- og programattributter via »dette«</text:h>
      <text:p text:style-name="Text_20_body">Navnet <text:s/><text:span text:style-name="T13">dette <text:s/></text:span><text:span text:style-name="T14">kan bruges til udtræk af forskellige</text:span><text:span text:style-name="T8"> egenskaber ved det aktuelle modul eller program.</text:span></text:p>
      <text:p text:style-name="Text_20_body"><text:span text:style-name="T8"><text:tab/></text:span><text:span text:style-name="T9">dette program filnavn<text:line-break/><text:tab/>dette program sti<text:line-break/><text:tab/>dette program sprog</text:span></text:p>
      <text:p text:style-name="P2">henter filnavn, sti og sprog af det program der har instantieret modulet, mens</text:p>
      <text:p text:style-name="Text_20_body"><text:span text:style-name="T8"><text:tab/></text:span><text:span text:style-name="T9">dette modul navn<text:line-break/></text:span><text:span text:style-name="T8"><text:tab/></text:span><text:span text:style-name="T9">dette modul tekst<text:line-break/></text:span><text:span text:style-name="T8"><text:tab/></text:span><text:span text:style-name="T9">dette modul udtryk<text:line-break/></text:span><text:span text:style-name="T8"><text:tab/></text:span><text:span text:style-name="T9">dette modul sprog<text:line-break/></text:span><text:span text:style-name="T8"><text:tab/></text:span><text:span text:style-name="T9">dette modul bibliotek</text:span></text:p>
      <text:p text:style-name="P2">henter modulets attributter.</text:p>
      <text:p text:style-name="Text_20_body"><text:span text:style-name="T8">Fejlfinderen er afhængig af denne konvention, navnet <text:s/></text:span><text:span text:style-name="T9">dette</text:span><text:span text:style-name="T8"> <text:s/>(engelsk: <text:s/></text:span><text:span text:style-name="T9">this</text:span><text:span text:style-name="T8"> ) bør ikke bruges til andre formål.</text:span></text:p>
      <text:h text:style-name="Heading_20_3" text:outline-level="3">Sprogmoduler</text:h>
      <text:p text:style-name="Text_20_body"><text:span text:style-name="T8">Hvert modul har en tilknyttet sprogattribut som angiver et </text:span><text:span text:style-name="T2">sprognavn</text:span><text:span text:style-name="T8">, som kan bestå af flere led.</text:span></text:p>
      <text:p text:style-name="Text_20_body"><text:span text:style-name="T8">Modulets sprog findes ved at <text:s/></text:span><text:span text:style-name="T9">[pils sprog] <text:s/></text:span><text:span text:style-name="T8">sættes foran sprognavnet, og dette opfattes som en relativ modulreference, svarende til udtrykket</text:span></text:p>
      <text:p text:style-name="Text_20_body"><text:span text:style-name="T8"><text:tab/></text:span><text:span text:style-name="T9">@@ . ([pils sprog] &amp; </text:span><text:span text:style-name="T2">sprognavn</text:span><text:span text:style-name="T9">)</text:span></text:p>
      <text:p text:style-name="Text_20_body"><text:span text:style-name="T8">For at processen ikke skal gå i ring, henviser sprognavnet <text:s/></text:span><text:span text:style-name="T9">[system]</text:span><text:span text:style-name="T8"> <text:s/>altid det sprogobjekt der blev brugt til opstart af PILS.</text:span></text:p>
      <text:p text:style-name="Text_20_body"><text:span text:style-name="T8">Typisk er sprogmoduler PILS sprogobjekter, eventuelt med nationale oversættelser af de ord der bruges i PILS systemet, eller med program- eller biblioteksspecifike ordvalgspræfixer som <text:s/></text:span><text:span text:style-name="T9">j: <text:s/></text:span><text:span text:style-name="T8">der bruges i bindingerne til <text:s/></text:span><text:span text:style-name="T9">juce</text:span><text:span text:style-name="T4"> </text:span><text:span text:style-name="T2">-</text:span><text:span text:style-name="T8">biblioteket, eller eller til håndtering af <text:s/>XML-baserede formater såsom OpenOffice dokumenter.</text:span></text:p>
      <text:p text:style-name="Text_20_body"><text:span text:style-name="T8">Alternativt kan man definere sin egen parser i et sprogmodul. Et simpelt eksempel er sproget <text:s/></text:span><text:span text:style-name="T9">tekst</text:span><text:span text:style-name="T8"> , der afleverer modulteksten uden at parse den, hvilket er nyttigt hvis man vil gemme tekstdata i PILS biblioteker.</text:span></text:p>
      <text:p text:style-name="P2">PILS redigeringen stiller de relevante sprogmoduler til rådighed i menuen.</text:p>
      <text:h text:style-name="Heading_20_2" text:outline-level="2">Biblioteker</text:h>
      <text:p text:style-name="P2">Et bibliotek er en fil der indeholder moduler og eventuelt references til andre biblioteker. Når et bibliotek indlæses, indlæses de biblioteker det refererer til også, hvis det ikke allerede er sket.</text:p>
      <text:p text:style-name="P2">Et PILS program er et bibliotek der bruges som applikation.</text:p>
      <text:h text:style-name="Heading_20_2" text:outline-level="2">Programstropper</text:h>
      <text:p text:style-name="P2">Når brugeren åbner et program, indlæses det sammen med de biblioteker det bruger. Alle bibliotekerne sammenflettes så i et programbibliotek der indeholder alle moduler fra alle bibliotekerne.</text:p>
      <text:p text:style-name="P2">Et programbilioteks levetid styres af programstroppen, som hægtes på alle de hovedvinduer der oprettes fra programmet. Programmet frigives når det sidste af dets vinduer nedlægges.</text:p>
      <text:p text:style-name="P2">Når et bibliotek bruges som en del af et programbibliotek, rettes dets modulreferencer mod hele programbibliokteket.</text:p>
      <text:p text:style-name="P2">Fire biblioteker – <text:span text:style-name="T1">systembiblioteket</text:span>, <text:span text:style-name="T1">redigeringen</text:span>, <text:s/><text:span text:style-name="T1">platformsbiblioteket</text:span> og et <text:span text:style-name="T1">brugerkonfigurationsbibliotek</text:span> – skal være indlæst for at PILS systemet fungerer. Systembiblioteket, redigeringen og platformsbiblioteket findes ud fra relative stier fra den eksekverbare fil, mens brugerkonfigurationsbiblioteket vælges ved opstart, ud fra computerens sprogindstillinger.</text:p>
      <text:p text:style-name="P2">Hvis din computer er sat til dansk sprog, vil konfigurations- og sprogfilerne for dansk blive indlæst hvis de eksisterer, og <text:s/><text:span text:style-name="T13">sig</text:span> -funktionen – der bør bruges til alle meddelelser og navne i brugergrænsefladen af PILS programmerne – vil så bruge dette sprog og forsøge at præsentere meddelelser på noget der ligner dansk.</text:p>
      <text:p text:style-name="P2">Indtil videre er kun dansk og engelsk understøttet.</text:p>
      <text:h text:style-name="Heading_20_2" text:outline-level="2">Kommandolinjer og programinstanstjek</text:h>
      <text:p text:style-name="Text_20_body">Ved opstart forsøger PILS fortolkeren at kontakte en eventuelt allerede kørende instans og videregive kommandolinjen til denne. Kun hvis det ikke lykkes, starter fortolkeren i en ny instans.</text:p>
      <text:p text:style-name="Text_20_body">Det første fortolkeren gør er at danner PILS et objekt der skal kunne behandle kommandolinjerne. Dette objekt defineres af modulet <text:s/><text:span text:style-name="T13">[pils system start]</text:span> <text:s/>i baduljeflikkeren.</text:p>
      <text:p text:style-name="Text_20_body">Dette kompliceres en smule af at baduljerne oprettes og nedlægges løbende, så kanalen <text:s/><text:span text:style-name="T13">[kanal: pils: kommandolinje]</text:span> <text:s/>bruges til at sende forespørgsler til en aktiv badulje med en passende instans af modulet <text:s/><text:span text:style-name="T13">[pils system start]</text:span><text:span text:style-name="T14"> .</text:span></text:p>
      <text:p text:style-name="Text_20_body"><text:span text:style-name="T14">MS Windows-installationspakken definerer operationerne </text:span><text:span text:style-name="T2">open </text:span><text:span text:style-name="T14">og </text:span><text:span text:style-name="T2">edit </text:span><text:span text:style-name="T8">for PILS filtypen i registreringsdatabasen; de kendes fra hinanden ved at </text:span><text:span text:style-name="T2">edit</text:span><text:span text:style-name="T8">-kommandoen har <text:s/></text:span><text:span text:style-name="T9">-edit</text:span><text:span text:style-name="T8"> <text:s/>indskudt i kommandolinjen. Dette opfattes af en regel i <text:s/></text:span><text:span text:style-name="T9">[pils system start]</text:span><text:span text:style-name="T8"> <text:s/>og bevirker at redigeringen åbnes, uanset om der er defineret en anden handling i <text:s/></text:span><text:span text:style-name="T9">[pils kør start] </text:span><text:span text:style-name="T8">.</text:span></text:p>
      <text:h text:style-name="Heading_20_1" text:outline-level="1">PILS redigering</text:h>
      <text:p text:style-name="P2">PILS programmer er oprettes, redigeres og testes med <text:span text:style-name="T1">PILS redigering</text:span> – en simple tekstredigering med faneblade for de enkelte moduler og faciliteter til søgning og navigation i PILS bibliotekerne samt kald af testfunktioner.</text:p>
      <text:p text:style-name="P2">Et PILS redigeringsvindue begrænser sig altid til et enkelt bibliotek. Hvis flere bibliotekern skal åbnes for redigering, bruges flere vinduer i hver sin badulje.</text:p>
      <text:p text:style-name="P2">Redigeringen findes i PILS biblioteket <text:s/><text:span text:style-name="T13">editor.pils</text:span> <text:s/>og kører i baduljen for det bibliotek der redigeres. Bibliotekerne kan ændre redigeringens opførsel ved at overskrive dens moduler.</text:p>
      <text:p text:style-name="P2">Når et modul gemmes, fjernes de moduler fra instanshukommelserne der direkte eller indirekte refererede modulet under instantiering..</text:p>
      <text:p text:style-name="P13"><text:span text:style-name="T13">Bemærk:</text:span> ændring af redigeringens moduler bør udføres med forsigtighed. Hvis et ødelagt redigeringsmodul gør at redigeringen ikke virker, kan redigeringen jo ikke bruges til at reparere skaden med, og man er henvist til enten at bruge en anden tekstredigering til reparation af fejlen, eller genetablere en tidligere udgave af PILS redigeringen.</text:p>
      <text:h text:style-name="Heading_20_2" text:outline-level="2">Oprettelse af et PILS program</text:h>
      <text:p text:style-name="Text_20_body">Opret en tom fil med type <text:s/><text:span text:style-name="T13">.pils</text:span> , åbn den og vælg det sprog du vil bruge.</text:p>
      <text:p text:style-name="Text_20_body">Filen</text:p>
      <text:p text:style-name="Text_20_body"><text:s/><text:tab/><text:span text:style-name="T13">lib/pils/</text:span><text:span text:style-name="T2">sprog</text:span><text:span text:style-name="T13">/pils/ny.pils</text:span></text:p>
      <text:p text:style-name="Text_20_body">bliver så kopieret oven i den tomme fil og åbnet.</text:p>
      <text:p text:style-name="Text_20_body">Det sprog du vælger, bliver programmets sprog. Det bruges til at gemme og vise modulnavnene og vil blive valgt som sprog når du opretter ny moduler. Du kan skifte filsproget senere.</text:p>
      <text:p text:style-name="Text_20_body"><text:span text:style-name="T4">Bemærk:</text:span><text:span text:style-name="T1"> Brugergrænsefladens sprog styres af computerens sprogindstilling, ikke af programmets sprog. Hvis du skriver dine programmer med engelske indstillinger og kører dem på et system med danske sprogindstillinger, eller omvendt, vil PILS forsøget at oversætte brugerfladen.</text:span></text:p>
      <text:h text:style-name="Heading_20_2" text:outline-level="2">Åbning af et eksisterende program</text:h>
      <text:p text:style-name="Text_20_body">Ved dobbeltklik på en PILS fil kaldes funktionen <text:s/><text:span text:style-name="T13">åbn <text:s/></text:span><text:span text:style-name="T14">i modulet <text:s/></text:span><text:span text:style-name="T13">[pils kør kommando åbn]</text:span><text:span text:style-name="T14"> . Hvis modulet ikke er overskrevet, vil det åbne filen for redigering.</text:span></text:p>
      <text:p text:style-name="Text_20_body">Kommandoen <text:s/><text:span text:style-name="T1">Rediger <text:s/></text:span><text:span text:style-name="T6">kalder tilsvarende f</text:span>unktionen <text:s/><text:span text:style-name="T13">rediger <text:s/></text:span><text:span text:style-name="T14">i modulet <text:s/></text:span><text:span text:style-name="T13">[pils kør kommando rediger]</text:span><text:span text:style-name="T14"> , der ligeledes åbner filen for redigering.</text:span></text:p>
      <text:p text:style-name="Text_20_body"><text:span text:style-name="T14">Under opbygning af et PILS program vil man typisk starte programmet ved at åbne redigeringen og køre en testfunktion. Når programmet skal afpudses og eventuelt offentliggøres, kan man så oprette et modul <text:s/></text:span><text:span text:style-name="T13">[pils kør kommando åbn] <text:s/></text:span><text:span text:style-name="T14">og definere en regel:</text:span></text:p>
      <text:p text:style-name="P10"><text:tab/>{ .åbn | <text:span text:style-name="T2">.</text:span><text:span text:style-name="T1">..</text:span> }</text:p>
      <text:p text:style-name="Text_20_body"><text:span text:style-name="T14">Redigeringen kan stadig åbnes med </text:span><text:span text:style-name="T2">Rediger</text:span><text:span text:style-name="T8">-kommandoen.</text:span></text:p>
      <text:p text:style-name="Text_20_body"><text:span text:style-name="T14">På kommandolinjen bruges det engelske ord <text:s/></text:span><text:span text:style-name="T13">-edit</text:span><text:span text:style-name="T14"> <text:s/>(med bindestreg foran) til at differentiere </text:span><text:span text:style-name="T2">Rediger-</text:span><text:span text:style-name="T8">kommandoen fra <text:s/></text:span><text:span text:style-name="T2">Åbn</text:span><text:span text:style-name="T8">, som er standardkommandoen.</text:span></text:p>
      <text:h text:style-name="Heading_20_2" text:outline-level="2">Redigering af moduler</text:h>
      <text:p text:style-name="P1">Når du åbner redigeringen, vil det sidst ændrede modul i biblioteksfilen blive vist i et faneblad.</text:p>
      <text:h text:style-name="Heading_20_3" text:outline-level="3">Simple redigeringsoperationer</text:h>
      <text:p text:style-name="Text_20_body">Redigeringen som sådan er simpel – de sædvanlige tastaturgenveje kan bruges:</text:p>
      <text:p text:style-name="Text_20_body"><text:tab/><text:span text:style-name="T13">Ctrl-C</text:span> <text:s text:c="3"/>kopiér</text:p>
      <text:p text:style-name="Text_20_body"><text:tab/><text:span text:style-name="T13">Ctrl-X</text:span> <text:s text:c="3"/>klip</text:p>
      <text:p text:style-name="Text_20_body"><text:tab/><text:span text:style-name="T13">Ctrl-V</text:span> <text:s text:c="3"/>indsæt</text:p>
      <text:p text:style-name="Text_20_body"><text:tab/><text:span text:style-name="T13">Ctrl-Z</text:span> <text:s text:c="3"/>fortryd</text:p>
      <text:p text:style-name="Text_20_body"><text:tab/><text:span text:style-name="T13">Ctrl-Y</text:span> <text:s text:c="3"/>gendan</text:p>
      <text:p text:style-name="Text_20_body"><text:tab/><text:span text:style-name="T13">Ctrl-S</text:span> <text:s text:c="3"/>gem</text:p>
      <text:p text:style-name="Text_20_body">Der gemmes altid til filen med det samme. Du kan ikke teste et modul uden at gemme det.</text:p>
      <text:p text:style-name="Text_20_body">Forsøg på at gemme moduler med syntaksfejl afvises, og og fejlen markeres i teksten.</text:p>
      <text:p text:style-name="P13"><text:span text:style-name="T13">Tip:</text:span> Hvis du vil gemme et modul med syntaksfejl, så sæt sproget til <text:s/><text:span text:style-name="T13">tekst</text:span>  som beskrevet herunder.</text:p>
      <text:h text:style-name="Heading_20_3" text:outline-level="3">Navigering i modultræet</text:h>
      <text:p text:style-name="Text_20_body"><text:span text:style-name="T13"><text:tab/>Ctrl-M</text:span> <text:s text:c="3"/>viser programmets moduler som et træ.</text:p>
      <text:p text:style-name="Text_20_body"><text:span text:style-name="T14">Et modul åbnes ved at aktivere flasken i træet med dobbeltklik eller </text:span><text:span text:style-name="T13">Enter </text:span><text:span text:style-name="T14">-tasten. Brug <text:s/></text:span><text:span text:style-name="T13">Esc</text:span><text:span text:style-name="T14"> -tasten til at lukke træet.</text:span></text:p>
      <text:h text:style-name="Heading_20_3" text:outline-level="3">Oprettelse, flytning og sletning af moduler</text:h>
      <text:p text:style-name="P1">Undermoduler kan oprettes med:</text:p>
      <text:p text:style-name="Text_20_body"><text:span text:style-name="T13"><text:tab/>Ctrl-N</text:span> <text:s text:c="3"/>opretter et undermodul til det aktuelle modul.</text:p>
      <text:p text:style-name="Text_20_body">Moduler i roden kan oprettes ved at oprette et undermodul til et eksisterende modul og flytte det ned ved at bruge Modul-menuen:</text:p>
      <text:p text:style-name="Text_20_body"><text:tab/><text:span text:style-name="T13">Modul-&gt;flyt-&gt;ned</text:span><text:span text:style-name="T1"> <text:s text:c="3"/></text:span><text:span text:style-name="T6">flytter modulet med undermodules mod roden</text:span></text:p>
      <text:p text:style-name="Text_20_body"><text:tab/><text:span text:style-name="T13">Modul-&gt;flyt-&gt;op-&gt;</text:span><text:span text:style-name="T1">nabo <text:s text:c="3"/></text:span><text:span text:style-name="T6">flytter modulet med undermodules op under </text:span><text:span text:style-name="T1">nabomodul</text:span></text:p>
      <text:p text:style-name="Text_20_body"><text:span text:style-name="T13"><text:tab/>Ctrl-K</text:span> <text:s text:c="3"/>kopierer modulet med undermoduler til et andet navn.</text:p>
      <text:p text:style-name="Text_20_body"><text:span text:style-name="T13"><text:tab/>Ctrl-R</text:span> <text:s text:c="3"/>omdøber modulet og undermodulerne.</text:p>
      <text:p text:style-name="P5"><text:span text:style-name="T14"><text:tab/></text:span><text:span text:style-name="T13">Modul-&gt;slet <text:s text:c="3"/></text:span><text:span text:style-name="T14">nedlægger modulet hvis det er tomt og ikke har undermodules.</text:span></text:p>
      <text:p text:style-name="P5"><text:span text:style-name="T14"><text:tab/></text:span><text:span text:style-name="T13">Modul-&gt;flyt-&gt;bibliotek-&gt;</text:span><text:span text:style-name="T2">bibliotek</text:span><text:span text:style-name="T14"> <text:s text:c="3"/>flytter til et andet bibliotek, med undermoduler.</text:span></text:p>
      <text:p text:style-name="P14">Tip: <text:span text:style-name="T14">Det er med vilje gjort lidt besværligt at nedlægge moduler, så man ikke mister kode hvis man rammer en forkert tast. Hvis du skal slette mange moduler som led i en oprydning, så opret et bibliotek og brug det som skraldespand: indstil dit bibliotek til at bruge skraldespanden, flyt så de uønskede moduler derover, fjern skraldespanden fra brugslisten og slet den.</text:span></text:p>
      <text:h text:style-name="Heading_20_3" text:outline-level="3">Ændring af sprog for et enkelt modul</text:h>
      <text:p text:style-name="Text_20_body">Vælg det ønskede sprog fra <text:s/><text:span text:style-name="T13">Sprog</text:span> -menuen, og gem modulet med <text:s/><text:span text:style-name="T13">Ctrl-S </text:span>.</text:p>
      <text:p text:style-name="Text_20_body">Menupunktet <text:span text:style-name="T13">system</text:span><text:span text:style-name="T14"> <text:s/>refererer altid til det sprogobjekt der bruges til opstart af PILS. De andre punkter refererer til sprogmoduler.</text:span></text:p>
      <text:p text:style-name="P1">Et sprog kan tilføjes til menuen ved at oprette et modul</text:p>
      <text:p text:style-name="Text_20_body"><text:span text:style-name="T14"><text:tab/></text:span><text:span text:style-name="T13">pils sprog </text:span><text:span text:style-name="T2">navn</text:span></text:p>
      <text:p text:style-name="P5"><text:span text:style-name="T14">og skrive et sprogobjekt eller et udtryk der giver et sprogobjekt eller et objekt med en <text:s/></text:span><text:span text:style-name="T13">læs -</text:span><text:span text:style-name="T14">metode, som sprogene <text:s/></text:span><text:span text:style-name="T13">tekst <text:s/></text:span><text:span text:style-name="T14">og <text:s/></text:span><text:span text:style-name="T13">tekstliste</text:span><text:span text:style-name="T14"> <text:s/>der defineres af moduler i redigeringsbiblioteket – <text:s/></text:span><text:span text:style-name="T13">tekst <text:s/></text:span><text:span text:style-name="T14">giver simpelthen modulteksten, mens <text:s/></text:span><text:span text:style-name="T13">tekstliste</text:span><text:span text:style-name="T14"> <text:s/>opdeler den i linjer.</text:span></text:p>
      <text:p text:style-name="P2">Sprogmoduler kan sættes på en gren i modultræet:</text:p>
      <text:p text:style-name="P5"><text:span text:style-name="T14"><text:tab/></text:span><text:span text:style-name="T13">job </text:span><text:span text:style-name="T2">j </text:span><text:span text:style-name="T13">pils sprog </text:span><text:span text:style-name="T2">mit-sprog</text:span></text:p>
      <text:p text:style-name="P5"><text:span text:style-name="T14">definerer et sprog der kun kan bruges i moduler hvis navn begynder med <text:s/></text:span><text:span text:style-name="T13">job </text:span><text:span text:style-name="T2">j </text:span><text:span text:style-name="T14">. Hvis et moduls sprog er sat til et sprog der er specifik for en gren af modultræet, bør modulet ikke flyttes uden for grenen, da det vil gøre sprogindstillingen ugyldig.</text:span></text:p>
      <text:p text:style-name="P5"><text:span text:style-name="T2">juce</text:span><text:span text:style-name="T14"> bindingsbiblioteket – der pakker <text:s/>juce</text:span><text:span text:style-name="T2">-</text:span><text:span text:style-name="T14">bindingerne ind – bruger et sådant specifikt sprog som knytter præfixet <text:s/></text:span><text:span text:style-name="T13">j:</text:span><text:span text:style-name="T14"> <text:s/>til den ordklasse der bruges til klasser og metoder i juce.</text:span></text:p>
      <text:h text:style-name="Heading_20_3" text:outline-level="3">Ændring af programsproget</text:h>
      <text:p text:style-name="Text_20_body">Programmets sprogindstilling kan ændres hvis man ikke er tilfreds med det oprindeligt valgte sprog. Først skal et passende sprogbibliotek tilføjes til listen af brugte biblioteker:</text:p>
      <text:p text:style-name="Text_20_body"><text:tab/><text:span text:style-name="T13">&lt;lib&gt;/</text:span><text:span text:style-name="T2">sprog</text:span><text:span text:style-name="T13">/pils/</text:span><text:span text:style-name="T2">sprog</text:span></text:p>
      <text:p text:style-name="Text_20_body"><text:span text:style-name="T14">Derefter bruges menupunktet <text:s/></text:span><text:span text:style-name="T13">Fil-&gt;indstillingerne-&gt;sprog-&gt;</text:span><text:span text:style-name="T14"> </text:span><text:span text:style-name="T2">sprog <text:s/></text:span><text:span text:style-name="T8">til at sætte programmets sprog.</text:span></text:p>
      <text:p text:style-name="P2">Dette udløser en rekonstruktion af redigeringsvinduet for at sikre at modulnavne vises korrekt.</text:p>
      <text:p text:style-name="P2">Ændring af programmets sprog påvirker ikke sprogvalget for moduler der allerede er oprettet.</text:p>
      <text:h text:style-name="Heading_20_2" text:outline-level="2">Brug af PILS biblioteker</text:h>
      <text:p text:style-name="P2">Et program eller bibliotek kan indstilles til at bruge andre PILS bibliotekerne med menupunktet</text:p>
      <text:p text:style-name="P2"><text:tab/><text:span text:style-name="T13">Bibliotekerne-&gt;brug</text:span></text:p>
      <text:p text:style-name="P2">Biblioteker kan indsættes i og fjernes fra listen med <text:s/><text:span text:style-name="T13">Insert</text:span> <text:s/>og <text:s/><text:span text:style-name="T13">Delete</text:span> -tasterne. <text:span text:style-name="T13">Insert </text:span>-tasten<text:span text:style-name="T13"> <text:s/></text:span>åbner en filvalgsdialog, og det valgte filnavn forkortes idet filtypen <text:s/><text:span text:style-name="T13">.pils </text:span><text:s/>udelades og begyndelsen af filstien erstattes af et af de følgende indledninger hvis muligt:</text:p>
      <text:p text:style-name="P2"><text:tab/><text:span text:style-name="T13">&lt;lib&gt;/</text:span> <text:s text:c="3"/>– mappen <text:s/><text:span text:style-name="T13">lib/pils/</text:span> <text:s/>i PILS installationen</text:p>
      <text:p text:style-name="P2"><text:tab/><text:span text:style-name="T13">&lt;doc&gt;/</text:span> <text:s text:c="3"/>– brugerens dokumentmappe</text:p>
      <text:p text:style-name="P2"><text:tab/><text:span text:style-name="T13">&lt;.&gt;/</text:span> <text:s text:c="3"/>– det nærværende biblioteks mappe</text:p>
      <text:p text:style-name="P2"><text:tab/><text:span text:style-name="T13">&lt;..&gt;/</text:span> <text:s text:c="3"/>– den mappe der omgiver det <text:s/>nærværende biblioteks mappe</text:p>
      <text:p text:style-name="P2">Denne omskrivning bidrager til at opretholde referencerne når PILS programmer flyttes.</text:p>
      <text:h text:style-name="Heading_20_3" text:outline-level="3">Søgning på tværs af biblioteker</text:h>
      <text:p text:style-name="Text_20_body">Hvis du arbejder med mange biblioteker, vil du lejlighedsvis få brug for at søge på tværs af biblioktekerne for at finde en stump kode du har glemt hvor er.</text:p>
      <text:p text:style-name="Text_20_body"><text:tab/><text:span text:style-name="T13">Ctrl-D <text:s text:c="3"/></text:span></text:p>
      <text:p text:style-name="Text_20_body"><text:span text:style-name="T14">Åbner et detektivpanel med to søgestriber – en høj og en lav – og et modultræ. Ud over de velkendte <text:s/></text:span><text:span text:style-name="T2">Kun hele ord <text:s/></text:span><text:span text:style-name="T8">og </text:span><text:span text:style-name="T2"><text:s/>Forskel på store og små bogstaver</text:span><text:span text:style-name="T8"> understøtter detektivpanelet en </text:span><text:span text:style-name="T2">Strukturel </text:span><text:span text:style-name="T8">søgemåde, som læser søgeteksten som et PILS udtryk og bruger den som en pasform Det gør det muligt at søge efter konstruktioner af en bestemt form, uden hensyn til hvordan de er skrevet.</text:span></text:p>
      <text:p text:style-name="P2">Mens søgeteksten skrives eller redigeres, opdateres modultræet løbende, idet alle moduler med træffere samt vejene ud til dem markeres.</text:p>
      <text:p text:style-name="P2">Når et modul med træffere vælges i træet, vises en liste med linjenumre for træfferne. Når linjenumrene markeres, markeres træfferne automatisk i redigeringsvinduer for de respektive biblioteker.</text:p>
      <text:h text:style-name="Heading_20_3" text:outline-level="3">Om biblioteksfilernes opbygning</text:h>
      <text:p text:style-name="Text_20_body"><text:span text:style-name="T14">Bibliotekerne har filtypen <text:s/></text:span><text:span text:style-name="T13">.pils</text:span><text:span text:style-name="T14"> <text:s/>og er utf-8 tekstfiler med CR+LF (DOS/Windows-konventionen) som linjeskift. Om nødvendigt kan de redigeres </text:span><text:span text:style-name="T15">med</text:span><text:span text:style-name="T14"> MS Windows Notepad eller lignende. Programstrophåndteringen ignorerer de ekstra bytes (BOM) som Windows-applicationer som Notepad indskyder forrest i utf-8-filer.)</text:span></text:p>
      <text:p text:style-name="P5">Et PILS program eller bibliotek består af et eventuelt <text:span text:style-name="T1">program-hoved </text:span>og en række moduler, adskilt af markører:</text:p>
      <text:p text:style-name="P5"><text:tab/> <text:span text:style-name="T2">bibliotekshoved</text:span><text:span text:style-name="T13">&gt;&lt;:</text:span><text:span text:style-name="T2">modulhoved</text:span><text:span text:style-name="T13">&gt;&lt;;</text:span><text:span text:style-name="T2">modultekst</text:span><text:span text:style-name="T13">&gt;&lt;:</text:span><text:span text:style-name="T2">modulhoved</text:span><text:span text:style-name="T13">&gt;&lt;;</text:span><text:span text:style-name="T2">modultekst </text:span><text:span text:style-name="T14">...</text:span></text:p>
      <text:p text:style-name="P5"><text:span text:style-name="T14">idet enhver anden forekomst af <text:s/></text:span><text:span text:style-name="T13">&gt;&lt;</text:span><text:span text:style-name="T14"> <text:s/>kodes som <text:s/></text:span><text:span text:style-name="T13">&gt;&lt;.</text:span><text:span text:style-name="T14"> <text:s/>(med tilføjet punktum) for at undgå forveksling med markørerne. Deres orden har ingen betydning, men de sorteres ved rå sammenligninger af modulhovederne udskrevet som tekst, hvilket er bekvemt hvis der arbejdes med rå tekstredigering eller versionsstyringssystemer.</text:span></text:p>
      <text:p text:style-name="P5">Modulerne består af et <text:span text:style-name="T1">modulhoved </text:span>og en tekst. M<text:span text:style-name="T14">odulhovedet er en nodekonstant <text:s/></text:span><text:span text:style-name="T13">[modul: . <text:s/></text:span><text:span text:style-name="T2">...</text:span><text:span text:style-name="T13">] <text:s/></text:span><text:span text:style-name="T14">skrevet i programfilens sprog med modulnavnet i forbenet og derudover ben for modulets attributter, som <text:s/></text:span><text:span text:style-name="T13">sprog</text:span><text:span text:style-name="T14"> <text:s/>og <text:s/></text:span><text:span text:style-name="T13">tidsstempel</text:span><text:span text:style-name="T14"> . Modulnavnet er en liste af 1 eller flere PILS navne.</text:span></text:p>
      <text:p text:style-name="P2"><text:span text:style-name="T1">Bibliotekshovedet</text:span> indeholder generel information om filen og skrives på engelsk. Et eventuelt <text:s/><text:span text:style-name="T13">language</text:span> -ben angiver programfilens sprog, og et <text:s/><text:span text:style-name="T13">use </text:span>-ben angiver referencer til andre biblioteker.</text:p>
      <text:p text:style-name="P2">Når et bibliotek indlæses, lagres modulerne som ben i en node, idet benenes navne er modulnavnene mens deres værdier er modulhovederne med modulets tekst som forben i stedet for modulnavnet. Bibliotekshovedet lagres i halebenet.</text:p>
      <text:h text:style-name="Heading_20_2" text:outline-level="2">Testregler</text:h>
      <text:h text:style-name="Heading_20_3" text:outline-level="3">Lokale testfunktioner</text:h>
      <text:p text:style-name="Text_20_body">Regler af form</text:p>
      <text:p text:style-name="Text_20_body"><text:tab/><text:span text:style-name="T13">{ .</text:span><text:span text:style-name="T2">navn</text:span><text:span text:style-name="T13"> | :ok </text:span><text:span text:style-name="T2">testudtryk</text:span><text:span text:style-name="T13"> }</text:span></text:p>
      <text:p text:style-name="P1">kan aktiveres gennem et moduls <text:span text:style-name="T13">Test -</text:span>menu når modulet er i gemt/uændret tilstand. Aktivering af menupunktet kalder det pågældende navn, og hvis kaldet lykkes, vises resultatet i et <text:s/><text:span text:style-name="T13">Resultat -</text:span><text:span text:style-name="T6">vindue. Hvis resultate ikke skal vises, kan ansvarstageren udelades:</text:span></text:p>
      <text:p text:style-name="Text_20_body"><text:tab/><text:span text:style-name="T13">{ .</text:span><text:span text:style-name="T2">navn</text:span><text:span text:style-name="T13"> | </text:span><text:span text:style-name="T2">testudtryk</text:span><text:span text:style-name="T13"> }</text:span></text:p>
      <text:p text:style-name="P2">En eventuel kviktest-funktion</text:p>
      <text:p text:style-name="Text_20_body"><text:tab/><text:span text:style-name="T13">{</text:span><text:span text:style-name="T9"> .test</text:span><text:span text:style-name="T13"> | :ok </text:span><text:span text:style-name="T2">testudtryk</text:span><text:span text:style-name="T13"> }</text:span></text:p>
      <text:p text:style-name="P1">kan aktiveres med tastaturgenvejen</text:p>
      <text:p text:style-name="P1"><text:tab/><text:span text:style-name="T13">Ctrl+T</text:span></text:p>
      <text:p text:style-name="P1">som først gemmer modulet hvis det ikke allerede er gemt, og derefter kalder kvikttestfunktionen hvis den findes.</text:p>
      <text:h text:style-name="Heading_20_3" text:outline-level="3">Testmoduler</text:h>
      <text:p text:style-name="P1">Testmoduler definerer testfunktioner der kan bruges fra alle moduler i en gren af modultræet.</text:p>
      <text:p text:style-name="P1">Lad os antage at du arbejder med et modul ved navn <text:s/><text:span text:style-name="T13">[a b c]</text:span> . Når du gemmer modulet eller trykker <text:s/><text:span text:style-name="T13">Ctrl-T</text:span>, afsøges disse moduler for test funktioner i den angivne rækkefølge:</text:p>
      <text:p text:style-name="P10"><text:tab/>[a b c]<text:line-break/><text:tab/>[a b c test]<text:line-break/><text:tab/>[a b test]<text:line-break/><text:tab/>[a test]<text:line-break/><text:tab/>[test,]</text:p>
      <text:p text:style-name="P1">Hver testfunktion bindes til det første modul hvor den findes.</text:p>
      <text:p text:style-name="P1">Testfunktioner i modulet <text:span text:style-name="T13"><text:s/>[test,]</text:span> <text:s/>kan bruges hvor som helst. Men hvis man har mange testfunktioner, bør de lægges ud i de grene af modul træet hvor de er relevante, af hensyn til overskueligheden af testmenuerne.</text:p>
      <text:h text:style-name="Heading_20_3" text:outline-level="3">Testprojekter</text:h>
      <text:p text:style-name="Text_20_body">Hvis man skal teste et bibliotek der bruges af forskellige programmer,kan det være praktisk at indlægge et program i biblioteksbaduljen, så dette programs moduler er tilgængelige fra bibliotekets testfunktioner – men ikke fra andre programmer der bruger biblioteket. Et sådant program kaldes et <text:span text:style-name="T1">testprojekt</text:span><text:span text:style-name="T6">.</text:span></text:p>
      <text:p text:style-name="Text_20_body"><text:span text:style-name="T14">Åbn bibliotekets <text:s/></text:span><text:span text:style-name="T13">Brug bibliotekerne</text:span><text:span text:style-name="T14"> -panel, tilføj testprogrammet, og markér det med <text:s/></text:span><text:span text:style-name="T13">Ctrl-T</text:span><text:span text:style-name="T14"> . Testprogrammet vil nu blive medtaget i bibliotekets egen badulje, men ikke i de baduljer der bruger biblioteket.</text:span></text:p>
      <text:h text:style-name="Heading_20_1" text:outline-level="1">Brugerflader med PILS</text:h>
      <text:p text:style-name="Text_20_body">Brugerfladeprogrammering foregår gennem et PILS bibliotek <text:s/><text:span text:style-name="T13">&lt;pils&gt;/english/system/juce/juce</text:span> <text:s/>som bygger på PILS bindinger til et underliggende system, som for nærværende er Juce, se <text:a xlink:type="simple" xlink:href="http://www.rawmaterialsoftware.com/" text:style-name="Internet_20_link" text:visited-style-name="Visited_20_Internet_20_Link">http://www.rawmaterialsoftware.com</text:a> . PILS bindingerne er genereret af et PILS program – plumming-generator.pils – og dækker det meste af Juce.</text:p>
      <text:p text:style-name="Text_20_body">Det relevante PILS bibliotek medtages automatisk i alle PILS baduljer og tilgås gennem <text:span text:style-name="T13"><text:s/>platform <text:s/></text:span><text:span text:style-name="T14">som er et alias for <text:s/></text:span><text:span text:style-name="T13">@ [platform juce entry]</text:span><text:span text:style-name="T14"> , indgangene til biblioteket er undermoduler af dette modul.</text:span></text:p>
      <text:h text:style-name="Heading_20_2" text:outline-level="2">Vinduer og ruder</text:h>
      <text:p text:style-name="Text_20_body"><text:span text:style-name="T14"><text:tab/></text:span><text:span text:style-name="T13">platform vindue [test] tekstrude tekst "Der var engang " udvalg (-1, -1) udpeg</text:span></text:p>
      <text:p text:style-name="Text_20_body"><text:span text:style-name="T14">Ovenstående udtryk opretter et vindue med overskriften <text:s/></text:span><text:span text:style-name="T13">Test </text:span><text:span text:style-name="T14">, udfylder det med en tekstrude med teksten </text:span><text:span text:style-name="T13">"Der var engang " </text:span><text:span text:style-name="T14">og sætter markøren i slutningen så man kan skrive videre på historien.</text:span></text:p>
      <text:p text:style-name="Text_20_body"><text:span text:style-name="T8">Brugerflader opbygges typisk ved at oprette et vindue og udstyre det med ruder der oprettes med metoder på vinduet eller mellemliggende ruder. Ruderne oprettes fra moduler <text:s/></text:span><text:span text:style-name="T9">[platform juce parent </text:span><text:span text:style-name="T2">xxx</text:span><text:span text:style-name="T9">]</text:span><text:span text:style-name="T8"> , som indirekte er tilgængelige som metoder på vinduer samt de ruder hvor under-ruder giver mening.</text:span></text:p>
      <text:p text:style-name="P2">Udvalget af ruder der understøttes af PILS og deres grænseflade er stadig under forandring. På langt sigt skal de fleste af dem gerne erstattes af ruder der er implementeret i PILS, baseret på PILS grafer. Derfor er der ingen udførlig dokumentation for dem, og hvis man har brug for at finde ud af hvilke metoder de understøtter, må man undersøge de relevante moduler i bindingsbiblioteket – og finde deres danske navne via den danske PILS sprognode hvis man programmerer i dansk PILS.</text:p>
      <text:p text:style-name="P2">Bemærk at Juce biblioteket giver mulighed for at oprette kontroller uafhængigt af underliggende kontroller og vinduer, og omplacere dem – mens PILS ruder bør behandles som tilhørende det vindue eller den rude hvorfra de blev oprettet, og ikke bør omplaceres. Denne begrænsning er indført for at sikre korrekt frigivelse; Juce biblioteket er ikke konstrueret med bindinger til dynamiske sprog for øje og har ikke de bagindgange der er nødvendige for en finkornet styring af binderne. Derfor må PILS bruge en grovere metode: når en rude løsrives fra det underliggende vindue, frigiver PILS den automatisk..</text:p>
      <text:h text:style-name="Heading_20_2" text:outline-level="2">Hændelser og udbyggere</text:h>
      <text:p text:style-name="Text_20_body"><text:span text:style-name="T14">For at reagere på brugerens gøren og laden skal brugerfladens objekter udbygges med PILS regler med operationen <text:s/></text:span><text:span text:style-name="T13">når</text:span><text:span text:style-name="T14"> .</text:span></text:p>
      <text:p text:style-name="P10"><text:tab/>;vindue platform vindue [test];<text:line-break/><text:tab/>vindue tekstrude<text:line-break/><text:tab/>når {.ændret|:hvem :hvis hvem tekst &lt;$* "dages ende."; vindue luk}<text:line-break/><text:tab/>tekst "Der var engang "<text:line-break/><text:tab/>udvalg (-1, -1) udpeg</text:p>
      <text:p text:style-name="Text_20_body"><text:span text:style-name="T14">Denne version lukker automatisk vinduet i det øjeblik teksten afsluttes med </text:span><text:span text:style-name="T13">"dages ende." </text:span><text:span text:style-name="T14">. Bemærk at udbygningen af tekstruden sættes på straks efter oprettelsen og refererer til ruden gennem <text:s/></text:span><text:span text:style-name="T13">:hvem</text:span><text:span text:style-name="T19"> ‑binderen. For at sikre mod cirkulære referencer tillader PILS ikke at man udbygger objekter som der findes flere referencer til. Dette vil resultere i en fejl:</text:span></text:p>
      <text:p text:style-name="P15"><text:tab/>;tekstrude vindue tekstrude;<text:line-break/><text:tab/>tekstrude når {.ændret|:hvis tekstrude tekst &lt;$* "dages ende."; vindue luk}</text:p>
      <text:p text:style-name="Text_20_body"><text:span text:style-name="T14">Her vil <text:s/></text:span><text:span text:style-name="T13">når </text:span><text:span text:style-name="T14">‑operation fejle og nægte at udbygge ruden, idet dette ville resultere i en cirkulær reference. </text:span></text:p>
      <text:h text:style-name="Heading_20_1" text:outline-level="1">PILS Grafer</text:h>
      <text:p text:style-name="Text_20_body">PILS har indbygget et letvægts-vektorgrafikformat hvis faciliteter p.t. afspejler Juce-bibliotekets grundlæggende grafiklag.</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3-19T21:37:20.701018655</dc:date>
    <meta:printed-by>Ole Nielsby</meta:printed-by>
    <meta:print-date>2007-10-31T12:25:25</meta:print-date>
    <meta:editing-cycles>302</meta:editing-cycles>
    <meta:editing-duration>P10DT15H34M43S</meta:editing-duration>
    <meta:document-statistic meta:table-count="0" meta:image-count="0" meta:object-count="0" meta:page-count="1" meta:paragraph-count="1141" meta:word-count="17866" meta:character-count="115734" meta:non-whitespace-character-count="97004"/>
    <meta:user-defined meta:name="Info 1"/>
    <meta:user-defined meta:name="Info 2"/>
    <meta:user-defined meta:name="Info 3"/>
    <meta:user-defined meta:name="Info 4"/>
  </office:meta>
</office:document-meta>
</file>